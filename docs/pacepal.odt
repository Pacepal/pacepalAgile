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40000000400FC2EC98A.png" manifest:media-type="image/png"/>
  <manifest:file-entry manifest:full-path="Pictures/10000001000000F4000000E66779313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a2" style:family="table">
      <style:table-properties style:width="17cm" table:align="left"/>
    </style:style>
    <style:style style:name="Tabla2.A" style:family="table-column">
      <style:table-column-properties style:column-width="2.545cm"/>
    </style:style>
    <style:style style:name="Tabla2.B" style:family="table-column">
      <style:table-column-properties style:column-width="7.551cm"/>
    </style:style>
    <style:style style:name="Tabla2.C" style:family="table-column">
      <style:table-column-properties style:column-width="6.904cm"/>
    </style:style>
    <style:style style:name="Tabla2.A1" style:family="table-cell">
      <style:table-cell-properties style:vertical-align="middle" fo:padding="0.049cm" fo:border="0.05pt solid #000000"/>
    </style:style>
    <style:style style:name="Tabla1" style:family="table">
      <style:table-properties style:width="15.727cm" table:align="left"/>
    </style:style>
    <style:style style:name="Tabla1.A" style:family="table-column">
      <style:table-column-properties style:column-width="3.549cm"/>
    </style:style>
    <style:style style:name="Tabla1.B" style:family="table-column">
      <style:table-column-properties style:column-width="9.043cm"/>
    </style:style>
    <style:style style:name="Tabla1.C" style:family="table-column">
      <style:table-column-properties style:column-width="3.134cm"/>
    </style:style>
    <style:style style:name="Tabla1.A1" style:family="table-cell">
      <style:table-cell-properties style:vertical-align="middle" fo:padding="0.049cm" fo:border="0.05pt solid #000000"/>
    </style:style>
    <style:style style:name="Tabla3" style:family="table">
      <style:table-properties style:width="14.771cm" table:align="left"/>
    </style:style>
    <style:style style:name="Tabla3.A" style:family="table-column">
      <style:table-column-properties style:column-width="4.914cm"/>
    </style:style>
    <style:style style:name="Tabla3.B" style:family="table-column">
      <style:table-column-properties style:column-width="7.05cm"/>
    </style:style>
    <style:style style:name="Tabla3.C" style:family="table-column">
      <style:table-column-properties style:column-width="2.806cm"/>
    </style:style>
    <style:style style:name="Tabla3.A1" style:family="table-cell">
      <style:table-cell-properties style:vertical-align="middle" fo:padding="0.049cm" fo:border="0.05pt solid #000000"/>
    </style:style>
    <style:style style:name="Tabla4" style:family="table">
      <style:table-properties style:width="15.401cm" table:align="left"/>
    </style:style>
    <style:style style:name="Tabla4.A" style:family="table-column">
      <style:table-column-properties style:column-width="4.655cm"/>
    </style:style>
    <style:style style:name="Tabla4.B" style:family="table-column">
      <style:table-column-properties style:column-width="1.669cm"/>
    </style:style>
    <style:style style:name="Tabla4.C" style:family="table-column">
      <style:table-column-properties style:column-width="1.48cm"/>
    </style:style>
    <style:style style:name="Tabla4.D" style:family="table-column">
      <style:table-column-properties style:column-width="1.785cm"/>
    </style:style>
    <style:style style:name="Tabla4.E" style:family="table-column">
      <style:table-column-properties style:column-width="1.833cm"/>
    </style:style>
    <style:style style:name="Tabla4.F" style:family="table-column">
      <style:table-column-properties style:column-width="3.979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963cm"/>
    </style:style>
    <style:style style:name="Tabla5.B" style:family="table-column">
      <style:table-column-properties style:column-width="3.147cm"/>
    </style:style>
    <style:style style:name="Tabla5.C" style:family="table-column">
      <style:table-column-properties style:column-width="4.83cm"/>
    </style:style>
    <style:style style:name="Tabla5.D" style:family="table-column">
      <style:table-column-properties style:column-width="6.061cm"/>
    </style:style>
    <style:style style:name="Tabla5.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3.106cm"/>
    </style:style>
    <style:style style:name="Tabla8.B" style:family="table-column">
      <style:table-column-properties style:column-width="4.413cm"/>
    </style:style>
    <style:style style:name="Tabla8.C" style:family="table-column">
      <style:table-column-properties style:column-width="9.481cm"/>
    </style:style>
    <style:style style:name="Tabla8.A1" style:family="table-cell">
      <style:table-cell-properties style:vertical-align="middle" fo:padding="0.049cm" fo:border="0.05pt solid #000000"/>
    </style:style>
    <style:style style:name="Tabla9" style:family="table">
      <style:table-properties style:width="14.646cm" table:align="left"/>
    </style:style>
    <style:style style:name="Tabla9.A" style:family="table-column">
      <style:table-column-properties style:column-width="3.501cm"/>
    </style:style>
    <style:style style:name="Tabla9.B" style:family="table-column">
      <style:table-column-properties style:column-width="11.144cm"/>
    </style:style>
    <style:style style:name="Tabla9.A1" style:family="table-cell">
      <style:table-cell-properties style:vertical-align="middle" fo:padding="0.049cm" fo:border="0.05pt solid #000000"/>
    </style:style>
    <style:style style:name="Tabla6" style:family="table">
      <style:table-properties style:width="14.799cm" table:align="left"/>
    </style:style>
    <style:style style:name="Tabla6.A" style:family="table-column">
      <style:table-column-properties style:column-width="7.421cm"/>
    </style:style>
    <style:style style:name="Tabla6.B" style:family="table-column">
      <style:table-column-properties style:column-width="7.378cm"/>
    </style:style>
    <style:style style:name="Tabla6.A1" style:family="table-cell">
      <style:table-cell-properties style:vertical-align="middle" fo:padding="0.049cm" fo:border="0.05pt solid #000000"/>
    </style:style>
    <style:style style:name="Tabla7" style:family="table">
      <style:table-properties style:width="14.399cm" table:align="left"/>
    </style:style>
    <style:style style:name="Tabla7.A" style:family="table-column">
      <style:table-column-properties style:column-width="6.973cm"/>
    </style:style>
    <style:style style:name="Tabla7.B" style:family="table-column">
      <style:table-column-properties style:column-width="7.426cm"/>
    </style:style>
    <style:style style:name="Tabla7.A1" style:family="table-cell">
      <style:table-cell-properties style:vertical-align="middle" fo:padding="0.049cm" fo:border="0.05pt solid #000000"/>
    </style:style>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Calibri" officeooo:paragraph-rsid="0019c117"/>
    </style:style>
    <style:style style:name="P4" style:family="paragraph" style:parent-style-name="Text_20_body">
      <style:paragraph-properties fo:text-align="center" style:justify-single-word="false"/>
      <style:text-properties fo:font-weight="bold" officeooo:rsid="00140c84"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796a6"/>
    </style:style>
    <style:style style:name="P7" style:family="paragraph" style:parent-style-name="Text_20_body">
      <style:text-properties style:font-name="Calibri" officeooo:paragraph-rsid="001796a6"/>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Standard">
      <style:text-properties style:font-name="Calibri" fo:font-size="12pt" fo:font-weight="normal" style:font-size-asian="10.5pt" style:font-weight-asian="normal" style:font-size-complex="12pt" style:font-weight-complex="normal"/>
    </style:style>
    <style:style style:name="P13" style:family="paragraph" style:parent-style-name="Heading_20_2">
      <style:paragraph-properties fo:break-before="page"/>
      <style:text-properties style:font-name="Calibri"/>
    </style:style>
    <style:style style:name="P14" style:family="paragraph" style:parent-style-name="Text_20_body">
      <style:text-properties style:font-name="Calibri"/>
    </style:style>
    <style:style style:name="P15" style:family="paragraph" style:parent-style-name="Text_20_body">
      <style:text-properties style:font-name="Calibri" officeooo:paragraph-rsid="001c6cd7"/>
    </style:style>
    <style:style style:name="P16" style:family="paragraph" style:parent-style-name="Quotations">
      <style:paragraph-properties fo:margin-top="0cm" fo:margin-bottom="0.247cm" style:contextual-spacing="false" fo:line-height="115%" fo:text-align="center" style:justify-single-word="false"/>
      <style:text-properties style:font-name="Calibri" fo:font-weight="bold"/>
    </style:style>
    <style:style style:name="P17" style:family="paragraph" style:parent-style-name="Heading_20_2">
      <style:text-properties style:font-name="Calibri"/>
    </style:style>
    <style:style style:name="P18" style:family="paragraph" style:parent-style-name="Heading_20_3">
      <style:paragraph-properties fo:margin-top="0cm" fo:margin-bottom="0.247cm" style:contextual-spacing="false" fo:line-height="115%"/>
      <style:text-properties style:font-name="Calibri"/>
    </style:style>
    <style:style style:name="P19" style:family="paragraph" style:parent-style-name="Text_20_body">
      <style:text-properties style:font-name="Calibri" fo:font-weight="normal" style:font-weight-asian="normal" style:font-weight-complex="normal"/>
    </style:style>
    <style:style style:name="P20" style:family="paragraph" style:parent-style-name="Text_20_body">
      <style:text-properties style:font-name="Calibri" fo:font-weight="bold"/>
    </style:style>
    <style:style style:name="P21" style:family="paragraph" style:parent-style-name="Text_20_body" style:list-style-name="L1">
      <style:text-properties style:font-name="Calibri" fo:font-weight="bold"/>
    </style:style>
    <style:style style:name="P22" style:family="paragraph" style:parent-style-name="Text_20_body" style:list-style-name="L2">
      <style:text-properties style:font-name="Calibri" fo:font-weight="bold"/>
    </style:style>
    <style:style style:name="P23" style:family="paragraph" style:parent-style-name="Heading_20_2">
      <style:paragraph-properties fo:margin-top="0cm" fo:margin-bottom="0.247cm" style:contextual-spacing="false" fo:line-height="115%"/>
      <style:text-properties style:font-name="Calibri"/>
    </style:style>
    <style:style style:name="P24" style:family="paragraph" style:parent-style-name="Text_20_body" style:list-style-name="L3">
      <style:text-properties style:font-name="Calibri" fo:font-weight="bold"/>
    </style:style>
    <style:style style:name="P25" style:family="paragraph" style:parent-style-name="Heading_20_2">
      <style:paragraph-properties fo:break-before="page"/>
      <style:text-properties style:font-name="Calibri" fo:font-weight="bold"/>
    </style:style>
    <style:style style:name="P26" style:family="paragraph" style:parent-style-name="Text_20_body">
      <style:paragraph-properties fo:margin-left="0cm" fo:margin-right="0cm" fo:margin-top="0cm" fo:margin-bottom="0.247cm" style:contextual-spacing="false" fo:line-height="114%" fo:text-indent="0cm" style:auto-text-indent="false"/>
      <style:text-properties style:font-name="Calibri" fo:font-weight="normal" style:font-weight-asian="normal" style:font-weight-complex="normal"/>
    </style:style>
    <style:style style:name="P27" style:family="paragraph" style:parent-style-name="Heading_20_3">
      <style:paragraph-properties fo:margin-left="0cm" fo:margin-right="0cm" fo:margin-top="0cm" fo:margin-bottom="0.247cm" style:contextual-spacing="false" fo:line-height="114%" fo:text-indent="0cm" style:auto-text-indent="false"/>
      <style:text-properties style:font-name="Calibri"/>
    </style:style>
    <style:style style:name="P28"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2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Calibri" fo:font-weight="normal" style:font-weight-asian="normal" style:font-weight-complex="normal"/>
    </style:style>
    <style:style style:name="P30" style:family="paragraph" style:parent-style-name="Table_20_Contents">
      <style:paragraph-properties fo:margin-left="0cm" fo:margin-right="0cm" fo:margin-top="0cm" fo:margin-bottom="0cm" style:contextual-spacing="false" fo:line-height="114%" fo:text-indent="0cm" style:auto-text-indent="false"/>
    </style:style>
    <style:style style:name="P31" style:family="paragraph" style:parent-style-name="Table_20_Contents">
      <style:paragraph-properties fo:margin-left="0cm" fo:margin-right="0cm" fo:margin-top="0cm" fo:margin-bottom="0.247cm" style:contextual-spacing="false" fo:line-height="114%" fo:text-indent="0cm" style:auto-text-indent="false"/>
      <style:text-properties style:font-name="Calibri" fo:font-weight="bold"/>
    </style:style>
    <style:style style:name="P32" style:family="paragraph" style:parent-style-name="Table_20_Contents">
      <style:paragraph-properties fo:margin-left="0cm" fo:margin-right="0cm" fo:margin-top="0cm" fo:margin-bottom="0.247cm" style:contextual-spacing="false" fo:line-height="114%" fo:text-indent="0cm" style:auto-text-indent="false"/>
      <style:text-properties style:font-name="Calibri"/>
    </style:style>
    <style:style style:name="P33" style:family="paragraph" style:parent-style-name="Quotations">
      <style:paragraph-properties fo:margin-left="1cm" fo:margin-right="1cm" fo:margin-top="0cm" fo:margin-bottom="0.499cm" style:contextual-spacing="false" fo:line-height="114%" fo:text-align="center" style:justify-single-word="false" fo:text-indent="0cm" style:auto-text-indent="false"/>
      <style:text-properties style:font-name="Calibri" fo:font-weight="bold"/>
    </style:style>
    <style:style style:name="P34" style:family="paragraph" style:parent-style-name="Text_20_body" style:list-style-name="L5">
      <style:text-properties style:font-name="Calibri"/>
    </style:style>
    <style:style style:name="P35" style:family="paragraph" style:parent-style-name="Text_20_body" style:list-style-name="L6">
      <style:text-properties style:font-name="Calibri"/>
    </style:style>
    <style:style style:name="P36" style:family="paragraph" style:parent-style-name="Text_20_body" style:list-style-name="L7">
      <style:text-properties style:font-name="Calibri"/>
    </style:style>
    <style:style style:name="P37" style:family="paragraph" style:parent-style-name="Text_20_body" style:list-style-name="L8">
      <style:text-properties style:font-name="Calibri"/>
    </style:style>
    <style:style style:name="P38" style:family="paragraph" style:parent-style-name="Text_20_body" style:list-style-name="L9">
      <style:text-properties style:font-name="Calibri"/>
    </style:style>
    <style:style style:name="P39" style:family="paragraph" style:parent-style-name="Text_20_body" style:list-style-name="L10">
      <style:text-properties style:font-name="Calibri"/>
    </style:style>
    <style:style style:name="P40" style:family="paragraph" style:parent-style-name="Text_20_body">
      <style:paragraph-properties fo:margin-left="0cm" fo:margin-right="0cm" fo:margin-top="0cm" fo:margin-bottom="0.247cm" style:contextual-spacing="false" fo:line-height="114%" fo:text-indent="0cm" style:auto-text-indent="false"/>
      <style:text-properties style:font-name="Calibri"/>
    </style:style>
    <style:style style:name="P41" style:family="paragraph" style:parent-style-name="Heading_20_3">
      <style:paragraph-properties fo:margin-left="0cm" fo:margin-right="0cm" fo:margin-top="0cm" fo:margin-bottom="0.247cm" style:contextual-spacing="false" fo:line-height="114%" fo:text-indent="0cm" style:auto-text-indent="false"/>
      <style:text-properties style:font-name="Calibri" officeooo:paragraph-rsid="0029ee9e"/>
    </style:style>
    <style:style style:name="P42" style:family="paragraph" style:parent-style-name="Heading_20_3">
      <style:paragraph-properties fo:margin-left="0cm" fo:margin-right="0cm" fo:margin-top="0cm" fo:margin-bottom="0.247cm" style:contextual-spacing="false" fo:line-height="114%" fo:text-indent="0cm" style:auto-text-indent="false" fo:break-before="page"/>
      <style:text-properties style:font-name="Calibri"/>
    </style:style>
    <style:style style:name="P43"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Calibri" officeooo:paragraph-rsid="003177ef"/>
    </style:style>
    <style:style style:name="P44"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Calibri"/>
    </style:style>
    <style:style style:name="P45"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Calibri"/>
    </style:style>
    <style:style style:name="P46"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Calibri"/>
    </style:style>
    <style:style style:name="P47" style:family="paragraph" style:parent-style-name="Text_20_body" style:list-style-name="L14">
      <style:text-properties style:font-name="Calibri"/>
    </style:style>
    <style:style style:name="P48" style:family="paragraph" style:parent-style-name="Text_20_body" style:list-style-name="L15">
      <style:text-properties style:font-name="Calibri"/>
    </style:style>
    <style:style style:name="P49" style:family="paragraph" style:parent-style-name="Heading_20_3">
      <style:paragraph-properties fo:margin-top="0cm" fo:margin-bottom="0.247cm" style:contextual-spacing="false" fo:line-height="115%" fo:break-before="page"/>
      <style:text-properties style:font-name="Calibri"/>
    </style:style>
    <style:style style:name="P50" style:family="paragraph" style:parent-style-name="Text_20_body" style:list-style-name="L16">
      <style:text-properties style:font-name="Calibri"/>
    </style:style>
    <style:style style:name="P51" style:family="paragraph" style:parent-style-name="Text_20_body">
      <style:text-properties style:font-name="Calibri" officeooo:paragraph-rsid="003b8bf8"/>
    </style:style>
    <style:style style:name="P52" style:family="paragraph" style:parent-style-name="Text_20_body" style:list-style-name="L17">
      <style:text-properties style:font-name="Calibri"/>
    </style:style>
    <style:style style:name="P53" style:family="paragraph" style:parent-style-name="Text_20_body" style:list-style-name="L18">
      <style:text-properties style:font-name="Calibri"/>
    </style:style>
    <style:style style:name="P54" style:family="paragraph" style:parent-style-name="Heading_20_2">
      <style:paragraph-properties fo:margin-left="0cm" fo:margin-right="0cm" fo:margin-top="0cm" fo:margin-bottom="0.247cm" style:contextual-spacing="false" fo:line-height="115%" fo:orphans="2" fo:widows="2" fo:text-indent="0cm" style:auto-text-indent="false"/>
      <style:text-properties fo:font-variant="normal" fo:text-transform="none" fo:color="#e3e3e3" loext:opacity="100%" style:font-name="Times New Roman" fo:letter-spacing="normal" fo:font-style="normal" fo:font-weight="normal"/>
    </style:style>
    <style:style style:name="P55" style:family="paragraph" style:parent-style-name="Text_20_body" style:list-style-name="L19">
      <style:text-properties style:font-name="Calibri"/>
    </style:style>
    <style:style style:name="P56" style:family="paragraph" style:parent-style-name="Text_20_body" style:list-style-name="L19">
      <style:text-properties style:font-name="Calibri" fo:font-size="8pt" officeooo:paragraph-rsid="004ca312" style:font-size-asian="8pt" style:font-size-complex="8pt"/>
    </style:style>
    <style:style style:name="P57" style:family="paragraph" style:parent-style-name="Heading_20_2">
      <style:paragraph-properties fo:margin-top="0cm" fo:margin-bottom="0.247cm" style:contextual-spacing="false" fo:line-height="115%"/>
      <style:text-properties style:font-name="Calibri" officeooo:paragraph-rsid="003f9e22"/>
    </style:style>
    <style:style style:name="P58" style:family="paragraph" style:parent-style-name="Heading_20_2">
      <style:paragraph-properties fo:margin-top="0cm" fo:margin-bottom="0.247cm" style:contextual-spacing="false" fo:line-height="115%" fo:break-before="page"/>
      <style:text-properties style:font-name="Calibri" officeooo:paragraph-rsid="003f9e22"/>
    </style:style>
    <style:style style:name="P59" style:family="paragraph" style:parent-style-name="Text_20_body" style:list-style-name="L20">
      <style:text-properties style:font-name="Calibri"/>
    </style:style>
    <style:style style:name="P60" style:family="paragraph" style:parent-style-name="Text_20_body" style:list-style-name="L21">
      <style:text-properties style:font-name="Calibri"/>
    </style:style>
    <style:style style:name="P61" style:family="paragraph" style:parent-style-name="Text_20_body">
      <style:text-properties style:font-name="Calibri" officeooo:paragraph-rsid="0052aa47"/>
    </style:style>
    <style:style style:name="P62" style:family="paragraph" style:parent-style-name="Text_20_body" style:list-style-name="L22">
      <style:text-properties style:font-name="Calibri" officeooo:paragraph-rsid="0052aa47"/>
    </style:style>
    <style:style style:name="P63" style:family="paragraph" style:parent-style-name="Text_20_body" style:list-style-name="L23">
      <style:text-properties style:font-name="Calibri"/>
    </style:style>
    <style:style style:name="P64" style:family="paragraph" style:parent-style-name="Text_20_body" style:list-style-name="L24">
      <style:text-properties style:font-name="Calibri"/>
    </style:style>
    <style:style style:name="P65" style:family="paragraph" style:parent-style-name="Text_20_body" style:list-style-name="L25">
      <style:text-properties style:font-name="Calibri"/>
    </style:style>
    <style:style style:name="P66" style:family="paragraph" style:parent-style-name="Text_20_body">
      <style:paragraph-properties fo:margin-top="0cm" fo:margin-bottom="0.247cm" style:contextual-spacing="false" fo:line-height="115%"/>
      <style:text-properties style:font-name="Calibri" officeooo:paragraph-rsid="003f9e22"/>
    </style:style>
    <style:style style:name="P67" style:family="paragraph" style:parent-style-name="Text_20_body" style:list-style-name="L26">
      <style:paragraph-properties fo:margin-left="0cm" fo:margin-right="0cm" fo:margin-top="0cm" fo:margin-bottom="0.247cm" style:contextual-spacing="false" fo:line-height="114%" fo:text-indent="0cm" style:auto-text-indent="false" fo:padding="0cm" fo:border="none"/>
      <style:text-properties style:font-name="Calibri"/>
    </style:style>
    <style:style style:name="P68" style:family="paragraph" style:parent-style-name="Text_20_body" style:list-style-name="L27">
      <style:paragraph-properties fo:margin-left="0cm" fo:margin-right="0cm" fo:margin-top="0cm" fo:margin-bottom="0.247cm" style:contextual-spacing="false" fo:line-height="114%" fo:text-indent="0cm" style:auto-text-indent="false" fo:padding="0cm" fo:border="none"/>
      <style:text-properties style:font-name="Calibri"/>
    </style:style>
    <style:style style:name="P69" style:family="paragraph" style:parent-style-name="Heading_20_4">
      <style:paragraph-properties fo:margin-left="0cm" fo:margin-right="0cm" fo:margin-top="0cm" fo:margin-bottom="0.247cm" style:contextual-spacing="false" fo:line-height="114%" fo:text-indent="0cm" style:auto-text-indent="false"/>
      <style:text-properties style:font-name="Calibri"/>
    </style:style>
    <style:style style:name="P70" style:family="paragraph" style:parent-style-name="Text_20_body" style:list-style-name="L28">
      <style:paragraph-properties fo:margin-left="0cm" fo:margin-right="0cm" fo:margin-top="0cm" fo:margin-bottom="0.247cm" style:contextual-spacing="false" fo:line-height="114%" fo:text-indent="0cm" style:auto-text-indent="false" fo:padding="0cm" fo:border="none"/>
      <style:text-properties style:font-name="Calibri"/>
    </style:style>
    <style:style style:name="P71" style:family="paragraph" style:parent-style-name="Text_20_body" style:list-style-name="L29">
      <style:paragraph-properties fo:margin-left="0cm" fo:margin-right="0cm" fo:margin-top="0cm" fo:margin-bottom="0.247cm" style:contextual-spacing="false" fo:line-height="114%" fo:text-indent="0cm" style:auto-text-indent="false" fo:padding="0cm" fo:border="none"/>
      <style:text-properties style:font-name="Calibri"/>
    </style:style>
    <style:style style:name="P72" style:family="paragraph" style:parent-style-name="Text_20_body" style:list-style-name="L29">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73" style:family="paragraph" style:parent-style-name="Quotations">
      <style:paragraph-properties fo:margin-left="1cm" fo:margin-right="1cm" fo:margin-top="0cm" fo:margin-bottom="0.499cm" style:contextual-spacing="false" fo:line-height="114%" fo:text-indent="0cm" style:auto-text-indent="false"/>
      <style:text-properties style:font-name="Calibri"/>
    </style:style>
    <style:style style:name="P74" style:family="paragraph" style:parent-style-name="Heading_20_2">
      <style:paragraph-properties fo:margin-left="0cm" fo:margin-right="0cm" fo:margin-top="0cm" fo:margin-bottom="0.247cm" style:contextual-spacing="false" fo:line-height="114%" fo:text-indent="0cm" style:auto-text-indent="false" fo:break-before="page"/>
      <style:text-properties style:font-name="Calibri"/>
    </style:style>
    <style:style style:name="P75" style:family="paragraph" style:parent-style-name="Quotations">
      <style:paragraph-properties fo:margin-left="1cm" fo:margin-right="1cm" fo:margin-top="0cm" fo:margin-bottom="0.499cm" style:contextual-spacing="false" fo:line-height="114%" fo:text-indent="0cm" style:auto-text-indent="false"/>
      <style:text-properties style:font-name="Calibri" fo:font-weight="bold"/>
    </style:style>
    <style:style style:name="P76" style:family="paragraph" style:parent-style-name="Table_20_Contents">
      <style:paragraph-properties fo:margin-left="0cm" fo:margin-right="0cm" fo:margin-top="0cm" fo:margin-bottom="0.247cm" style:contextual-spacing="false" fo:line-height="114%" fo:text-indent="0cm" style:auto-text-indent="false"/>
    </style:style>
    <style:style style:name="P77" style:family="paragraph" style:parent-style-name="Text_20_body" style:list-style-name="L30">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78" style:family="paragraph" style:parent-style-name="Text_20_body">
      <style:paragraph-properties fo:margin-left="0cm" fo:margin-right="0cm" fo:margin-top="0cm" fo:margin-bottom="0.247cm" style:contextual-spacing="false" fo:line-height="114%" fo:text-indent="0cm" style:auto-text-indent="false"/>
      <style:text-properties style:font-name="Calibri" fo:font-weight="bold"/>
    </style:style>
    <style:style style:name="P79" style:family="paragraph" style:parent-style-name="Text_20_body" style:list-style-name="L31">
      <style:paragraph-properties fo:margin-left="0cm" fo:margin-right="0cm" fo:margin-top="0cm" fo:margin-bottom="0.247cm" style:contextual-spacing="false" fo:line-height="114%" fo:text-indent="0cm" style:auto-text-indent="false" fo:padding="0cm" fo:border="none"/>
      <style:text-properties style:font-name="Calibri"/>
    </style:style>
    <style:style style:name="P80" style:family="paragraph" style:parent-style-name="Text_20_body" style:list-style-name="L31">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81" style:family="paragraph" style:parent-style-name="Text_20_body">
      <style:paragraph-properties fo:margin-left="0cm" fo:margin-right="0cm" fo:margin-top="0cm" fo:margin-bottom="0.247cm" style:contextual-spacing="false" fo:line-height="114%" fo:text-indent="0cm" style:auto-text-indent="false" fo:break-before="page"/>
      <style:text-properties style:font-name="Calibri"/>
    </style:style>
    <style:style style:name="P82" style:family="paragraph" style:parent-style-name="Text_20_body" style:list-style-name="L32">
      <style:paragraph-properties fo:margin-left="0cm" fo:margin-right="0cm" fo:margin-top="0cm" fo:margin-bottom="0.247cm" style:contextual-spacing="false" fo:line-height="114%" fo:text-indent="0cm" style:auto-text-indent="false" fo:padding="0cm" fo:border="none"/>
      <style:text-properties style:font-name="Calibri" fo:font-weight="bold" officeooo:paragraph-rsid="0076ed26"/>
    </style:style>
    <style:style style:name="P83" style:family="paragraph" style:parent-style-name="Text_20_body" style:list-style-name="L33">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84" style:family="paragraph" style:parent-style-name="Text_20_body" style:list-style-name="L34">
      <style:paragraph-properties fo:margin-left="0cm" fo:margin-right="0cm" fo:margin-top="0cm" fo:margin-bottom="0.247cm" style:contextual-spacing="false" fo:line-height="114%" fo:text-indent="0cm" style:auto-text-indent="false" fo:padding="0cm" fo:border="none"/>
      <style:text-properties style:font-name="Calibri"/>
    </style:style>
    <style:style style:name="P85" style:family="paragraph" style:parent-style-name="Text_20_body" style:list-style-name="L35">
      <style:paragraph-properties fo:margin-left="0cm" fo:margin-right="0cm" fo:margin-top="0cm" fo:margin-bottom="0.247cm" style:contextual-spacing="false" fo:line-height="114%" fo:text-indent="0cm" style:auto-text-indent="false" fo:padding="0cm" fo:border="none"/>
      <style:text-properties style:font-name="Calibri"/>
    </style:style>
    <style:style style:name="P86" style:family="paragraph" style:parent-style-name="Text_20_body" style:list-style-name="L35">
      <style:paragraph-properties fo:margin-left="0cm" fo:margin-right="0cm" fo:margin-top="0cm" fo:margin-bottom="0.247cm" style:contextual-spacing="false" fo:line-height="114%" fo:text-indent="0cm" style:auto-text-indent="false" fo:padding="0cm" fo:border="none"/>
      <style:text-properties style:font-name="Calibri" fo:font-weight="bold"/>
    </style:style>
    <style:style style:name="P87" style:family="paragraph" style:parent-style-name="Heading_20_2">
      <style:text-properties style:font-name="Calibri" officeooo:rsid="005a327e"/>
    </style:style>
    <style:style style:name="P88" style:family="paragraph" style:parent-style-name="Heading_20_2">
      <style:paragraph-properties fo:break-before="page"/>
      <style:text-properties style:font-name="Calibri" officeooo:rsid="005a327e"/>
    </style:style>
    <style:style style:name="P89" style:family="paragraph" style:parent-style-name="Text_20_body">
      <style:text-properties style:font-name="Calibri" officeooo:rsid="005a327e"/>
    </style:style>
    <style:style style:name="P90" style:family="paragraph" style:parent-style-name="Heading_20_3">
      <style:paragraph-properties fo:margin-top="0cm" fo:margin-bottom="0.247cm" style:contextual-spacing="false" fo:line-height="115%"/>
      <style:text-properties style:font-name="Calibri" officeooo:rsid="005a327e"/>
    </style:style>
    <style:style style:name="P91" style:family="paragraph" style:parent-style-name="Text_20_body" style:list-style-name="L36">
      <style:text-properties style:font-name="Calibri" officeooo:rsid="005a327e"/>
    </style:style>
    <style:style style:name="P92" style:family="paragraph" style:parent-style-name="Heading_20_3">
      <style:paragraph-properties fo:margin-top="0cm" fo:margin-bottom="0.247cm" style:contextual-spacing="false" fo:line-height="115%" fo:break-before="page"/>
      <style:text-properties style:font-name="Calibri" officeooo:rsid="005a327e"/>
    </style:style>
    <style:style style:name="P93" style:family="paragraph" style:parent-style-name="Text_20_body" style:list-style-name="L37">
      <style:text-properties style:font-name="Calibri" officeooo:rsid="005a327e"/>
    </style:style>
    <style:style style:name="P94" style:family="paragraph" style:parent-style-name="Text_20_body" style:list-style-name="L38">
      <style:text-properties style:font-name="Calibri" officeooo:rsid="005a327e"/>
    </style:style>
    <style:style style:name="P95" style:family="paragraph" style:parent-style-name="Text_20_body" style:list-style-name="L38">
      <style:text-properties style:font-name="Calibri" fo:font-weight="bold" officeooo:rsid="005a327e"/>
    </style:style>
    <style:style style:name="P96" style:family="paragraph" style:parent-style-name="Text_20_body" style:list-style-name="L39">
      <style:text-properties style:font-name="Calibri" officeooo:rsid="005a327e"/>
    </style:style>
    <style:style style:name="P97" style:family="paragraph" style:parent-style-name="Text_20_body" style:list-style-name="L40">
      <style:text-properties style:font-name="Calibri" officeooo:rsid="005a327e"/>
    </style:style>
    <style:style style:name="P98" style:family="paragraph" style:parent-style-name="Text_20_body" style:list-style-name="L41">
      <style:text-properties style:font-name="Calibri" officeooo:rsid="005a327e"/>
    </style:style>
    <style:style style:name="P99" style:family="paragraph" style:parent-style-name="Text_20_body" style:list-style-name="L41">
      <style:text-properties style:font-name="Calibri" fo:font-weight="bold" officeooo:rsid="005a327e"/>
    </style:style>
    <style:style style:name="P100" style:family="paragraph" style:parent-style-name="Quotations">
      <style:paragraph-properties fo:margin-top="0cm" fo:margin-bottom="0.247cm" style:contextual-spacing="false" fo:line-height="115%"/>
      <style:text-properties style:font-name="Calibri" officeooo:rsid="005a327e"/>
    </style:style>
    <style:style style:name="P101" style:family="paragraph" style:parent-style-name="Text_20_body">
      <style:text-properties style:font-name="Calibri" fo:font-weight="bold" officeooo:rsid="005a327e"/>
    </style:style>
    <style:style style:name="P102" style:family="paragraph" style:parent-style-name="Text_20_body" style:list-style-name="L42">
      <style:text-properties style:font-name="Calibri" officeooo:rsid="005a327e"/>
    </style:style>
    <style:style style:name="P103" style:family="paragraph" style:parent-style-name="Text_20_body" style:list-style-name="L43">
      <style:text-properties style:font-name="Calibri" officeooo:rsid="005a327e"/>
    </style:style>
    <style:style style:name="P104" style:family="paragraph" style:parent-style-name="Text_20_body">
      <style:paragraph-properties fo:margin-left="0cm" fo:margin-right="0cm" fo:margin-top="0cm" fo:margin-bottom="0.247cm" style:contextual-spacing="false" fo:line-height="114%" fo:text-indent="0cm" style:auto-text-indent="false"/>
      <style:text-properties style:font-name="Calibri" officeooo:rsid="005a327e"/>
    </style:style>
    <style:style style:name="P105" style:family="paragraph" style:parent-style-name="Heading_20_3">
      <style:paragraph-properties fo:margin-left="0cm" fo:margin-right="0cm" fo:margin-top="0cm" fo:margin-bottom="0.247cm" style:contextual-spacing="false" fo:line-height="114%" fo:text-indent="0cm" style:auto-text-indent="false"/>
      <style:text-properties style:font-name="Calibri" officeooo:rsid="005a327e"/>
    </style:style>
    <style:style style:name="P106" style:family="paragraph" style:parent-style-name="Text_20_body" style:list-style-name="L44">
      <style:paragraph-properties fo:margin-left="0cm" fo:margin-right="0cm" fo:margin-top="0cm" fo:margin-bottom="0.247cm" style:contextual-spacing="false" fo:line-height="114%" fo:text-indent="0cm" style:auto-text-indent="false" fo:padding="0cm" fo:border="none"/>
      <style:text-properties style:font-name="Calibri" officeooo:rsid="005a327e"/>
    </style:style>
    <style:style style:name="P107" style:family="paragraph" style:parent-style-name="Heading_20_3">
      <style:paragraph-properties fo:margin-left="0cm" fo:margin-right="0cm" fo:margin-top="0cm" fo:margin-bottom="0.247cm" style:contextual-spacing="false" fo:line-height="114%" fo:text-indent="0cm" style:auto-text-indent="false" fo:break-before="page"/>
      <style:text-properties style:font-name="Calibri" officeooo:rsid="005a327e"/>
    </style:style>
    <style:style style:name="P108" style:family="paragraph" style:parent-style-name="Text_20_body" style:list-style-name="L45">
      <style:paragraph-properties fo:margin-left="0cm" fo:margin-right="0cm" fo:margin-top="0cm" fo:margin-bottom="0.247cm" style:contextual-spacing="false" fo:line-height="114%" fo:text-indent="0cm" style:auto-text-indent="false" fo:padding="0cm" fo:border="none"/>
      <style:text-properties style:font-name="Calibri" officeooo:rsid="005a327e"/>
    </style:style>
    <style:style style:name="P109" style:family="paragraph" style:parent-style-name="Text_20_body" style:list-style-name="L46">
      <style:paragraph-properties fo:margin-left="0cm" fo:margin-right="0cm" fo:margin-top="0cm" fo:margin-bottom="0.247cm" style:contextual-spacing="false" fo:line-height="114%" fo:text-indent="0cm" style:auto-text-indent="false" fo:padding="0cm" fo:border="none"/>
      <style:text-properties style:font-name="Calibri" officeooo:rsid="005a327e"/>
    </style:style>
    <style:style style:name="P110" style:family="paragraph" style:parent-style-name="Text_20_body" style:list-style-name="L47">
      <style:paragraph-properties fo:margin-left="0cm" fo:margin-right="0cm" fo:margin-top="0cm" fo:margin-bottom="0.247cm" style:contextual-spacing="false" fo:line-height="114%" fo:text-indent="0cm" style:auto-text-indent="false" fo:padding="0cm" fo:border="none"/>
      <style:text-properties style:font-name="Calibri" officeooo:rsid="005a327e"/>
    </style:style>
    <style:style style:name="P111" style:family="paragraph" style:parent-style-name="Heading_20_2">
      <style:paragraph-properties fo:margin-top="0cm" fo:margin-bottom="0.247cm" style:contextual-spacing="false" fo:line-height="114%" fo:break-before="page"/>
      <style:text-properties style:font-name="Calibri" officeooo:rsid="005a327e"/>
    </style:style>
    <style:style style:name="P112" style:family="paragraph" style:parent-style-name="Text_20_body">
      <style:paragraph-properties fo:line-height="114%"/>
      <style:text-properties style:font-name="Calibri" officeooo:rsid="005a327e"/>
    </style:style>
    <style:style style:name="P113" style:family="paragraph" style:parent-style-name="Heading_20_3">
      <style:paragraph-properties fo:margin-top="0cm" fo:margin-bottom="0.247cm" style:contextual-spacing="false" fo:line-height="114%"/>
      <style:text-properties style:font-name="Calibri" officeooo:rsid="005a327e"/>
    </style:style>
    <style:style style:name="P114" style:family="paragraph" style:parent-style-name="Text_20_body" style:list-style-name="L48">
      <style:paragraph-properties fo:line-height="114%"/>
      <style:text-properties style:font-name="Calibri" officeooo:rsid="005a327e"/>
    </style:style>
    <style:style style:name="P115" style:family="paragraph" style:parent-style-name="Text_20_body" style:list-style-name="L49">
      <style:paragraph-properties fo:line-height="114%"/>
      <style:text-properties style:font-name="Calibri" officeooo:rsid="005a327e"/>
    </style:style>
    <style:style style:name="P116" style:family="paragraph" style:parent-style-name="Text_20_body" style:list-style-name="L50">
      <style:text-properties style:font-name="Calibri" officeooo:rsid="005a327e"/>
    </style:style>
    <style:style style:name="P117" style:family="paragraph" style:parent-style-name="Text_20_body" style:list-style-name="L51">
      <style:text-properties style:font-name="Calibri" officeooo:rsid="005a327e"/>
    </style:style>
    <style:style style:name="P118" style:family="paragraph" style:parent-style-name="Text_20_body" style:list-style-name="L52">
      <style:text-properties style:font-name="Calibri" officeooo:rsid="005a327e"/>
    </style:style>
    <style:style style:name="P119" style:family="paragraph" style:parent-style-name="Text_20_body" style:list-style-name="L53">
      <style:text-properties style:font-name="Calibri" officeooo:rsid="005a327e"/>
    </style:style>
    <style:style style:name="P120" style:family="paragraph" style:parent-style-name="Heading_20_3">
      <style:paragraph-properties fo:break-before="page"/>
      <style:text-properties style:font-name="Calibri" fo:font-size="18pt" officeooo:rsid="005a327e" style:font-size-asian="18pt" style:font-size-complex="18pt"/>
    </style:style>
    <style:style style:name="P121" style:family="paragraph" style:parent-style-name="Heading_20_1">
      <style:paragraph-properties fo:break-before="page"/>
      <style:text-properties style:font-name="Calibri" fo:font-size="18pt" style:font-size-asian="18pt" style:font-size-complex="18pt"/>
    </style:style>
    <style:style style:name="P122" style:family="paragraph" style:parent-style-name="Heading_20_2">
      <style:paragraph-properties fo:margin-top="0cm" fo:margin-bottom="0.247cm" style:contextual-spacing="false" fo:line-height="115%"/>
      <style:text-properties style:font-name="Calibri" fo:font-size="14pt" style:font-size-asian="14pt" style:font-size-complex="14pt"/>
    </style:style>
    <style:style style:name="P123" style:family="paragraph" style:parent-style-name="Text_20_body" style:list-style-name="L54">
      <style:text-properties style:font-name="Calibri"/>
    </style:style>
    <style:style style:name="P124" style:family="paragraph" style:parent-style-name="Text_20_body" style:list-style-name="L55">
      <style:text-properties style:font-name="Calibri"/>
    </style:style>
    <style:style style:name="P125" style:family="paragraph" style:parent-style-name="Text_20_body" style:list-style-name="L56">
      <style:text-properties style:font-name="Calibri"/>
    </style:style>
    <style:style style:name="P126" style:family="paragraph" style:parent-style-name="Heading_20_2">
      <style:paragraph-properties fo:margin-left="0cm" fo:margin-right="0cm" fo:margin-top="0cm" fo:margin-bottom="0.247cm" style:contextual-spacing="false" fo:line-height="114%" fo:text-indent="0cm" style:auto-text-indent="false"/>
      <style:text-properties style:font-name="Calibri"/>
    </style:style>
    <style:style style:name="P127" style:family="paragraph" style:parent-style-name="Heading_20_2">
      <style:paragraph-properties fo:margin-left="0cm" fo:margin-right="0cm" fo:margin-top="0cm" fo:margin-bottom="0.247cm" style:contextual-spacing="false" fo:line-height="114%" fo:text-indent="0cm" style:auto-text-indent="false"/>
      <style:text-properties style:font-name="Calibri" fo:font-size="14pt" style:font-size-asian="14pt" style:font-size-complex="14pt"/>
    </style:style>
    <style:style style:name="P128" style:family="paragraph" style:parent-style-name="Heading_20_2">
      <style:paragraph-properties fo:margin-left="0cm" fo:margin-right="0cm" fo:margin-top="0cm" fo:margin-bottom="0.247cm" style:contextual-spacing="false" fo:line-height="114%" fo:text-indent="0cm" style:auto-text-indent="false" fo:break-before="page"/>
      <style:text-properties style:font-name="Calibri" fo:font-size="14pt" style:font-size-asian="14pt" style:font-size-complex="14pt"/>
    </style:style>
    <style:style style:name="P129" style:family="paragraph" style:parent-style-name="Table_20_Contents">
      <style:paragraph-properties fo:margin-left="0cm" fo:margin-right="0cm" fo:text-indent="0cm" style:auto-text-indent="false"/>
      <style:text-properties style:font-name="Calibri" fo:font-size="2pt" style:font-size-asian="2pt" style:font-size-complex="2pt"/>
    </style:style>
    <style:style style:name="P130" style:family="paragraph" style:parent-style-name="Text_20_body" style:list-style-name="L57">
      <style:paragraph-properties fo:margin-left="0cm" fo:margin-right="0cm" fo:margin-top="0cm" fo:margin-bottom="0.247cm" style:contextual-spacing="false" fo:line-height="114%" fo:text-indent="0cm" style:auto-text-indent="false" fo:padding="0cm" fo:border="none"/>
      <style:text-properties style:font-name="Calibri"/>
    </style:style>
    <style:style style:name="P131" style:family="paragraph" style:parent-style-name="Quotations">
      <style:paragraph-properties fo:margin-left="0cm" fo:margin-right="1cm" fo:margin-top="0cm" fo:margin-bottom="0.499cm" style:contextual-spacing="false" fo:line-height="114%" fo:text-indent="0cm" style:auto-text-indent="false"/>
      <style:text-properties style:font-name="Calibri" fo:font-weight="bold"/>
    </style:style>
    <style:style style:name="P132" style:family="paragraph" style:parent-style-name="Quotations">
      <style:paragraph-properties fo:margin-left="0cm" fo:margin-right="1cm" fo:margin-top="0cm" fo:margin-bottom="0.499cm" style:contextual-spacing="false" fo:line-height="114%" fo:text-align="center" style:justify-single-word="false" fo:text-indent="0cm" style:auto-text-indent="false"/>
      <style:text-properties style:font-name="Calibri" fo:font-weight="bold" officeooo:paragraph-rsid="00463670"/>
    </style:style>
    <style:style style:name="P133" style:family="paragraph" style:parent-style-name="Quotations">
      <style:paragraph-properties fo:margin-left="0cm" fo:margin-right="1cm" fo:margin-top="0cm" fo:margin-bottom="0.499cm" style:contextual-spacing="false" fo:line-height="114%" fo:text-align="center" style:justify-single-word="false" fo:text-indent="0cm" style:auto-text-indent="false"/>
      <style:text-properties style:font-name="Calibri" officeooo:paragraph-rsid="00463670"/>
    </style:style>
    <style:style style:name="T1" style:family="text">
      <style:text-properties fo:font-size="26pt" fo:font-weight="normal" style:font-size-asian="26pt" style:font-weight-asian="normal" style:font-size-complex="26pt" style:font-weight-complex="normal"/>
    </style:style>
    <style:style style:name="T2" style:family="text">
      <style:text-properties fo:font-size="26pt" style:font-size-asian="26pt" style:font-size-complex="26pt"/>
    </style:style>
    <style:style style:name="T3" style:family="text">
      <style:text-properties fo:font-size="40pt" fo:font-weight="bold" officeooo:rsid="00140c84" style:font-size-asian="40pt" style:font-weight-asian="bold" style:font-size-complex="40pt" style:font-weight-complex="bold"/>
    </style:style>
    <style:style style:name="T4" style:family="text">
      <style:text-properties fo:color="#bbe33d" loext:opacity="100%" fo:font-size="26pt" fo:font-weight="normal" officeooo:rsid="00140c84" style:font-size-asian="26pt" style:font-weight-asian="normal" style:font-size-complex="26pt" style:font-weight-complex="normal"/>
    </style:style>
    <style:style style:name="T5" style:family="text">
      <style:text-properties fo:font-size="26pt" fo:font-weight="bold" officeooo:rsid="00140c84" style:font-size-asian="26pt" style:font-weight-asian="bold" style:font-size-complex="26pt" style:font-weight-complex="bold"/>
    </style:style>
    <style:style style:name="T6" style:family="text">
      <style:text-properties style:font-name="Calibri"/>
    </style:style>
    <style:style style:name="T7" style:family="text">
      <style:text-properties style:font-name="Calibri" fo:font-weight="normal" officeooo:rsid="00140c84" style:font-weight-asian="normal" style:font-weight-complex="normal"/>
    </style:style>
    <style:style style:name="T8" style:family="text">
      <style:text-properties style:font-name="Calibri" fo:font-weight="bold" officeooo:rsid="00140c84" style:font-weight-asian="bold" style:font-weight-complex="bold"/>
    </style:style>
    <style:style style:name="T9" style:family="text">
      <style:text-properties style:font-name="Calibri" fo:font-weight="bold" officeooo:rsid="001796a6" style:font-weight-asian="bold" style:font-weight-complex="bold"/>
    </style:style>
    <style:style style:name="T10" style:family="text">
      <style:text-properties style:font-name="Calibri" fo:font-size="18pt" officeooo:rsid="001796a6" style:font-size-asian="18pt" style:font-size-complex="18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italic" fo:font-weight="normal" style:font-weight-asian="normal" style:font-weight-complex="normal"/>
    </style:style>
    <style:style style:name="T15" style:family="text">
      <style:text-properties fo:font-style="italic"/>
    </style:style>
    <style:style style:name="T16" style:family="text">
      <style:text-properties style:font-name="Calibri" fo:font-weight="bold"/>
    </style:style>
    <style:style style:name="T17" style:family="text">
      <style:text-properties officeooo:rsid="0028a765"/>
    </style:style>
    <style:style style:name="T18" style:family="text">
      <style:text-properties style:text-underline-style="solid" style:text-underline-width="auto" style:text-underline-color="font-color" fo:font-weight="bold" officeooo:rsid="003177ef" style:font-weight-asian="bold" style:font-weight-complex="bold"/>
    </style:style>
    <style:style style:name="T19" style:family="text">
      <style:text-properties officeooo:rsid="0037fc92"/>
    </style:style>
    <style:style style:name="T20" style:family="text">
      <style:text-properties officeooo:rsid="00354181"/>
    </style:style>
    <style:style style:name="T21" style:family="text">
      <style:text-properties fo:font-size="8pt" fo:letter-spacing="normal" fo:font-style="italic" fo:font-weight="normal" officeooo:rsid="003e82ef" style:font-size-asian="8pt" style:font-style-asian="italic" style:font-size-complex="8pt" style:font-style-complex="italic"/>
    </style:style>
    <style:style style:name="T22" style:family="text">
      <style:text-properties fo:font-size="8pt" fo:letter-spacing="normal" fo:font-style="italic" fo:font-weight="normal" style:font-size-asian="8pt" style:font-style-asian="italic" style:font-size-complex="8pt" style:font-style-complex="italic"/>
    </style:style>
    <style:style style:name="T23" style:family="text">
      <style:text-properties fo:font-style="italic" officeooo:rsid="004e7554"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052aa47"/>
    </style:style>
    <style:style style:name="T26" style:family="text">
      <style:text-properties style:font-name="Calibri" fo:font-weight="bold" officeooo:rsid="00422a8e"/>
    </style:style>
    <style:style style:name="T27" style:family="text">
      <style:text-properties style:font-name="Calibri" fo:font-style="italic"/>
    </style:style>
    <style:style style:name="T28" style:family="text">
      <style:text-properties style:font-weight-asian="bold" style:font-weight-complex="bold"/>
    </style:style>
    <style:style style:name="T29" style:family="text">
      <style:text-properties style:font-name="Calibri" style:font-weight-asian="bold" style:font-weight-complex="bold"/>
    </style:style>
    <style:style style:name="T30" style:family="text">
      <style:text-properties fo:color="#468a1a" loext:opacity="100%" style:font-weight-asian="bold" style:font-weight-complex="bold"/>
    </style:style>
    <style:style style:name="T31" style:family="text">
      <style:text-properties style:font-name="Calibri" style:text-underline-style="solid" style:text-underline-width="auto" style:text-underline-color="font-color" style:font-weight-asian="bold" style:font-weight-complex="bold"/>
    </style:style>
    <style:style style:name="T32" style:family="text">
      <style:text-properties fo:color="#c9211e" loext:opacity="100%" style:font-weight-asian="bold" style:font-weight-complex="bold"/>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officeooo:rsid="006b8083"/>
    </style:style>
    <style:style style:name="T35" style:family="text">
      <style:text-properties officeooo:rsid="0073d909"/>
    </style:style>
    <style:style style:name="T36" style:family="text">
      <style:text-properties officeooo:rsid="0071dd02"/>
    </style:style>
    <style:style style:name="T37" style:family="text">
      <style:text-properties officeooo:rsid="0070a218"/>
    </style:style>
    <style:style style:name="T38" style:family="text">
      <style:text-properties officeooo:rsid="006dba36"/>
    </style:style>
    <style:style style:name="T39" style:family="text">
      <style:text-properties officeooo:rsid="00703a16"/>
    </style:style>
    <style:style style:name="T40" style:family="text">
      <style:text-properties officeooo:rsid="006fd0ce"/>
    </style:style>
    <style:style style:name="T41" style:family="text">
      <style:text-properties officeooo:rsid="0076ed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CFGS 2º DAW · Proyecto Agile Intermodular</text:p>
      <text:p text:style-name="P3"><text:span text:style-name="T1">Documentación </text:span><text:span text:style-name="T2">General</text:span></text:p>
      <text:p text:style-name="P3"><text:span text:style-name="T3">P</text:span><text:span text:style-name="T4">ACE</text:span><text:span text:style-name="T5">P</text:span><text:span text:style-name="T4">AL</text:span></text:p>
      <text:p text:style-name="P4"><text:span text:style-name="Strong_20_Emphasis"><text:span text:style-name="T6">Desarrollado por Treecore Studio</text:span></text:span><text:span text:style-name="T6"><text:line-break/></text:span><text:span text:style-name="Strong_20_Emphasis"><text:span text:style-name="T6">Autores:</text:span></text:span><text:span text:style-name="T6"><text:line-break/>Pablo Sevillano Aparicio<text:line-break/>Alejandro Pacheco</text:span></text:p>
      <text:p text:style-name="P5"><text:span text:style-name="Strong_20_Emphasis"><text:span text:style-name="T7">Centro:</text:span></text:span><text:span text:style-name="T8"> </text:span><text:span text:style-name="T9">ÍES Infanta Elena</text:span><text:span text:style-name="T8"><text:line-break/></text:span><text:span text:style-name="Strong_20_Emphasis"><text:span text:style-name="T7">Curso académico:</text:span></text:span><text:span text:style-name="T8"> 2025–2026<text:line-break/></text:span><text:span text:style-name="Strong_20_Emphasis"><text:span text:style-name="T7">Módulos implicados:</text:span></text:span><text:span text:style-name="T8"> DIW, DWEC, DWES, Despliegue y Sostenibilidad<text:line-break/></text:span><text:span text:style-name="Strong_20_Emphasis"><text:span text:style-name="T7">Fecha:</text:span></text:span><text:span text:style-name="T8"> </text:span><text:span text:style-name="T9">13/03/2026</text:span></text:p>
      <text:p text:style-name="P1"/>
      <text:p text:style-name="P1"><draw:frame draw:style-name="fr1" draw:name="Imagen2" text:anchor-type="char" svg:x="5.639cm" svg:y="0.064cm" svg:width="5.816cm" svg:height="5.482cm" draw:z-index="0"><draw:image xlink:href="Pictures/10000001000000F4000000E66779313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Strong_20_Emphasis"><text:span text:style-name="T10"/></text:span></text:p>
      <text:p text:style-name="P6"><text:span text:style-name="Strong_20_Emphasis"><text:span text:style-name="T10"/></text:span></text:p>
      <text:p text:style-name="P6"><text:span text:style-name="Strong_20_Emphasis"><text:span text:style-name="T10"/></text:span></text:p>
      <text:p text:style-name="P6"><text:span text:style-name="Strong_20_Emphasis"><text:span text:style-name="T10"/></text:span></text:p>
      <text:p text:style-name="P6"><text:soft-page-break/><text:span text:style-name="Strong_20_Emphasis"><text:span text:style-name="T10"/></text:span></text:p>
      <text:p text:style-name="P7"><text:span text:style-name="Strong_20_Emphasis"><text:span text:style-name="T10"/></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8"><text:a xlink:type="simple" xlink:href="#__RefHeading___Toc2439_1385620957" office:name="1. Introducción" text:style-name="Index_20_Link" text:visited-style-name="Index_20_Link">1. Introducción<text:tab/>5</text:a></text:p>
          <text:p text:style-name="P8"><text:a xlink:type="simple" xlink:href="#__RefHeading___Toc2441_1385620957" office:name="2. Contexto del proyecto y necesidad detectada" text:style-name="Index_20_Link" text:visited-style-name="Index_20_Link">2. Contexto del proyecto y necesidad detectada<text:tab/>6</text:a></text:p>
          <text:p text:style-name="P9"><text:a xlink:type="simple" xlink:href="#__RefHeading___Toc2443_1385620957" office:name="2.1 Situación actual y tendencias" text:style-name="Index_20_Link" text:visited-style-name="Index_20_Link">2.1 Situación actual y tendencias<text:tab/>6</text:a></text:p>
          <text:p text:style-name="P9"><text:a xlink:type="simple" xlink:href="#__RefHeading___Toc2445_1385620957" office:name="2.2 El problema: la dificultad de la constancia individual" text:style-name="Index_20_Link" text:visited-style-name="Index_20_Link">2.2 El problema: la dificultad de la constancia individual<text:tab/>6</text:a></text:p>
          <text:p text:style-name="P9"><text:a xlink:type="simple" xlink:href="#__RefHeading___Toc2447_1385620957" office:name="2.3 Limitaciones de las soluciones existentes" text:style-name="Index_20_Link" text:visited-style-name="Index_20_Link">2.3 Limitaciones de las soluciones existentes<text:tab/>6</text:a></text:p>
          <text:p text:style-name="P9"><text:a xlink:type="simple" xlink:href="#__RefHeading___Toc2449_1385620957" office:name="2.4 Justificación de la propuesta" text:style-name="Index_20_Link" text:visited-style-name="Index_20_Link">2.4 Justificación de la propuesta<text:tab/>6</text:a></text:p>
          <text:p text:style-name="P8"><text:a xlink:type="simple" xlink:href="#__RefHeading___Toc2451_1385620957" office:name="3. Objetivos del proyecto" text:style-name="Index_20_Link" text:visited-style-name="Index_20_Link">3. Objetivos del proyecto<text:tab/>7</text:a></text:p>
          <text:p text:style-name="P9"><text:a xlink:type="simple" xlink:href="#__RefHeading___Toc2453_1385620957" office:name="3.1 Objetivo general" text:style-name="Index_20_Link" text:visited-style-name="Index_20_Link">3.1 Objetivo general<text:tab/>7</text:a></text:p>
          <text:p text:style-name="P9"><text:a xlink:type="simple" xlink:href="#__RefHeading___Toc2455_1385620957" office:name="3.2 Objetivos específicos" text:style-name="Index_20_Link" text:visited-style-name="Index_20_Link">3.2 Objetivos específicos<text:tab/>7</text:a></text:p>
          <text:p text:style-name="P8"><text:a xlink:type="simple" xlink:href="#__RefHeading___Toc2457_1385620957" office:name="4. Planificación general del proyecto" text:style-name="Index_20_Link" text:visited-style-name="Index_20_Link">4. Planificación general del proyecto<text:tab/>8</text:a></text:p>
          <text:p text:style-name="P9"><text:a xlink:type="simple" xlink:href="#__RefHeading___Toc2459_1385620957" office:name="4.1 Fases del desarrollo" text:style-name="Index_20_Link" text:visited-style-name="Index_20_Link">4.1 Fases del desarrollo<text:tab/>8</text:a></text:p>
          <text:p text:style-name="P9"><text:a xlink:type="simple" xlink:href="#__RefHeading___Toc2461_1385620957" office:name="4.2 Resumen de planificación por fases" text:style-name="Index_20_Link" text:visited-style-name="Index_20_Link">4.2 Resumen de planificación por fases<text:tab/>9</text:a></text:p>
          <text:p text:style-name="P8"><text:a xlink:type="simple" xlink:href="#__RefHeading___Toc2463_1385620957" office:name="5. Metodología Agile/Scrum y organización del equipo" text:style-name="Index_20_Link" text:visited-style-name="Index_20_Link">5. Metodología Agile/Scrum y organización del equipo<text:tab/>10</text:a></text:p>
          <text:p text:style-name="P9"><text:a xlink:type="simple" xlink:href="#__RefHeading___Toc2465_1385620957" office:name="5.1 Roles en el equipo" text:style-name="Index_20_Link" text:visited-style-name="Index_20_Link">5.1 Roles en el equipo<text:tab/>10</text:a></text:p>
          <text:p text:style-name="P9"><text:a xlink:type="simple" xlink:href="#__RefHeading___Toc2467_1385620957" office:name="5.2 Ceremonias y eventos" text:style-name="Index_20_Link" text:visited-style-name="Index_20_Link">5.2 Ceremonias y eventos<text:tab/>10</text:a></text:p>
          <text:p text:style-name="P9"><text:a xlink:type="simple" xlink:href="#__RefHeading___Toc2469_1385620957" office:name="5.3 Estrategia de evidencias y &quot;Definition of Done&quot;" text:style-name="Index_20_Link" text:visited-style-name="Index_20_Link">5.3 Estrategia de evidencias y "Definition of Done"<text:tab/>10</text:a></text:p>
          <text:p text:style-name="P9"><text:a xlink:type="simple" xlink:href="#__RefHeading___Toc2471_1385620957" office:name="5.4 Herramientas de trabajo" text:style-name="Index_20_Link" text:visited-style-name="Index_20_Link">5.4 Herramientas de trabajo<text:tab/>10</text:a></text:p>
          <text:p text:style-name="P8"><text:a xlink:type="simple" xlink:href="#__RefHeading___Toc2473_1385620957" office:name="6. Historias de usuario" text:style-name="Index_20_Link" text:visited-style-name="Index_20_Link">6. Historias de usuario<text:tab/>11</text:a></text:p>
          <text:p text:style-name="P9"><text:a xlink:type="simple" xlink:href="#__RefHeading___Toc2475_1385620957" office:name="6.1 Análisis y origen de los requisitos" text:style-name="Index_20_Link" text:visited-style-name="Index_20_Link">6.1 Análisis y origen de los requisitos<text:tab/>11</text:a></text:p>
          <text:p text:style-name="P9"><text:a xlink:type="simple" xlink:href="#__RefHeading___Toc2477_1385620957" office:name="6.2 Gestión del Backlog" text:style-name="Index_20_Link" text:visited-style-name="Index_20_Link">6.2 Gestión del Backlog<text:tab/>11</text:a></text:p>
          <text:p text:style-name="P9"><text:a xlink:type="simple" xlink:href="#__RefHeading___Toc2479_1385620957" office:name="6.3 Listado de historias (Resumen)" text:style-name="Index_20_Link" text:visited-style-name="Index_20_Link">6.3 Listado de historias (Resumen)<text:tab/>11</text:a></text:p>
          <text:p text:style-name="P8"><text:a xlink:type="simple" xlink:href="#__RefHeading___Toc2481_1385620957" office:name="7. Presupuesto y recursos del proyecto" text:style-name="Index_20_Link" text:visited-style-name="Index_20_Link">7. Presupuesto y recursos del proyecto<text:tab/>12</text:a></text:p>
          <text:p text:style-name="P9"><text:a xlink:type="simple" xlink:href="#__RefHeading___Toc2483_1385620957" office:name="7.1 Infraestructura y recursos tecnológicos" text:style-name="Index_20_Link" text:visited-style-name="Index_20_Link">7.1 Infraestructura y recursos tecnológicos<text:tab/>12</text:a></text:p>
          <text:p text:style-name="P9"><text:a xlink:type="simple" xlink:href="#__RefHeading___Toc2485_1385620957" office:name="7.2 Valoración profesional del desarrollo" text:style-name="Index_20_Link" text:visited-style-name="Index_20_Link">7.2 Valoración profesional del desarrollo<text:tab/>12</text:a></text:p>
          <text:p text:style-name="P9"><text:a xlink:type="simple" xlink:href="#__RefHeading___Toc2487_1385620957" office:name="7.3 Viabilidad y mantenimiento en entorno real" text:style-name="Index_20_Link" text:visited-style-name="Index_20_Link">7.3 Viabilidad y mantenimiento en entorno real<text:tab/>13</text:a></text:p>
          <text:p text:style-name="P8"><text:a xlink:type="simple" xlink:href="#__RefHeading___Toc2489_1385620957" office:name="8. Análisis de tendencias y competencia" text:style-name="Index_20_Link" text:visited-style-name="Index_20_Link">8. Análisis de tendencias y competencia<text:tab/>14</text:a></text:p>
          <text:p text:style-name="P9"><text:a xlink:type="simple" xlink:href="#__RefHeading___Toc2491_1385620957" office:name="8.1 Análisis individual de la competencia" text:style-name="Index_20_Link" text:visited-style-name="Index_20_Link">8.1 Análisis individual de la competencia<text:tab/>14</text:a></text:p>
          <text:p text:style-name="P9"><text:a xlink:type="simple" xlink:href="#__RefHeading___Toc2493_1385620957" office:name="8.2 Comparativa sintética" text:style-name="Index_20_Link" text:visited-style-name="Index_20_Link">8.2 Comparativa sintética<text:tab/>14</text:a></text:p>
          <text:p text:style-name="P9"><text:a xlink:type="simple" xlink:href="#__RefHeading___Toc2495_1385620957" office:name="8.3 Tendencias de diseño aplicables (2025-2026)" text:style-name="Index_20_Link" text:visited-style-name="Index_20_Link">8.3 Tendencias de diseño aplicables (2025-2026)<text:tab/>15</text:a></text:p>
          <text:p text:style-name="P9"><text:a xlink:type="simple" xlink:href="#__RefHeading___Toc2497_1385620957" office:name="8.4 Decisiones estratégicas para PacePal" text:style-name="Index_20_Link" text:visited-style-name="Index_20_Link">8.4 Decisiones estratégicas para PacePal<text:tab/>15</text:a></text:p>
          <text:p text:style-name="P8"><text:a xlink:type="simple" xlink:href="#__RefHeading___Toc2499_1385620957" office:name="9. Público objetivo" text:style-name="Index_20_Link" text:visited-style-name="Index_20_Link">9. Público objetivo<text:tab/>16</text:a></text:p>
          <text:p text:style-name="P9"><text:a xlink:type="simple" xlink:href="#__RefHeading___Toc2501_1385620957" office:name="9.1 Mapa de empatía: ¿Quién es nuestro usuario?" text:style-name="Index_20_Link" text:visited-style-name="Index_20_Link">9.1 Mapa de empatía: ¿Quién es nuestro usuario?<text:tab/>16</text:a></text:p>
          <text:p text:style-name="P9"><text:a xlink:type="simple" xlink:href="#__RefHeading___Toc2503_1385620957" office:name="9.2 Arquetipos de usuario (Resumen de perfiles)" text:style-name="Index_20_Link" text:visited-style-name="Index_20_Link">9.2 Arquetipos de usuario (Resumen de perfiles)<text:tab/>16</text:a></text:p>
          <text:p text:style-name="P9"><text:a xlink:type="simple" xlink:href="#__RefHeading___Toc2505_1385620957" office:name="9.3 Alineación de necesidades" text:style-name="Index_20_Link" text:visited-style-name="Index_20_Link">9.3 Alineación de necesidades<text:tab/>17</text:a></text:p>
          <text:p text:style-name="P8"><text:a xlink:type="simple" xlink:href="#__RefHeading___Toc2507_1385620957" office:name="10. Propuesta de valor y enfoque del producto" text:style-name="Index_20_Link" text:visited-style-name="Index_20_Link">10. Propuesta de valor y enfoque del producto<text:tab/>18</text:a></text:p>
          <text:p text:style-name="P9"><text:a xlink:type="simple" xlink:href="#__RefHeading___Toc2509_1385620957" office:name="10.1 El diferencial estratégico: Rutas controladas" text:style-name="Index_20_Link" text:visited-style-name="Index_20_Link">10.1 El diferencial estratégico: Rutas controladas<text:tab/>18</text:a></text:p>
          <text:p text:style-name="P9"><text:a xlink:type="simple" xlink:href="#__RefHeading___Toc2511_1385620957" office:name="10.2 Los tres pilares de PacePal" text:style-name="Index_20_Link" text:visited-style-name="Index_20_Link">10.2 Los tres pilares de PacePal<text:tab/>18</text:a></text:p>
          <text:p text:style-name="P9"><text:a xlink:type="simple" xlink:href="#__RefHeading___Toc2513_1385620957" office:name="10.3 Enfoque de negocio y posicionamiento" text:style-name="Index_20_Link" text:visited-style-name="Index_20_Link">10.3 Enfoque de negocio y posicionamiento<text:tab/>19</text:a></text:p>
          <text:p text:style-name="P8"><text:a xlink:type="simple" xlink:href="#__RefHeading___Toc2515_1385620957" office:name="11. Sprint 0 · Definición, arranque y organización del proyecto" text:style-name="Index_20_Link" text:visited-style-name="Index_20_Link">11. Sprint 0 · Definición, arranque y organización del proyecto<text:tab/>20</text:a></text:p>
          <text:p text:style-name="P9"><text:a xlink:type="simple" xlink:href="#__RefHeading___Toc2517_1385620957" office:name="11.1 Definición y alcance del Producto Mínimo Viable (MVP)" text:style-name="Index_20_Link" text:visited-style-name="Index_20_Link">11.1 Definición y alcance del Producto Mínimo Viable (MVP)<text:tab/>20</text:a></text:p>
          <text:p text:style-name="P9"><text:a xlink:type="simple" xlink:href="#__RefHeading___Toc2519_1385620957" office:name="11.2 Estructura documental y metodológica" text:style-name="Index_20_Link" text:visited-style-name="Index_20_Link">11.2 Estructura documental y metodológica<text:tab/>20</text:a></text:p>
          <text:p text:style-name="P8"><text:a xlink:type="simple" xlink:href="#__RefHeading___Toc2437_1385620957" office:name="Gemini ha dicho" text:style-name="Index_20_Link" text:visited-style-name="Index_20_Link">Gemini ha dicho<text:tab/>20</text:a></text:p>
          <text:p text:style-name="P9"><text:a xlink:type="simple" xlink:href="#__RefHeading___Toc2521_1385620957" office:name="11.3 Gestión de evidencias y trazabilidad inicial" text:style-name="Index_20_Link" text:visited-style-name="Index_20_Link">11.3 Gestión de evidencias y trazabilidad inicial<text:tab/>21</text:a></text:p>
          <text:p text:style-name="P9"><text:a xlink:type="simple" xlink:href="#__RefHeading___Toc2523_1385620957" office:name="11.4 Resolución de bloqueos técnicos y cierre del sprint" text:style-name="Index_20_Link" text:visited-style-name="Index_20_Link">11.4 Resolución de bloqueos técnicos y cierre del sprint<text:tab/>21</text:a></text:p>
          <text:p text:style-name="P8"><text:a xlink:type="simple" xlink:href="#__RefHeading___Toc2525_1385620957" office:name="12. Sprint DIW · Diseño de interfaz, prototipos y guía de estilos" text:style-name="Index_20_Link" text:visited-style-name="Index_20_Link">12. Sprint DIW · Diseño de interfaz, prototipos y guía de estilos<text:tab/>22</text:a></text:p>
          <text:p text:style-name="P9"><text:a xlink:type="simple" xlink:href="#__RefHeading___Toc2527_1385620957" office:name="12.1 Investigación de tendencias y análisis de competencia" text:style-name="Index_20_Link" text:visited-style-name="Index_20_Link"><text:soft-page-break/>12.1 Investigación de tendencias y análisis de competencia<text:tab/>22</text:a></text:p>
          <text:p text:style-name="P9"><text:a xlink:type="simple" xlink:href="#__RefHeading___Toc2529_1385620957" office:name="12.2 Identidad visual y guía de estilos (03-guia-estilos.pdf)" text:style-name="Index_20_Link" text:visited-style-name="Index_20_Link">12.2 Identidad visual y guía de estilos (03-guia-estilos.pdf)<text:tab/>22</text:a></text:p>
          <text:p text:style-name="P9"><text:a xlink:type="simple" xlink:href="#__RefHeading___Toc2531_1385620957" office:name="12.3 Wireframes y Prototipado en Figma" text:style-name="Index_20_Link" text:visited-style-name="Index_20_Link">12.3 Wireframes y Prototipado en Figma<text:tab/>23</text:a></text:p>
          <text:p text:style-name="P9"><text:a xlink:type="simple" xlink:href="#__RefHeading___Toc2533_1385620957" office:name="12.4 Boceto Final y Estructura de la Landing Page" text:style-name="Index_20_Link" text:visited-style-name="Index_20_Link">12.4 Boceto Final y Estructura de la Landing Page<text:tab/>23</text:a></text:p>
          <text:p text:style-name="P9"><text:a xlink:type="simple" xlink:href="#__RefHeading___Toc2535_1385620957" office:name="12.5 Implementación Técnica de la Landing" text:style-name="Index_20_Link" text:visited-style-name="Index_20_Link">12.5 Implementación Técnica de la Landing<text:tab/>23</text:a></text:p>
          <text:p text:style-name="P9"><text:a xlink:type="simple" xlink:href="#__RefHeading___Toc2537_1385620957" office:name="12.6 Componente Clave: La Tarjeta de Actividad" text:style-name="Index_20_Link" text:visited-style-name="Index_20_Link">12.6 Componente Clave: La Tarjeta de Actividad<text:tab/>24</text:a></text:p>
          <text:p text:style-name="P9"><text:a xlink:type="simple" xlink:href="#__RefHeading___Toc2539_1385620957" office:name="12.7 Resultado del Sprint DIW" text:style-name="Index_20_Link" text:visited-style-name="Index_20_Link">12.7 Resultado del Sprint DIW<text:tab/>24</text:a></text:p>
          <text:p text:style-name="P8"><text:a xlink:type="simple" xlink:href="#__RefHeading___Toc2541_1385620957" office:name="13. Sprint DIW: Accesibilidad, Responsive y Decisiones de UX" text:style-name="Index_20_Link" text:visited-style-name="Index_20_Link">13. Sprint DIW: Accesibilidad, Responsive y Decisiones de UX<text:tab/>25</text:a></text:p>
          <text:p text:style-name="P9"><text:a xlink:type="simple" xlink:href="#__RefHeading___Toc2543_1385620957" office:name="13.1 Estructura general del sitio web" text:style-name="Index_20_Link" text:visited-style-name="Index_20_Link">13.1 Estructura general del sitio web<text:tab/>25</text:a></text:p>
          <text:p text:style-name="P9"><text:a xlink:type="simple" xlink:href="#__RefHeading___Toc2545_1385620957" office:name="13.2 Perfiles de usuario y acceso a páginas" text:style-name="Index_20_Link" text:visited-style-name="Index_20_Link">13.2 Perfiles de usuario y acceso a páginas<text:tab/>26</text:a></text:p>
          <text:p text:style-name="P9"><text:a xlink:type="simple" xlink:href="#__RefHeading___Toc2547_1385620957" office:name="13.3 Decisiones de UX aplicadas al conjunto del sitio" text:style-name="Index_20_Link" text:visited-style-name="Index_20_Link">13.3 Decisiones de UX aplicadas al conjunto del sitio<text:tab/>26</text:a></text:p>
          <text:p text:style-name="P9"><text:a xlink:type="simple" xlink:href="#__RefHeading___Toc2549_1385620957" office:name="13.4 Accesibilidad, responsive y optimización de imágenes" text:style-name="Index_20_Link" text:visited-style-name="Index_20_Link">13.4 Accesibilidad, responsive y optimización de imágenes<text:tab/>27</text:a></text:p>
          <text:p text:style-name="P10"><text:a xlink:type="simple" xlink:href="#__RefHeading___Toc2551_1385620957" office:name="Accesibilidad y Responsive" text:style-name="Index_20_Link" text:visited-style-name="Index_20_Link">Accesibilidad y Responsive<text:tab/>27</text:a></text:p>
          <text:p text:style-name="P10"><text:a xlink:type="simple" xlink:href="#__RefHeading___Toc2553_1385620957" office:name="Optimización de recursos gráficos" text:style-name="Index_20_Link" text:visited-style-name="Index_20_Link">Optimización de recursos gráficos<text:tab/>27</text:a></text:p>
          <text:p text:style-name="P9"><text:a xlink:type="simple" xlink:href="#__RefHeading___Toc2555_1385620957" office:name="13.5 Resultado del sprint" text:style-name="Index_20_Link" text:visited-style-name="Index_20_Link">13.5 Resultado del sprint<text:tab/>27</text:a></text:p>
          <text:p text:style-name="P8"><text:a xlink:type="simple" xlink:href="#__RefHeading___Toc2557_1385620957" office:name="14. Sprint DWEC · Formularios, validaciones y JavaScript modular" text:style-name="Index_20_Link" text:visited-style-name="Index_20_Link">14. Sprint DWEC · Formularios, validaciones y JavaScript modular<text:tab/>28</text:a></text:p>
          <text:p text:style-name="P9"><text:a xlink:type="simple" xlink:href="#__RefHeading___Toc2559_1385620957" office:name="14.1 Arquitectura del cliente y organización modular" text:style-name="Index_20_Link" text:visited-style-name="Index_20_Link">14.1 Arquitectura del cliente y organización modular<text:tab/>28</text:a></text:p>
          <text:p text:style-name="P9"><text:a xlink:type="simple" xlink:href="#__RefHeading___Toc2561_1385620957" office:name="14.2 Formularios de autenticación y lógica condicional" text:style-name="Index_20_Link" text:visited-style-name="Index_20_Link">14.2 Formularios de autenticación y lógica condicional<text:tab/>29</text:a></text:p>
          <text:p text:style-name="P10"><text:a xlink:type="simple" xlink:href="#__RefHeading___Toc2563_1385620957" office:name="Lógica Condicional de la Tarjeta" text:style-name="Index_20_Link" text:visited-style-name="Index_20_Link">Lógica Condicional de la Tarjeta<text:tab/>29</text:a></text:p>
          <text:p text:style-name="P9"><text:a xlink:type="simple" xlink:href="#__RefHeading___Toc2565_1385620957" office:name="14.3 Sistema de validaciones centralizado" text:style-name="Index_20_Link" text:visited-style-name="Index_20_Link">14.3 Sistema de validaciones centralizado<text:tab/>29</text:a></text:p>
          <text:p text:style-name="P9"><text:a xlink:type="simple" xlink:href="#__RefHeading___Toc2567_1385620957" office:name="14.4 Preparación dinámica e integración con Backend" text:style-name="Index_20_Link" text:visited-style-name="Index_20_Link">14.4 Preparación dinámica e integración con Backend<text:tab/>30</text:a></text:p>
          <text:p text:style-name="P9"><text:a xlink:type="simple" xlink:href="#__RefHeading___Toc2569_1385620957" office:name="14.5 Pruebas funcionales del bloque cliente" text:style-name="Index_20_Link" text:visited-style-name="Index_20_Link">14.5 Pruebas funcionales del bloque cliente<text:tab/>30</text:a></text:p>
          <text:p text:style-name="P9"><text:a xlink:type="simple" xlink:href="#__RefHeading___Toc2571_1385620957" office:name="14.6 Resultado del Sprint DWEC" text:style-name="Index_20_Link" text:visited-style-name="Index_20_Link">14.6 Resultado del Sprint DWEC<text:tab/>30</text:a></text:p>
          <text:p text:style-name="P8"><text:a xlink:type="simple" xlink:href="#__RefHeading___Toc2573_1385620957" office:name="15. Sprint DWEC · Listado dinámico, filtros, buscador AJAX y carrito" text:style-name="Index_20_Link" text:visited-style-name="Index_20_Link">15. Sprint DWEC · Listado dinámico, filtros, buscador AJAX y carrito<text:tab/>31</text:a></text:p>
          <text:p text:style-name="P9"><text:a xlink:type="simple" xlink:href="#__RefHeading___Toc2575_1385620957" office:name="15.1 Tienda dinámica y renderizado desde API" text:style-name="Index_20_Link" text:visited-style-name="Index_20_Link">15.1 Tienda dinámica y renderizado desde API<text:tab/>31</text:a></text:p>
          <text:p text:style-name="P9"><text:a xlink:type="simple" xlink:href="#__RefHeading___Toc2577_1385620957" office:name="15.2 Buscador AJAX y filtrado instantáneo" text:style-name="Index_20_Link" text:visited-style-name="Index_20_Link">15.2 Buscador AJAX y filtrado instantáneo<text:tab/>32</text:a></text:p>
          <text:p text:style-name="P9"><text:a xlink:type="simple" xlink:href="#__RefHeading___Toc2579_1385620957" office:name="15.3 Carrito dinámico y flujo de compra" text:style-name="Index_20_Link" text:visited-style-name="Index_20_Link">15.3 Carrito dinámico y flujo de compra<text:tab/>32</text:a></text:p>
          <text:p text:style-name="P9"><text:a xlink:type="simple" xlink:href="#__RefHeading___Toc2581_1385620957" office:name="15.4 Listados dinámicos de rutas y actividades" text:style-name="Index_20_Link" text:visited-style-name="Index_20_Link">15.4 Listados dinámicos de rutas y actividades<text:tab/>32</text:a></text:p>
          <text:p text:style-name="P9"><text:a xlink:type="simple" xlink:href="#__RefHeading___Toc2583_1385620957" office:name="15.5 Páginas de detalle dinámicas" text:style-name="Index_20_Link" text:visited-style-name="Index_20_Link">15.5 Páginas de detalle dinámicas<text:tab/>33</text:a></text:p>
          <text:p text:style-name="P9"><text:a xlink:type="simple" xlink:href="#__RefHeading___Toc2585_1385620957" office:name="15.6 Navbar dinámica y gestión de sesión" text:style-name="Index_20_Link" text:visited-style-name="Index_20_Link">15.6 Navbar dinámica y gestión de sesión<text:tab/>33</text:a></text:p>
          <text:p text:style-name="P9"><text:a xlink:type="simple" xlink:href="#__RefHeading___Toc2587_1385620957" office:name="15.7 Integración técnica entre DWEC y DWES" text:style-name="Index_20_Link" text:visited-style-name="Index_20_Link">15.7 Integración técnica entre DWEC y DWES<text:tab/>33</text:a></text:p>
          <text:p text:style-name="P9"><text:a xlink:type="simple" xlink:href="#__RefHeading___Toc2589_1385620957" office:name="15.8 Pruebas funcionales del sprint 2" text:style-name="Index_20_Link" text:visited-style-name="Index_20_Link">15.8 Pruebas funcionales del sprint 2<text:tab/>34</text:a></text:p>
          <text:p text:style-name="P9"><text:a xlink:type="simple" xlink:href="#__RefHeading___Toc2591_1385620957" office:name="15.9 Resultado del sprint" text:style-name="Index_20_Link" text:visited-style-name="Index_20_Link">15.9 Resultado del sprint<text:tab/>34</text:a></text:p>
          <text:p text:style-name="P8"><text:a xlink:type="simple" xlink:href="#__RefHeading___Toc2593_1385620957" office:name="16. Sprint DWES · Base de datos relacional y modelo del sistema" text:style-name="Index_20_Link" text:visited-style-name="Index_20_Link">16. Sprint DWES · Base de datos relacional y modelo del sistema<text:tab/>35</text:a></text:p>
          <text:p text:style-name="P9"><text:a xlink:type="simple" xlink:href="#__RefHeading___Toc2595_1385620957" office:name="16.1 Arquitectura del backend y flujo de datos" text:style-name="Index_20_Link" text:visited-style-name="Index_20_Link">16.1 Arquitectura del backend y flujo de datos<text:tab/>35</text:a></text:p>
          <text:p text:style-name="P9"><text:a xlink:type="simple" xlink:href="#__RefHeading___Toc2597_1385620957" office:name="16.2 Diseño del modelo relacional" text:style-name="Index_20_Link" text:visited-style-name="Index_20_Link">16.2 Diseño del modelo relacional<text:tab/>36</text:a></text:p>
          <text:p text:style-name="P9"><text:a xlink:type="simple" xlink:href="#__RefHeading___Toc2599_1385620957" office:name="16.3 Relaciones principales y reglas de negocio" text:style-name="Index_20_Link" text:visited-style-name="Index_20_Link">16.3 Relaciones principales y reglas de negocio<text:tab/>36</text:a></text:p>
          <text:p text:style-name="P9"><text:a xlink:type="simple" xlink:href="#__RefHeading___Toc2601_1385620957" office:name="16.4 Normalización y decisiones de diseño" text:style-name="Index_20_Link" text:visited-style-name="Index_20_Link">16.4 Normalización y decisiones de diseño<text:tab/>36</text:a></text:p>
          <text:p text:style-name="P9"><text:a xlink:type="simple" xlink:href="#__RefHeading___Toc2603_1385620957" office:name="16.5 Scripts SQL y datos mínimos de prueba" text:style-name="Index_20_Link" text:visited-style-name="Index_20_Link">16.5 Scripts SQL y datos mínimos de prueba<text:tab/>37</text:a></text:p>
          <text:p text:style-name="P9"><text:a xlink:type="simple" xlink:href="#__RefHeading___Toc2605_1385620957" office:name="16.6 Resultado del sprint" text:style-name="Index_20_Link" text:visited-style-name="Index_20_Link">16.6 Resultado del sprint<text:tab/>37</text:a></text:p>
          <text:p text:style-name="P8"><text:a xlink:type="simple" xlink:href="#__RefHeading___Toc2607_1385620957" office:name="17. Sprint DWES · API REST, sesiones, roles, reportes y moderación" text:style-name="Index_20_Link" text:visited-style-name="Index_20_Link">17. Sprint DWES · API REST, sesiones, roles, reportes y moderación<text:tab/>38</text:a></text:p>
          <text:p text:style-name="P9"><text:a xlink:type="simple" xlink:href="#__RefHeading___Toc2609_1385620957" office:name="17.1 Arquitectura de la API y organización del backend" text:style-name="Index_20_Link" text:visited-style-name="Index_20_Link">17.1 Arquitectura de la API y organización del backend<text:tab/>38</text:a></text:p>
          <text:p text:style-name="P9"><text:a xlink:type="simple" xlink:href="#__RefHeading___Toc2611_1385620957" office:name="17.2 Endpoints principales de la API REST" text:style-name="Index_20_Link" text:visited-style-name="Index_20_Link">17.2 Endpoints principales de la API REST<text:tab/>38</text:a></text:p>
          <text:p text:style-name="P9"><text:a xlink:type="simple" xlink:href="#__RefHeading___Toc2613_1385620957" office:name="17.3 Formato de respuesta y comunicación con el cliente" text:style-name="Index_20_Link" text:visited-style-name="Index_20_Link">17.3 Formato de respuesta y comunicación con el cliente<text:tab/>38</text:a></text:p>
          <text:p text:style-name="P9"><text:a xlink:type="simple" xlink:href="#__RefHeading___Toc2615_1385620957" office:name="17.4 Sesiones y control de acceso por roles" text:style-name="Index_20_Link" text:visited-style-name="Index_20_Link">17.4 Sesiones y control de acceso por roles<text:tab/>39</text:a></text:p>
          <text:p text:style-name="P9"><text:a xlink:type="simple" xlink:href="#__RefHeading___Toc2617_1385620957" office:name="17.5 Reportes y lógica de moderación" text:style-name="Index_20_Link" text:visited-style-name="Index_20_Link">17.5 Reportes y lógica de moderación<text:tab/>39</text:a></text:p>
          <text:p text:style-name="P9"><text:a xlink:type="simple" xlink:href="#__RefHeading___Toc2619_1385620957" office:name="17.6 Seguridad, validaciones y buenas prácticas" text:style-name="Index_20_Link" text:visited-style-name="Index_20_Link">17.6 Seguridad, validaciones y buenas prácticas<text:tab/>39</text:a></text:p>
          <text:p text:style-name="P9"><text:a xlink:type="simple" xlink:href="#__RefHeading___Toc2621_1385620957" office:name="17.7 Estado de las pruebas y documentación técnica" text:style-name="Index_20_Link" text:visited-style-name="Index_20_Link">17.7 Estado de las pruebas y documentación técnica<text:tab/>39</text:a></text:p>
          <text:p text:style-name="P9"><text:a xlink:type="simple" xlink:href="#__RefHeading___Toc2623_1385620957" office:name="17.8 Resultado del sprint" text:style-name="Index_20_Link" text:visited-style-name="Index_20_Link">17.8 Resultado del sprint<text:tab/>39</text:a></text:p>
          <text:p text:style-name="P8"><text:a xlink:type="simple" xlink:href="#__RefHeading___Toc2625_1385620957" office:name="18. Sostenibilidad aplicada a PacePal" text:style-name="Index_20_Link" text:visited-style-name="Index_20_Link">18. Sostenibilidad aplicada a PacePal<text:tab/>40</text:a></text:p>
          <text:p text:style-name="P9"><text:a xlink:type="simple" xlink:href="#__RefHeading___Toc2627_1385620957" office:name="18.1 Enfoque sostenible dentro del concepto del producto" text:style-name="Index_20_Link" text:visited-style-name="Index_20_Link">18.1 Enfoque sostenible dentro del concepto del producto<text:tab/>40</text:a></text:p>
          <text:p text:style-name="P9"><text:a xlink:type="simple" xlink:href="#__RefHeading___Toc2629_1385620957" office:name="18.2 Aplicación del enfoque SCAMPER a PacePal" text:style-name="Index_20_Link" text:visited-style-name="Index_20_Link">18.2 Aplicación del enfoque SCAMPER a PacePal<text:tab/>40</text:a></text:p>
          <text:p text:style-name="P9"><text:a xlink:type="simple" xlink:href="#__RefHeading___Toc2631_1385620957" office:name="18.3 Tienda sostenible y producto responsable" text:style-name="Index_20_Link" text:visited-style-name="Index_20_Link"><text:soft-page-break/>18.3 Tienda sostenible y producto responsable<text:tab/>40</text:a></text:p>
          <text:p text:style-name="P9"><text:a xlink:type="simple" xlink:href="#__RefHeading___Toc2633_1385620957" office:name="18.4 Sistema de recompensas ecológicas" text:style-name="Index_20_Link" text:visited-style-name="Index_20_Link">18.4 Sistema de recompensas ecológicas<text:tab/>41</text:a></text:p>
          <text:p text:style-name="P9"><text:a xlink:type="simple" xlink:href="#__RefHeading___Toc2635_1385620957" office:name="18.5 Propuesta de valor sostenible e impacto esperado" text:style-name="Index_20_Link" text:visited-style-name="Index_20_Link">18.5 Propuesta de valor sostenible e impacto esperado<text:tab/>41</text:a></text:p>
          <text:p text:style-name="P9"><text:a xlink:type="simple" xlink:href="#__RefHeading___Toc2637_1385620957" office:name="18.6 Materiales visuales y evidencias del bloque de sostenibilidad" text:style-name="Index_20_Link" text:visited-style-name="Index_20_Link">18.6 Materiales visuales y evidencias del bloque de sostenibilidad<text:tab/>41</text:a></text:p>
          <text:p text:style-name="P9"><text:a xlink:type="simple" xlink:href="#__RefHeading___Toc2639_1385620957" office:name="18.7 Resultado del bloque de sostenibilidad" text:style-name="Index_20_Link" text:visited-style-name="Index_20_Link">18.7 Resultado del bloque de sostenibilidad<text:tab/>41</text:a></text:p>
          <text:p text:style-name="P9"><text:a xlink:type="simple" xlink:href="#__RefHeading___Toc2641_1385620957" office:name="19.Conclusiones" text:style-name="Index_20_Link" text:visited-style-name="Index_20_Link">19.Conclusiones<text:tab/>42</text:a></text:p>
          <text:p text:style-name="P11"><text:a xlink:type="simple" xlink:href="#__RefHeading___Toc2643_1385620957" office:name="20. Bibliografía" text:style-name="Index_20_Link" text:visited-style-name="Index_20_Link">20. Bibliografía<text:tab/>43</text:a></text:p>
          <text:p text:style-name="P8"><text:a xlink:type="simple" xlink:href="#__RefHeading___Toc2645_1385620957" office:name="20.1 Referencias externas de investigación y competencia" text:style-name="Index_20_Link" text:visited-style-name="Index_20_Link">20.1 Referencias externas de investigación y competencia<text:tab/>43</text:a></text:p>
          <text:p text:style-name="P8"><text:a xlink:type="simple" xlink:href="#__RefHeading___Toc2647_1385620957" office:name="22.2 Documentación técnica oficial" text:style-name="Index_20_Link" text:visited-style-name="Index_20_Link">22.2 Documentación técnica oficial<text:tab/>43</text:a></text:p>
          <text:p text:style-name="P8"><text:a xlink:type="simple" xlink:href="#__RefHeading___Toc2649_1385620957" office:name="22.3 Materiales académicos de apoyo" text:style-name="Index_20_Link" text:visited-style-name="Index_20_Link">22.3 Materiales académicos de apoyo<text:tab/>44</text:a></text:p>
          <text:p text:style-name="P11"><text:a xlink:type="simple" xlink:href="#__RefHeading___Toc2651_1385620957" office:name="21. ANEXOS" text:style-name="Index_20_Link" text:visited-style-name="Index_20_Link">21. ANEXOS<text:tab/>45</text:a></text:p>
          <text:p text:style-name="P8"><text:a xlink:type="simple" xlink:href="#__RefHeading___Toc2653_1385620957" office:name="24.1 Evidencias del Sprint 0 (Arranque)" text:style-name="Index_20_Link" text:visited-style-name="Index_20_Link">24.1 Evidencias del Sprint 0 (Arranque)<text:tab/>45</text:a></text:p>
          <text:p text:style-name="P8"><text:a xlink:type="simple" xlink:href="#__RefHeading___Toc2655_1385620957" office:name="24.2 Análisis de tendencias y competencia" text:style-name="Index_20_Link" text:visited-style-name="Index_20_Link">24.2 Análisis de tendencias y competencia<text:tab/>45</text:a></text:p>
          <text:p text:style-name="P8"><text:a xlink:type="simple" xlink:href="#__RefHeading___Toc2657_1385620957" office:name="24.3 Wireframes y prototipos (Sprint DIW)" text:style-name="Index_20_Link" text:visited-style-name="Index_20_Link">24.3 Wireframes y prototipos (Sprint DIW)<text:tab/>46</text:a></text:p>
          <text:p text:style-name="P8"><text:a xlink:type="simple" xlink:href="#__RefHeading___Toc2659_1385620957" office:name="24.4 Guía de estilos y componentes" text:style-name="Index_20_Link" text:visited-style-name="Index_20_Link">24.4 Guía de estilos y componentes<text:tab/>46</text:a></text:p>
          <text:p text:style-name="P8"><text:a xlink:type="simple" xlink:href="#__RefHeading___Toc2661_1385620957" office:name="24.5 Evidencias de Lógica de Cliente (DWEC)" text:style-name="Index_20_Link" text:visited-style-name="Index_20_Link">24.5 Evidencias de Lógica de Cliente (DWEC)<text:tab/>47</text:a></text:p>
          <text:p text:style-name="P8"><text:a xlink:type="simple" xlink:href="#__RefHeading___Toc2663_1385620957" office:name="24.6 Evidencias de Servidor y API (DWES)" text:style-name="Index_20_Link" text:visited-style-name="Index_20_Link">24.6 Evidencias de Servidor y API (DWES)<text:tab/>47</text:a></text:p>
          <text:p text:style-name="P8"><text:a xlink:type="simple" xlink:href="#__RefHeading___Toc2665_1385620957" office:name="24.7 Sostenibilidad y Comunicación Visual" text:style-name="Index_20_Link" text:visited-style-name="Index_20_Link">24.7 Sostenibilidad y Comunicación Visual<text:tab/>47</text:a></text:p>
          <text:p text:style-name="P8"><text:a xlink:type="simple" xlink:href="#__RefHeading___Toc2667_1385620957" office:name="24.8 Relación de documentos complementarios" text:style-name="Index_20_Link" text:visited-style-name="Index_20_Link">24.8 Relación de documentos complementarios<text:tab/>47</text:a></text:p>
          <text:p text:style-name="P8"><text:a xlink:type="simple" xlink:href="#__RefHeading___Toc2669_1385620957" office:name="24.9 Cierre del anexo" text:style-name="Index_20_Link" text:visited-style-name="Index_20_Link">24.9 Cierre del anexo<text:tab/>48</text:a></text:p>
        </text:index-body>
      </text:table-of-content>
      <text:p text:style-name="P12"/>
      <text:h text:style-name="P13" text:outline-level="2"><text:bookmark-start text:name="__RefHeading___Toc2439_1385620957"/>1. Introducción<text:bookmark-end text:name="__RefHeading___Toc2439_1385620957"/></text:h>
      <text:p text:style-name="P14"><text:span text:style-name="T11">Treecore Studio</text:span> es un equipo especializado en desarrollo web, branding y marketing digital con base en la Sierra de Madrid. Nuestra filosofía de trabajo se fundamenta en el equilibrio entre el impacto visual, la pericia técnica y la obtención de resultados medibles. Reconocidos con el <text:span text:style-name="T11">Premio Tupi al Mejor Diseño Web 2024</text:span>, en el estudio entendemos cada producto digital como una combinación de arte y ciencia, diseñada siempre desde la cercanía y la transparencia con el cliente.</text:p>
      <text:p text:style-name="P15">Bajo esta premisa de crear soluciones rápidas, rentables y visualmente potentes, nace <text:span text:style-name="T11">PacePal</text:span>.</text:p>
      <text:p text:style-name="P15">Este proyecto, desarrollado dentro del marco del <text:span text:style-name="T11">Proyecto Agile Intermodular de 2º de DAW</text:span>, no se plantea únicamente como un ejercicio académico, sino como una extensión natural del portafolio de <text:span text:style-name="T12">Treecore Studio</text:span>. <text:span text:style-name="T12">PacePal</text:span> es una aplicación web concebida para unir tres ejes fundamentales: actividad física, cohesión comunitaria y sostenibilidad, resolviendo la necesidad de conectar a personas que buscan compartir rutas deportivas de forma organizada y segura.</text:p>
      <text:p text:style-name="P14">La fase de ideación y análisis permitió detectar un vacío en las plataformas actuales, a menudo centradas en el rendimiento individual o en comunidades demasiado masivas y poco moderadas. <text:span text:style-name="T12">PacePal</text:span> busca diferenciarse mediante una lógica de producto clara: el uso de rutas predefinidas y controladas sobre las que se generan quedadas con niveles y ritmos específicos. Esta estructura garantiza que la experiencia de usuario sea predecible, accesible y de alta calidad, alineándose con nuestro compromiso de construir una web más humana y eficiente.</text:p>
      <text:p text:style-name="P14">Esta documentación técnica y funcional detalla el proceso de creación de <text:span text:style-name="T12">PacePal</text:span>, desde la planificación inicial bajo metodologías ágiles hasta su despliegue final. A través de estas secciones, se desglosan las decisiones de arquitectura, diseño de interfaz y lógica de servidor que han permitido dar vida a esta plataforma, siempre bajo nuestra máxima identidad:</text:p>
      <text:p text:style-name="P16">Code. Connect. Create.</text:p>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2"><text:bookmark-start text:name="__RefHeading___Toc2441_1385620957"/><text:soft-page-break/><text:span text:style-name="T11">2. Contexto del proyecto y necesidad detectada</text:span><text:bookmark-end text:name="__RefHeading___Toc2441_1385620957"/></text:h>
      <text:h text:style-name="P18" text:outline-level="3"><text:bookmark-start text:name="__RefHeading___Toc2443_1385620957"/>2.1 Situación actual y tendencias<text:bookmark-end text:name="__RefHeading___Toc2443_1385620957"/></text:h>
      <text:p text:style-name="P19">En los últimos años se ha consolidado un interés creciente por la actividad física y el bienestar personal como pilares de una vida saludable. Caminar o correr al aire libre se han convertido en opciones frecuentes para reducir el estrés, mejorar la condición física y combatir el sedentarismo. A esta tendencia se suma también una mayor sensibilidad hacia estilos de vida más sostenibles. Sin embargo, este interés no siempre se traduce en una experiencia sencilla para quienes deciden iniciar o retomar una rutina deportiva con constancia.</text:p>
      <text:h text:style-name="P18" text:outline-level="3"><text:bookmark-start text:name="__RefHeading___Toc2445_1385620957"/>2.2 El problema: la dificultad de la constancia individual<text:bookmark-end text:name="__RefHeading___Toc2445_1385620957"/></text:h>
      <text:p text:style-name="P19">A partir del análisis realizado por Treecore Studio, se detectó que el principal obstáculo no es la falta de voluntad, sino la ausencia de un entorno que facilite la continuidad. Cuando la actividad se realiza en soledad, aumenta la desmotivación y el abandono.</text:p>
      <text:p text:style-name="P20">Identificamos tres fricciones principales:</text:p>
      <text:list text:style-name="L1">
        <text:list-item>
          <text:p text:style-name="P21">Desajuste de expectativas: <text:span text:style-name="T13">Incertidumbre sobre si la sesión será acorde al nivel del usuario.</text:span></text:p>
        </text:list-item>
        <text:list-item>
          <text:p text:style-name="P21">Falta de información operativa: <text:span text:style-name="T13">Datos vagos sobre puntos de encuentro o plazas disponibles en quedadas informales.</text:span></text:p>
        </text:list-item>
        <text:list-item>
          <text:p text:style-name="P21">Inseguridad digital: <text:span text:style-name="T13">Necesidad de confianza al trasladar la interacción del entorno online al mundo presencial.</text:span></text:p>
        </text:list-item>
      </text:list>
      <text:h text:style-name="P18" text:outline-level="3"><text:bookmark-start text:name="__RefHeading___Toc2447_1385620957"/>2.3 Limitaciones de las soluciones existentes<text:bookmark-end text:name="__RefHeading___Toc2447_1385620957"/></text:h>
      <text:p text:style-name="P19">El mercado ofrece herramientas potentes pero con enfoques distintos: apps de alto rendimiento (centradas en métricas competitivas) o plataformas de eventos generalistas (sin filtros deportivos precisos). Se aprecia un espacio vacío: una solución que combine la dimensión social con una organización técnica clara y una base mínima de control. Aquí es donde PacePal encuentra su sentido estratégico.</text:p>
      <text:h text:style-name="P18" text:outline-level="3"><text:bookmark-start text:name="__RefHeading___Toc2449_1385620957"/>2.4 Justificación de la propuesta<text:bookmark-end text:name="__RefHeading___Toc2449_1385620957"/></text:h>
      <text:p text:style-name="P19">PacePal se plantea como el puente entre la intención deportiva y la acción grupal. Nuestra propuesta se justifica en la estandarización de la experiencia: la decisión de trabajar sobre un catálogo de rutas fijas es la pieza clave para eliminar la ambigüedad informativa y garantizar que las actividades sean comparables y seguras.</text:p>
      <text:p text:style-name="P20">Elegimos este modelo porque permite:</text:p>
      <text:list text:style-name="L2">
        <text:list-item>
          <text:p text:style-name="P22">Estructurar la oferta: <text:span text:style-name="T13">Sustituir la improvisación por categorías claras de nivel y ritmo.</text:span></text:p>
        </text:list-item>
        <text:list-item>
          <text:p text:style-name="P22">Profesionalizar la comunidad: <text:span text:style-name="T13">Dotar a los encuentros presenciales de un marco de responsabilidad (registro y moderación).</text:span></text:p>
        </text:list-item>
        <text:list-item>
          <text:p text:style-name="P22">Vincular deporte y valores: <text:span text:style-name="T13">Responder a la demanda de un consumo más responsable a través de la identidad del producto.</text:span></text:p>
        </text:list-item>
      </text:list>
      <text:h text:style-name="P23" text:outline-level="2"><text:bookmark-start text:name="__RefHeading___Toc2451_1385620957"/><text:soft-page-break/>3. Objetivos del proyecto<text:bookmark-end text:name="__RefHeading___Toc2451_1385620957"/></text:h>
      <text:h text:style-name="P18" text:outline-level="3"><text:bookmark-start text:name="__RefHeading___Toc2453_1385620957"/>3.1 Objetivo general<text:bookmark-end text:name="__RefHeading___Toc2453_1385620957"/></text:h>
      <text:p text:style-name="P19">Desarrollar una aplicación web intermodular, funcional y defendible que permita a los usuarios organizar actividades grupales sobre rutas existentes, integrando en un mismo producto digital la gestión comunitaria, la accesibilidad universal, la seguridad de los participantes y un compromiso real con la sostenibilidad.</text:p>
      <text:h text:style-name="P18" text:outline-level="3"><text:bookmark-start text:name="__RefHeading___Toc2455_1385620957"/>3.2 Objetivos específicos<text:bookmark-end text:name="__RefHeading___Toc2455_1385620957"/></text:h>
      <text:p text:style-name="P19">Para alcanzar la meta general, el proyecto se desglosa en los siguientes hitos operativos:</text:p>
      <text:list text:style-name="L3">
        <text:list-item>
          <text:p text:style-name="P24">Funcionalidad y Ciclo de Actividad (MVP): <text:span text:style-name="T13">Programar un sistema que gestione el flujo completo: desde la consulta y el filtrado por criterios técnicos (ritmo/nivel) hasta la inscripción y participación activa en la quedada.</text:span></text:p>
        </text:list-item>
        <text:list-item>
          <text:p text:style-name="P24">Interfaz, UX y Accesibilidad: <text:span text:style-name="T13">Garantizar una navegación multidispositivo (</text:span><text:span text:style-name="T14">Responsive Design</text:span><text:span text:style-name="T13">) y el cumplimiento de las pautas WCAG 2.1 (contraste, navegación por teclado y semántica), asegurando la inclusión de cualquier perfil de usuari</text:span>o.</text:p>
        </text:list-item>
        <text:list-item>
          <text:p text:style-name="P24">Arquitectura de Datos y Predictibilidad: <text:span text:style-name="T13">Implementar una base de datos de rutas controladas donde el usuario no cree el trazado, sino la "instancia" de actividad, basándose en parámetros fijos de distancia y dificultad técnica.</text:span></text:p>
        </text:list-item>
        <text:list-item>
          <text:p text:style-name="P24">Integración Técnica Intermodular: <text:span text:style-name="T13">Consolidar en un único software los bloques de DIW (estilos y maquetación), DWEC (JavaScript modular y AJAX) y DWES (API REST y persistencia de datos), demostrando una arquitectura </text:span><text:span text:style-name="T14">full-stack</text:span><text:span text:style-name="T13"> coherente.</text:span></text:p>
        </text:list-item>
        <text:list-item>
          <text:p text:style-name="P24">Sistema de Confianza: <text:span text:style-name="T13">Desarrollar módulos de validación de identidad (registro con DNI), un motor de reportes de incidencias y un panel de administración para la moderación de la comunidad.</text:span></text:p>
        </text:list-item>
        <text:list-item>
          <text:p text:style-name="P24">Módulo de E-commerce Sostenible: <text:span text:style-name="T13">Integrar una tienda funcional de productos reciclados que actúe como eje transversal de la identidad de marca de Treecore Studio.</text:span></text:p>
        </text:list-item>
      </text:list>
      <text:p text:style-name="P16"/>
      <text:p text:style-name="P20"/>
      <text:h text:style-name="P25" text:outline-level="2"><text:bookmark-start text:name="__RefHeading___Toc2457_1385620957"/>4. Planificación general del proyecto<text:bookmark-end text:name="__RefHeading___Toc2457_1385620957"/></text:h>
      <text:p text:style-name="P26">La planificación de PacePal se ha estructurado con una lógica progresiva y realista, vinculada al enfoque intermodular del proyecto. En Treecore Studio decidimos trabajar sobre una sola aplicación que crece por fases, manteniendo una estructura común y un hilo funcional claro desde el arranque hasta el cierre. Esta forma de organización permite avanzar con orden, controlar mejor el alcance y asegurar que cada sprint aporte una parte útil y reconocible del producto final.</text:p>
      <text:h text:style-name="P27" text:outline-level="3"><text:bookmark-start text:name="__RefHeading___Toc2459_1385620957"/>4.1 Fases del desarrollo<text:bookmark-end text:name="__RefHeading___Toc2459_1385620957"/></text:h>
      <text:list text:style-name="L4">
        <text:list-item>
          <text:p text:style-name="P28">Sprint 0: Definición y arranque</text:p>
          <text:p text:style-name="P29">Esta etapa inicial se centró en dejar preparada la base del proyecto. En ella se tomaron decisiones estructurales que condicionan todo el desarrollo posterior, como el uso de rutas fijas en la base de datos, la centralidad de las actividades y la incorporación de medidas de seguridad (registro con DNI y sistema de reportes). Además, se preparó la estructura de carpetas, el backlog inicial y el sistema de evidencias.</text:p>
        </text:list-item>
        <text:list-item>
          <text:p text:style-name="P28">Sprint DIW: Diseño y experiencia de usuario</text:p>
          <text:p text:style-name="P29">Orientada a fijar la base visual y de usabilidad. Durante este bloque se trabajó el análisis de tendencias, la guía de estilos, los wireframes y el prototipado, con el objetivo de establecer una interfaz clara, limpia y responsive. El enfoque principal fue asegurar que la información clave se comprenda rápidamente desde el primer contacto.</text:p>
        </text:list-item>
        <text:list-item>
          <text:p text:style-name="P28">Sprint DWEC: Interacción y lógica de cliente</text:p>
          <text:p text:style-name="P29">Continuamos con la parte dinámica del frontend mediante JavaScript modular. En esta fase se contemplaron las validaciones de formularios, listados dinámicos, filtros, el buscador AJAX y la gestión del carrito. El objetivo fue convertir la interfaz en una aplicación fluida que responda a las acciones del usuario sin recargas innecesarias.</text:p>
        </text:list-item>
        <text:list-item>
          <text:p text:style-name="P28">Sprint DWES: Arquitectura de servidor y persistencia</text:p>
          <text:p text:style-name="P29">Aportó la infraestructura para que la web funcione con datos reales. Se planificó el diseño de la base de datos relacional, la creación de la API REST en PHP, la gestión de sesiones, los roles de usuario y la lógica de moderación. Esta fase permitió conectar el frontend con el servidor para que registros, logins y actividades queden respaldados por un flujo de datos real.</text:p>
        </text:list-item>
        <text:list-item>
          <text:p text:style-name="P28">Cierre y despliegue</text:p>
          <text:p text:style-name="P29">Fase reservada para pruebas de funcionamiento, validación de <text:span text:style-name="T15">endpoints</text:span>, revisión de rendimiento y ajustes finales. El proceso concluye con la documentación técnica definitiva y la publicación del proyecto en un entorno de producción (Hostinger) preparado para su defensa académica.</text:p>
        </text:list-item>
      </text:list>
      <text:h text:style-name="P27" text:outline-level="3"><text:bookmark-start text:name="__RefHeading___Toc2461_1385620957"/><text:soft-page-break/>4.2 Resumen de planificación por fases<text:bookmark-end text:name="__RefHeading___Toc2461_1385620957"/></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0"><text:span text:style-name="Strong_20_Emphasis"><text:span text:style-name="T6">Fase</text:span></text:span></text:p>
            </table:table-cell>
            <table:table-cell table:style-name="Tabla2.A1" office:value-type="string">
              <text:p text:style-name="P30"><text:span text:style-name="Strong_20_Emphasis"><text:span text:style-name="T6">Objetivo principal</text:span></text:span></text:p>
            </table:table-cell>
            <table:table-cell table:style-name="Tabla2.A1" office:value-type="string">
              <text:p text:style-name="P30"><text:span text:style-name="Strong_20_Emphasis"><text:span text:style-name="T6">Resultado esperado</text:span></text:span></text:p>
            </table:table-cell>
          </table:table-row>
        </table:table-header-rows>
        <table:table-row>
          <table:table-cell table:style-name="Tabla2.A1" office:value-type="string">
            <text:p text:style-name="P31">Sprint 0</text:p>
          </table:table-cell>
          <table:table-cell table:style-name="Tabla2.A1" office:value-type="string">
            <text:p text:style-name="P32">Definir el proyecto y preparar la base.</text:p>
          </table:table-cell>
          <table:table-cell table:style-name="Tabla2.A1" office:value-type="string">
            <text:p text:style-name="P32">Repositorio estructurado y backlog inicial.</text:p>
          </table:table-cell>
        </table:table-row>
        <table:table-row>
          <table:table-cell table:style-name="Tabla2.A1" office:value-type="string">
            <text:p text:style-name="P31">Sprint DIW</text:p>
          </table:table-cell>
          <table:table-cell table:style-name="Tabla2.A1" office:value-type="string">
            <text:p text:style-name="P32">Diseñar la interfaz y la experiencia de usuario.</text:p>
          </table:table-cell>
          <table:table-cell table:style-name="Tabla2.A1" office:value-type="string">
            <text:p text:style-name="P32">Guía de estilos y diseño responsive.</text:p>
          </table:table-cell>
        </table:table-row>
        <table:table-row>
          <table:table-cell table:style-name="Tabla2.A1" office:value-type="string">
            <text:p text:style-name="P31">Sprint DWEC</text:p>
          </table:table-cell>
          <table:table-cell table:style-name="Tabla2.A1" office:value-type="string">
            <text:p text:style-name="P32">Implementar la interacción dinámica en cliente.</text:p>
          </table:table-cell>
          <table:table-cell table:style-name="Tabla2.A1" office:value-type="string">
            <text:p text:style-name="P32">Formularios, filtros y carrito funcional.</text:p>
          </table:table-cell>
        </table:table-row>
        <table:table-row>
          <table:table-cell table:style-name="Tabla2.A1" office:value-type="string">
            <text:p text:style-name="P31">Sprint DWES</text:p>
          </table:table-cell>
          <table:table-cell table:style-name="Tabla2.A1" office:value-type="string">
            <text:p text:style-name="P32">Desarrollar la lógica de servidor y API.</text:p>
          </table:table-cell>
          <table:table-cell table:style-name="Tabla2.A1" office:value-type="string">
            <text:p text:style-name="P32">Base de datos relacional, API y sesiones.</text:p>
          </table:table-cell>
        </table:table-row>
        <table:table-row>
          <table:table-cell table:style-name="Tabla2.A1" office:value-type="string">
            <text:p text:style-name="P31">Cierre</text:p>
          </table:table-cell>
          <table:table-cell table:style-name="Tabla2.A1" office:value-type="string">
            <text:p text:style-name="P32">Probar, ajustar y publicar el proyecto.</text:p>
          </table:table-cell>
          <table:table-cell table:style-name="Tabla2.A1" office:value-type="string">
            <text:p text:style-name="P32">Despliegue y evidencias consolidadas.</text:p>
          </table:table-cell>
        </table:table-row>
      </table:table>
      <text:p text:style-name="P26"/>
      <text:p text:style-name="P26">En conjunto, esta planificación por capas ha permitido mantener el proyecto bajo control y repartir el trabajo de forma coherente. Gracias a ello, PacePal se presenta como una aplicación intermodular con una trazabilidad clara, facilitando tanto su desarrollo técnico como su defensa final.</text:p>
      <text:p text:style-name="P33"/>
      <text:p text:style-name="P20"/>
      <text:h text:style-name="P17" text:outline-level="2"/>
      <text:h text:style-name="P13" text:outline-level="2"><text:bookmark-start text:name="__RefHeading___Toc2463_1385620957"/>5. Metodología Agile/Scrum y organización del equipo<text:bookmark-end text:name="__RefHeading___Toc2463_1385620957"/></text:h>
      <text:p text:style-name="P14">La ejecución de PacePal se ha organizado siguiendo un enfoque Scrum adaptado a las necesidades de <text:span text:style-name="T11">Treecore Studio</text:span>. Esta metodología nos ha permitido mantener el alcance bajo control, priorizar funcionalidades y asegurar que cada avance quedase implementado, probado y documentado en un flujo de trabajo profesional.</text:p>
      <text:h text:style-name="P18" text:outline-level="3"><text:bookmark-start text:name="__RefHeading___Toc2465_1385620957"/>5.1 Roles en el equipo<text:bookmark-end text:name="__RefHeading___Toc2465_1385620957"/></text:h>
      <text:p text:style-name="P14">Para dar estabilidad al proceso, definimos responsabilidades claras:</text:p>
      <text:list text:style-name="L5">
        <text:list-item>
          <text:p text:style-name="P34"><text:span text:style-name="T11">Product Owner:</text:span> Responsable de mantener el objetivo del producto y decidir la prioridad del backlog. Su papel ha sido vital para asegurar que las funcionalidades de seguridad y sostenibilidad aportaran valor real.</text:p>
        </text:list-item>
        <text:list-item>
          <text:p text:style-name="P34"><text:span text:style-name="T11">Scrum Master:</text:span> Encargado del seguimiento del proceso y la organización diaria. Ha gestionado el tablero, eliminado bloqueos técnicos y velado por el cumplimiento de la <text:span text:style-name="T11">Estrategia de Evidencias</text:span>.</text:p>
        </text:list-item>
        <text:list-item>
          <text:p text:style-name="P34"><text:span text:style-name="T11">Equipo de Desarrollo:</text:span> Pablo Sevillano y Alejandro Pacheco han trabajado como equipo <text:span text:style-name="T11">full-stack</text:span>, colaborando en todas las fases desde el diseño de interfaz hasta la persistencia de datos en servidor.</text:p>
        </text:list-item>
      </text:list>
      <text:h text:style-name="P18" text:outline-level="3"><text:bookmark-start text:name="__RefHeading___Toc2467_1385620957"/>5.2 Ceremonias y eventos<text:bookmark-end text:name="__RefHeading___Toc2467_1385620957"/></text:h>
      <text:p text:style-name="P14">El ciclo de vida del proyecto se ha dividido en sprints con eventos específicos:</text:p>
      <text:list text:style-name="L6">
        <text:list-item>
          <text:p text:style-name="P35"><text:span text:style-name="T11">Sprint Planning:</text:span> Al inicio de cada bloque para fijar objetivos y seleccionar tareas.</text:p>
        </text:list-item>
        <text:list-item>
          <text:p text:style-name="P35"><text:span text:style-name="T11">Daily Scrum:</text:span> Seguimientos operativos para resolver bloqueos de forma inmediata.</text:p>
        </text:list-item>
        <text:list-item>
          <text:p text:style-name="P35"><text:span text:style-name="T11">Sprint Review y Retrospective:</text:span> Al cierre de cada hito, validamos el incremento funcional mediante evidencias y ajustamos la organización del equipo para el siguiente bloque.</text:p>
        </text:list-item>
      </text:list>
      <text:h text:style-name="P18" text:outline-level="3"><text:bookmark-start text:name="__RefHeading___Toc2469_1385620957"/>5.3 Estrategia de evidencias y "Definition of Done"<text:bookmark-end text:name="__RefHeading___Toc2469_1385620957"/></text:h>
      <text:p text:style-name="Text_20_body"><text:span text:style-name="T6">Establecimos una estructura en </text:span><text:span text:style-name="Source_20_Text"><text:span text:style-name="T6">/docs/evidencias/</text:span></text:span><text:span text:style-name="T6"> para garantizar la trazabilidad. Una tarea solo se considera terminada si cumple con nuestra </text:span><text:span text:style-name="T16">Definición de Hecho (DoD)</text:span><text:span text:style-name="T6">:</text:span></text:p>
      <text:list text:style-name="L7">
        <text:list-item>
          <text:p text:style-name="P36">Está implementada según los criterios de aceptación.</text:p>
        </text:list-item>
        <text:list-item>
          <text:p text:style-name="P36">El código está subido al repositorio centralizado.</text:p>
        </text:list-item>
        <text:list-item>
          <text:p text:style-name="P36">Cuenta con la evidencia gráfica o técnica (Postman, captura o test) correspondiente.</text:p>
        </text:list-item>
      </text:list>
      <text:h text:style-name="P18" text:outline-level="3"><text:bookmark-start text:name="__RefHeading___Toc2471_1385620957"/>5.4 Herramientas de trabajo<text:bookmark-end text:name="__RefHeading___Toc2471_1385620957"/></text:h>
      <text:list text:style-name="L8">
        <text:list-item>
          <text:p text:style-name="P37"><text:span text:style-name="T11">Gestión:</text:span> Trello (Tablero Kanban).</text:p>
        </text:list-item>
        <text:list-item>
          <text:p text:style-name="P37"><text:span text:style-name="T11">Desarrollo y Versionado:</text:span> VS Code, Git y GitHub.</text:p>
        </text:list-item>
        <text:list-item>
          <text:p text:style-name="P37"><text:span text:style-name="T11">Validación Técnica:</text:span> XAMPP, MySQL y Postman para la API REST.</text:p>
        </text:list-item>
      </text:list>
      <text:h text:style-name="P23" text:outline-level="2"><text:bookmark-start text:name="__RefHeading___Toc2473_1385620957"/><text:soft-page-break/>6. Historias de usuario<text:bookmark-end text:name="__RefHeading___Toc2473_1385620957"/></text:h>
      <text:p text:style-name="P14">Las historias de usuario de PacePal se han elaborado a partir de la detección de necesidades reales, integrando tanto los requisitos funcionales del sistema como las expectativas de los participantes en actividades deportivas. Este proceso ha permitido construir un conjunto de relatos breves que reflejan cómo las personas interactuarán con la plataforma.</text:p>
      <text:h text:style-name="P18" text:outline-level="3"><text:bookmark-start text:name="__RefHeading___Toc2475_1385620957"/>6.1 Análisis y origen de los requisitos<text:bookmark-end text:name="__RefHeading___Toc2475_1385620957"/></text:h>
      <text:p text:style-name="P14">Del análisis de usuarios surgió la necesidad de una plataforma que eliminara la incertidumbre. Los usuarios demandaban poder consultar rutas con datos técnicos fijos (distancia, zona, dificultad) antes de decidirse. La principal petición fue la <text:span text:style-name="T11">compatibilidad</text:span>: saber de antemano el ritmo y el nivel del grupo para evitar frustraciones durante la actividad.</text:p>
      <text:p text:style-name="P14">Por otro lado, la seguridad apareció como un factor crítico. Al organizar encuentros presenciales, se identificó la necesidad de un <text:span text:style-name="T11">registro verificado</text:span> y un sistema de moderación que permitiera reportar incidencias, garantizando una convivencia sana dentro de la comunidad. Finalmente, la dimensión sostenible se integró mediante la tienda de productos reciclados, respondiendo a una sensibilidad ambiental creciente en el público objetivo.</text:p>
      <text:h text:style-name="P18" text:outline-level="3"><text:bookmark-start text:name="__RefHeading___Toc2477_1385620957"/>6.2 Gestión del Backlog<text:bookmark-end text:name="__RefHeading___Toc2477_1385620957"/></text:h>
      <text:p text:style-name="P14">El proyecto se estructuró sobre un <text:span text:style-name="T11">Product Backlog de 30 historias de usuario</text:span>. Cada una sigue el formato estándar (<text:span text:style-name="T15">Como, quiero, para poder</text:span>) e incluye criterios de validación que sirven de guía para el desarrollo y las pruebas finales.</text:p>
      <text:list text:style-name="L9">
        <text:list-item>
          <text:p text:style-name="P38"><text:span text:style-name="T11">Estimación:</text:span> Utilizamos una escala de complejidad relativa (1, 2, 3, 5 y 8). Las historias con valor 8 se trataron con especial cuidado por su carga técnica.</text:p>
        </text:list-item>
        <text:list-item>
          <text:p text:style-name="P38"><text:span text:style-name="T11">Priorización:</text:span> Clasificamos las tareas en Alta, Media y Baja, asegurando que el núcleo de la aplicación (acceso, actividades, filtros y API) estuviera listo en las primeras fases del desarrollo.</text:p>
        </text:list-item>
      </text:list>
      <text:h text:style-name="P18" text:outline-level="3"><text:bookmark-start text:name="__RefHeading___Toc2479_1385620957"/>6.3 Listado de historias (Resumen)<text:bookmark-end text:name="__RefHeading___Toc2479_1385620957"/></text:h>
      <text:p text:style-name="P14">A continuación se detallan las historias que constituyen el núcleo del producto:</text:p>
      <text:list text:style-name="L10">
        <text:list-item>
          <text:p text:style-name="P39"><text:span text:style-name="T11">Seguridad y Acceso:</text:span> HU-01 (Registro con DNI) a HU-04 (Roles).</text:p>
        </text:list-item>
        <text:list-item>
          <text:p text:style-name="P39"><text:span text:style-name="T11">Gestión de Actividades:</text:span> HU-05 (Listados) a HU-13 (Unirse/Salir).</text:p>
        </text:list-item>
        <text:list-item>
          <text:p text:style-name="P39"><text:span text:style-name="T11">Comunidad y Moderación:</text:span> HU-17 (Reportes) a HU-20 (Acciones admin).</text:p>
        </text:list-item>
        <text:list-item>
          <text:p text:style-name="P39"><text:span text:style-name="T11">Sostenibilidad:</text:span> HU-21 (Tienda) a HU-26 (Puntos ecológicos).</text:p>
        </text:list-item>
        <text:list-item>
          <text:p text:style-name="P39"><text:span text:style-name="T11">Integración Técnica:</text:span> HU-27 a HU-30 (API REST y Accesibilidad).</text:p>
        </text:list-item>
      </text:list>
      <text:p text:style-name="P20"/>
      <text:p text:style-name="P20"/>
      <text:h text:style-name="P17" text:outline-level="2"><text:bookmark-start text:name="__RefHeading___Toc2481_1385620957"/><text:soft-page-break/>7. Presupuesto y recursos del proyecto<text:bookmark-end text:name="__RefHeading___Toc2481_1385620957"/></text:h>
      <text:p text:style-name="P40">El desarrollo de <text:span text:style-name="T11">PacePal</text:span> se ha ejecutado bajo un modelo de optimización de recursos propio de <text:span text:style-name="T11">Treecore Studio</text:span>. Aunque el proyecto se enmarca en un contexto de formación superior, se ha gestionado con una mentalidad profesional, diferenciando claramente entre el coste directo de ejecución y el valor real de mercado del producto final.</text:p>
      <text:h text:style-name="P27" text:outline-level="3"><text:bookmark-start text:name="__RefHeading___Toc2483_1385620957"/>7.1 Infraestructura y recursos tecnológicos<text:bookmark-end text:name="__RefHeading___Toc2483_1385620957"/></text:h>
      <text:p text:style-name="P40">Para mantener la viabilidad del proyecto y un impacto económico nulo en su fase de desarrollo, hemos apostado por un <text:span text:style-name="T15">stack</text:span> tecnológico basado íntegramente en software de código abierto y herramientas <text:span text:style-name="T15">cloud</text:span> gratuitas. Esto demuestra nuestra capacidad para construir soluciones robustas sin depender de licencias de alto coste.</text:p>
      <text:p text:style-name="P40"/>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0"><text:span text:style-name="Strong_20_Emphasis"><text:span text:style-name="T6">Recurso</text:span></text:span></text:p>
            </table:table-cell>
            <table:table-cell table:style-name="Tabla1.A1" office:value-type="string">
              <text:p text:style-name="P30"><text:span text:style-name="Strong_20_Emphasis"><text:span text:style-name="T6">Uso en el proyecto</text:span></text:span></text:p>
            </table:table-cell>
            <table:table-cell table:style-name="Tabla1.A1" office:value-type="string">
              <text:p text:style-name="P30"><text:span text:style-name="Strong_20_Emphasis"><text:span text:style-name="T6">Coste</text:span></text:span></text:p>
            </table:table-cell>
          </table:table-row>
        </table:table-header-rows>
        <table:table-row>
          <table:table-cell table:style-name="Tabla1.A1" office:value-type="string">
            <text:p text:style-name="P31">VS Code</text:p>
          </table:table-cell>
          <table:table-cell table:style-name="Tabla1.A1" office:value-type="string">
            <text:p text:style-name="P32">Entorno de desarrollo principal</text:p>
          </table:table-cell>
          <table:table-cell table:style-name="Tabla1.A1" office:value-type="string">
            <text:p text:style-name="P32">0 €</text:p>
          </table:table-cell>
        </table:table-row>
        <table:table-row>
          <table:table-cell table:style-name="Tabla1.A1" office:value-type="string">
            <text:p text:style-name="P31">GitHub</text:p>
          </table:table-cell>
          <table:table-cell table:style-name="Tabla1.A1" office:value-type="string">
            <text:p text:style-name="P32">Control de versiones y repositorio centralizado</text:p>
          </table:table-cell>
          <table:table-cell table:style-name="Tabla1.A1" office:value-type="string">
            <text:p text:style-name="P32">0 €</text:p>
          </table:table-cell>
        </table:table-row>
        <table:table-row>
          <table:table-cell table:style-name="Tabla1.A1" office:value-type="string">
            <text:p text:style-name="P31">XAMPP / MySQL</text:p>
          </table:table-cell>
          <table:table-cell table:style-name="Tabla1.A1" office:value-type="string">
            <text:p text:style-name="P32">Servidor local y gestión de base de datos</text:p>
          </table:table-cell>
          <table:table-cell table:style-name="Tabla1.A1" office:value-type="string">
            <text:p text:style-name="P32">0 €</text:p>
          </table:table-cell>
        </table:table-row>
        <table:table-row>
          <table:table-cell table:style-name="Tabla1.A1" office:value-type="string">
            <text:p text:style-name="P31">Postman</text:p>
          </table:table-cell>
          <table:table-cell table:style-name="Tabla1.A1" office:value-type="string">
            <text:p text:style-name="P32">Pruebas de integración y validación de la API</text:p>
          </table:table-cell>
          <table:table-cell table:style-name="Tabla1.A1" office:value-type="string">
            <text:p text:style-name="P32">0 €</text:p>
          </table:table-cell>
        </table:table-row>
        <table:table-row>
          <table:table-cell table:style-name="Tabla1.A1" office:value-type="string">
            <text:p text:style-name="P31">Trello</text:p>
          </table:table-cell>
          <table:table-cell table:style-name="Tabla1.A1" office:value-type="string">
            <text:p text:style-name="P32">Gestión de tablero Scrum y flujo de tareas</text:p>
          </table:table-cell>
          <table:table-cell table:style-name="Tabla1.A1" office:value-type="string">
            <text:p text:style-name="P32">0 €</text:p>
          </table:table-cell>
        </table:table-row>
        <table:table-row>
          <table:table-cell table:style-name="Tabla1.A1" office:value-type="string">
            <text:p text:style-name="P31">Figma / Canva</text:p>
          </table:table-cell>
          <table:table-cell table:style-name="Tabla1.A1" office:value-type="string">
            <text:p text:style-name="P32">Diseño UI/UX, prototipado y recursos visuales</text:p>
          </table:table-cell>
          <table:table-cell table:style-name="Tabla1.A1" office:value-type="string">
            <text:p text:style-name="P32">0 €</text:p>
          </table:table-cell>
        </table:table-row>
        <table:table-row>
          <table:table-cell table:style-name="Tabla1.A1" office:value-type="string">
            <text:p text:style-name="P31">Equipos propios</text:p>
          </table:table-cell>
          <table:table-cell table:style-name="Tabla1.A1" office:value-type="string">
            <text:p text:style-name="P32">Hardware de desarrollo y estaciones de trabajo</text:p>
          </table:table-cell>
          <table:table-cell table:style-name="Tabla1.A1" office:value-type="string">
            <text:p text:style-name="P32">Recurso propio</text:p>
          </table:table-cell>
        </table:table-row>
      </table:table>
      <text:h text:style-name="P27" text:outline-level="3"/>
      <text:p text:style-name="P40"/>
      <text:h text:style-name="P41" text:outline-level="3"><text:bookmark-start text:name="__RefHeading___Toc2485_1385620957"/>7.2 Valoración profesional del desarrollo<text:bookmark-end text:name="__RefHeading___Toc2485_1385620957"/></text:h>
      <text:p text:style-name="P40">Más allá de la gratuidad de las herramientas, el valor real de PacePal reside en el <text:span text:style-name="T11">capital humano</text:span>. Un proyecto de estas características, que integra análisis previo, diseño de interfaz, accesibilidad, desarrollo <text:span text:style-name="T15">full-stack</text:span> y gestión de tienda, tendría una valoración significativa en el mercado profesional.</text:p>
      <text:p text:style-name="P40">Si PacePal se tasara como un encargo para una entidad deportiva o una <text:span text:style-name="T15">startup</text:span>, el presupuesto se desglosaría principalmente en <text:span text:style-name="T11">horas de consultoría, arquitectura de sistemas y diseño de experiencia de usuario</text:span>, valorando el tiempo invertido por el equipo de Treecore Studio en transformar requisitos complejos en una solución funcional.</text:p>
      <text:h text:style-name="P27" text:outline-level="3"/>
      <text:h text:style-name="P42" text:outline-level="3"><text:bookmark-start text:name="__RefHeading___Toc2487_1385620957"/>7.3 Viabilidad y mantenimiento en entorno real<text:bookmark-end text:name="__RefHeading___Toc2487_1385620957"/></text:h>
      <text:p text:style-name="P40">Para la fase de explotación fuera del ámbito local, PacePal requiere una inversión mínima en infraestructura. Siguiendo nuestra filosofía de eficiencia, se han proyectado los siguientes costes operativos para un despliegue profesional:</text:p>
      <text:p text:style-name="P40"/>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30"><text:span text:style-name="Strong_20_Emphasis"><text:span text:style-name="T6">Elemento</text:span></text:span></text:p>
            </table:table-cell>
            <table:table-cell table:style-name="Tabla3.A1" office:value-type="string">
              <text:p text:style-name="P30"><text:span text:style-name="Strong_20_Emphasis"><text:span text:style-name="T6">Estimación orientativa</text:span></text:span></text:p>
            </table:table-cell>
            <table:table-cell table:style-name="Tabla3.A1" office:value-type="string">
              <text:p text:style-name="P30"><text:span text:style-name="Strong_20_Emphasis"><text:span text:style-name="T6">Periodicidad</text:span></text:span></text:p>
            </table:table-cell>
          </table:table-row>
        </table:table-header-rows>
        <table:table-row>
          <table:table-cell table:style-name="Tabla3.A1" office:value-type="string">
            <text:p text:style-name="P31">Dominio .es / .com</text:p>
          </table:table-cell>
          <table:table-cell table:style-name="Tabla3.A1" office:value-type="string">
            <text:p text:style-name="P32">10 € - 20 €</text:p>
          </table:table-cell>
          <table:table-cell table:style-name="Tabla3.A1" office:value-type="string">
            <text:p text:style-name="P32">Anual</text:p>
          </table:table-cell>
        </table:table-row>
        <table:table-row>
          <table:table-cell table:style-name="Tabla3.A1" office:value-type="string">
            <text:p text:style-name="P31">Hosting Profesional</text:p>
          </table:table-cell>
          <table:table-cell table:style-name="Tabla3.A1" office:value-type="string">
            <text:p text:style-name="P32"><text:span text:style-name="T17">100€ - </text:span>1<text:span text:style-name="T17">50</text:span> €</text:p>
          </table:table-cell>
          <table:table-cell table:style-name="Tabla3.A1" office:value-type="string">
            <text:p text:style-name="P32">Anual</text:p>
          </table:table-cell>
        </table:table-row>
        <table:table-row>
          <table:table-cell table:style-name="Tabla3.A1" office:value-type="string">
            <text:p text:style-name="P31">Certificado SSL</text:p>
          </table:table-cell>
          <table:table-cell table:style-name="Tabla3.A1" office:value-type="string">
            <text:p text:style-name="P32">Incluido en hosting</text:p>
          </table:table-cell>
          <table:table-cell table:style-name="Tabla3.A1" office:value-type="string">
            <text:p text:style-name="P32">—</text:p>
          </table:table-cell>
        </table:table-row>
        <table:table-row>
          <table:table-cell table:style-name="Tabla3.A1" office:value-type="string">
            <text:p text:style-name="P31">Mantenimiento Técnico</text:p>
          </table:table-cell>
          <table:table-cell table:style-name="Tabla3.A1" office:value-type="string">
            <text:p text:style-name="P32">Optimización de seguridad y soporte</text:p>
          </table:table-cell>
          <table:table-cell table:style-name="Tabla3.A1" office:value-type="string">
            <text:p text:style-name="P32">Variable</text:p>
          </table:table-cell>
        </table:table-row>
      </table:table>
      <text:p text:style-name="P40"/>
      <text:p text:style-name="P40">En conclusión, PacePal es un proyecto de <text:span text:style-name="T11">alto valor técnico y bajo coste directo</text:span>. La rigurosidad en la planificación ha permitido transformar el conocimiento técnico en un producto documentado y listo para ser escalado a un entorno de producción real sin barreras económicas de entrada.</text:p>
      <text:p text:style-name="P14"/>
      <text:h text:style-name="P13" text:outline-level="2"><text:bookmark-start text:name="__RefHeading___Toc2489_1385620957"/>8. Análisis de tendencias y competencia<text:bookmark-end text:name="__RefHeading___Toc2489_1385620957"/></text:h>
      <text:p text:style-name="P40">El diseño de <text:span text:style-name="T11">PacePal</text:span> no se planteó únicamente desde la intuición visual, sino a partir de una investigación específica sobre tendencias actuales en productos digitales de actividad física, comunidad y toma rápida de decisiones. El objetivo de <text:span text:style-name="T11">Treecore Studio</text:span> fue identificar los patrones de interfaz que mejor funcionan en el mercado para adaptarlos a una propuesta propia, acotada y coherente.</text:p>
      <text:p text:style-name="P40"/>
      <text:h text:style-name="P27" text:outline-level="3"><text:bookmark-start text:name="__RefHeading___Toc2491_1385620957"/>8.1 Análisis individual de la competencia<text:bookmark-end text:name="__RefHeading___Toc2491_1385620957"/></text:h>
      <text:p text:style-name="P40">Para la fase de investigación, seleccionamos cuatro productos de referencia. No buscábamos imitarlos, sino estudiar cómo resuelven problemas de navegación, visibilidad de datos y confianza:</text:p>
      <text:list text:style-name="L11">
        <text:list-item>
          <text:p text:style-name="P43"><text:span text:style-name="T11">Meetup:</text:span> Es la referencia en organización de eventos. Su fortaleza es una ruta de decisión directa (listado → detalle → acción). De aquí tomamos la importancia de reducir clics y diseñar tarjetas de actividad que puedan entenderse en pocos segundos. <text:span text:style-name="T18">(añadir imagen meetup-interfaz.png) </text:span></text:p>
        </text:list-item>
        <text:list-item>
          <text:p text:style-name="P43"><text:span text:style-name="T11">Strava:</text:span> Sitúa las métricas y el seguimiento en el centro, reforzando la comunidad mediante el <text:span text:style-name="T15">feedback</text:span> social. De Strava aprendimos a dar protagonismo a datos como el ritmo o el nivel, combinando señales visuales y textos breves sin saturar la interfaz.<text:span text:style-name="T18">(añadir imagen strava-interfaz.png) </text:span></text:p>
        </text:list-item>
        <text:list-item>
          <text:p text:style-name="P43"><text:span text:style-name="T11">Komoot:</text:span> Destaca por su equilibrio entre información técnica y limpieza visual en entornos <text:span text:style-name="T15">outdoor</text:span>. De su análisis extrajimos la necesidad de una ficha de detalle clara, con visuales de apoyo que tengan una función real y una lectura cómoda en exteriores. <text:span text:style-name="T18">(añadir imagen komoot-interfaz.png) </text:span></text:p>
        </text:list-item>
        <text:list-item>
          <text:p text:style-name="P44"><text:span text:style-name="T11">AllTrails:</text:span> Su punto fuerte es la calidad de sus filtros, ayudando al usuario a decidir antes de comprometerse con una ruta. De aquí tomamos la idea de que "filtrar es tan importante como buscar", aportando contexto útil sin añadir complejidad innecesaria.</text:p>
          <text:p text:style-name="P44"/>
        </text:list-item>
      </text:list>
      <text:h text:style-name="P27" text:outline-level="3"><text:bookmark-start text:name="__RefHeading___Toc2493_1385620957"/>8.2 Comparativa sintética<text:bookmark-end text:name="__RefHeading___Toc2493_1385620957"/></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header-rows>
          <table:table-row>
            <table:table-cell table:style-name="Tabla4.A1" office:value-type="string">
              <text:p text:style-name="P30"><text:span text:style-name="Strong_20_Emphasis"><text:span text:style-name="T6">Aspecto clave</text:span></text:span></text:p>
            </table:table-cell>
            <table:table-cell table:style-name="Tabla4.A1" office:value-type="string">
              <text:p text:style-name="P30"><text:span text:style-name="Strong_20_Emphasis"><text:span text:style-name="T6">Meetup</text:span></text:span></text:p>
            </table:table-cell>
            <table:table-cell table:style-name="Tabla4.A1" office:value-type="string">
              <text:p text:style-name="P30"><text:span text:style-name="Strong_20_Emphasis"><text:span text:style-name="T6">Strava</text:span></text:span></text:p>
            </table:table-cell>
            <table:table-cell table:style-name="Tabla4.A1" office:value-type="string">
              <text:p text:style-name="P30"><text:span text:style-name="Strong_20_Emphasis"><text:span text:style-name="T6">Komoot</text:span></text:span></text:p>
            </table:table-cell>
            <table:table-cell table:style-name="Tabla4.A1" office:value-type="string">
              <text:p text:style-name="P30"><text:span text:style-name="Strong_20_Emphasis"><text:span text:style-name="T6">AllTrails</text:span></text:span></text:p>
            </table:table-cell>
            <table:table-cell table:style-name="Tabla4.A1" office:value-type="string">
              <text:p text:style-name="P30"><text:span text:style-name="Strong_20_Emphasis"><text:span text:style-name="T6">PacePal (Objetivo)</text:span></text:span></text:p>
            </table:table-cell>
          </table:table-row>
        </table:table-header-rows>
        <table:table-row>
          <table:table-cell table:style-name="Tabla4.A1" office:value-type="string">
            <text:p text:style-name="P32">Flujo rápido para unirse</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2">Parcial</text:p>
          </table:table-cell>
          <table:table-cell table:style-name="Tabla4.A1" office:value-type="string">
            <text:p text:style-name="P32">Parcial</text:p>
          </table:table-cell>
          <table:table-cell table:style-name="Tabla4.A1" office:value-type="string">
            <text:p text:style-name="P31">Sí</text:p>
          </table:table-cell>
        </table:table-row>
        <table:table-row>
          <table:table-cell table:style-name="Tabla4.A1" office:value-type="string">
            <text:p text:style-name="P32">Métricas claras</text:p>
          </table:table-cell>
          <table:table-cell table:style-name="Tabla4.A1" office:value-type="string">
            <text:p text:style-name="P32">Parcial</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1">Sí</text:p>
          </table:table-cell>
        </table:table-row>
        <table:table-row>
          <table:table-cell table:style-name="Tabla4.A1" office:value-type="string">
            <text:p text:style-name="P32">Comunidad visible</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2">Parcial</text:p>
          </table:table-cell>
          <table:table-cell table:style-name="Tabla4.A1" office:value-type="string">
            <text:p text:style-name="P32">Parcial</text:p>
          </table:table-cell>
          <table:table-cell table:style-name="Tabla4.A1" office:value-type="string">
            <text:p text:style-name="P31">Sí</text:p>
          </table:table-cell>
        </table:table-row>
        <table:table-row>
          <table:table-cell table:style-name="Tabla4.A1" office:value-type="string">
            <text:p text:style-name="P32">Filtros robustos</text:p>
          </table:table-cell>
          <table:table-cell table:style-name="Tabla4.A1" office:value-type="string">
            <text:p text:style-name="P32">Parcial</text:p>
          </table:table-cell>
          <table:table-cell table:style-name="Tabla4.A1" office:value-type="string">
            <text:p text:style-name="P32">Parcial</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1">Sí</text:p>
          </table:table-cell>
        </table:table-row>
        <table:table-row>
          <table:table-cell table:style-name="Tabla4.A1" office:value-type="string">
            <text:p text:style-name="P32">Diseño limpio</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2">Sí</text:p>
          </table:table-cell>
          <table:table-cell table:style-name="Tabla4.A1" office:value-type="string">
            <text:p text:style-name="P31">Sí</text:p>
          </table:table-cell>
        </table:table-row>
      </table:table>
      <text:h text:style-name="P27" text:outline-level="3"><text:bookmark-start text:name="__RefHeading___Toc2495_1385620957"/><text:soft-page-break/>8.3 Tendencias de diseño aplicables (2025-2026)<text:bookmark-end text:name="__RefHeading___Toc2495_1385620957"/></text:h>
      <text:p text:style-name="P40">A partir del análisis, identificamos varias líneas maestras para el proyecto:</text:p>
      <text:list text:style-name="L12">
        <text:list-item>
          <text:p text:style-name="P45"><text:span text:style-name="T11">Minimalismo funcional:</text:span> Reducción del ruido visual para reforzar la jerarquía de la información.</text:p>
        </text:list-item>
        <text:list-item>
          <text:p text:style-name="P45"><text:span text:style-name="T11">Diseño centrado en datos:</text:span> Prioridad a la distancia, ritmo, plazas y dificultad frente a textos largos.</text:p>
        </text:list-item>
        <text:list-item>
          <text:p text:style-name="P45"><text:span text:style-name="T11">Mobile First real:</text:span> Flujos verticales, acciones táctiles claras y filtros progresivos adaptados a dispositivos pequeños.</text:p>
        </text:list-item>
        <text:list-item>
          <text:p text:style-name="P45"><text:span text:style-name="T11">Accesibilidad integrada:</text:span> Condición de calidad desde el diseño (contraste, foco visible y semántica correcta).</text:p>
          <text:p text:style-name="P45"/>
        </text:list-item>
      </text:list>
      <text:h text:style-name="P27" text:outline-level="3"><text:bookmark-start text:name="__RefHeading___Toc2497_1385620957"/>8.4 Decisiones estratégicas para PacePal<text:bookmark-end text:name="__RefHeading___Toc2497_1385620957"/></text:h>
      <text:p text:style-name="P40">La principal conclusión es que en PacePal debe haber <text:span text:style-name="T11">menos ruido y más capacidad de decisión</text:span>. Hemos decidido priorizar tarjetas limpias con datos esenciales, mantener una navegación directa y evitar la complejidad de las plataformas globales.</text:p>
      <text:p text:style-name="P40">PacePal no pretende ser una red social deportiva completa ni un sistema avanzado de métricas; su objetivo es ayudar a que una persona sepa rápidamente si una actividad encaja con ella. El diseño resultante no responde solo a preferencias estéticas, sino a una observación razonada de cómo se organiza la confianza en los productos digitales actuales.</text:p>
      <text:p text:style-name="P14"/>
      <text:p text:style-name="P14"/>
      <text:h text:style-name="P13" text:outline-level="2"><text:bookmark-start text:name="__RefHeading___Toc2499_1385620957"/><text:span text:style-name="T19">9</text:span>. Público objetivo<text:bookmark-end text:name="__RefHeading___Toc2499_1385620957"/></text:h>
      <text:p text:style-name="P40">El diseño de <text:span text:style-name="T11">PacePal</text:span> no se basa en una idea abstracta de "usuario deportista", sino en el análisis de personas con necesidades, miedos y objetivos específicos. El público objetivo de la plataforma está compuesto por personas mayores de 18 años que buscan mejorar su bienestar, pero que encuentran en la soledad o en la falta de organización un obstáculo para mantener la constancia.</text:p>
      <text:h text:style-name="P27" text:outline-level="3"><text:bookmark-start text:name="__RefHeading___Toc2501_1385620957"/><text:span text:style-name="T19">9</text:span>.1 Mapa de empatía: ¿Quién es nuestro usuario?<text:bookmark-end text:name="__RefHeading___Toc2501_1385620957"/></text:h>
      <text:p text:style-name="P40">Para entender a quién nos dirigimos, hemos sintetizado los sentimientos y comportamientos comunes detectados en nuestra fase de investigación:</text:p>
      <text:list text:style-name="L13">
        <text:list-item>
          <text:p text:style-name="P46"><text:span text:style-name="T11">Qué piensa y siente:</text:span> Desea mejorar su estado físico y mental, pero teme el fracaso o no ser capaz de mantener la rutina por falta de tiempo.</text:p>
        </text:list-item>
        <text:list-item>
          <text:p text:style-name="P46"><text:span text:style-name="T11">Qué ve:</text:span> Un entorno saturado de retos de alto rendimiento en redes sociales que a menudo le resultan intimidantes o poco realistas para su nivel.</text:p>
        </text:list-item>
        <text:list-item>
          <text:p text:style-name="P46"><text:span text:style-name="T11">Dolores:</text:span> La desmotivación al entrenar en solitario y la incertidumbre de no saber si el ritmo del grupo será adecuado para él.</text:p>
        </text:list-item>
        <text:list-item>
          <text:p text:style-name="P46"><text:span text:style-name="T11">Ganancias:</text:span> Sentir orgullo por los pequeños logros y generar conexiones reales con gente afín en un entorno seguro.</text:p>
        </text:list-item>
      </text:list>
      <text:h text:style-name="P27" text:outline-level="3"/>
      <text:h text:style-name="P27" text:outline-level="3"><text:bookmark-start text:name="__RefHeading___Toc2503_1385620957"/><text:span text:style-name="T19">9</text:span>.2 Arquetipos de usuario (Resumen de perfiles)<text:bookmark-end text:name="__RefHeading___Toc2503_1385620957"/></text:h>
      <text:p text:style-name="P40">A continuación, se presenta la tabla-resumen con los cuatro perfiles clave que han guiado las decisiones de diseño y funcionalidad de <text:span text:style-name="T11">Treecore Studio</text:span>:</text:p>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0"><text:span text:style-name="Strong_20_Emphasis"><text:span text:style-name="T6">Perfil / Arquetipo</text:span></text:span></text:p>
            </table:table-cell>
            <table:table-cell table:style-name="Tabla5.A1" office:value-type="string">
              <text:p text:style-name="P30"><text:span text:style-name="Strong_20_Emphasis"><text:span text:style-name="T6">Rol de Usuario</text:span></text:span></text:p>
            </table:table-cell>
            <table:table-cell table:style-name="Tabla5.A1" office:value-type="string">
              <text:p text:style-name="P30"><text:span text:style-name="Strong_20_Emphasis"><text:span text:style-name="T6">Dolor Principal</text:span></text:span></text:p>
            </table:table-cell>
            <table:table-cell table:style-name="Tabla5.A1" office:value-type="string">
              <text:p text:style-name="P30"><text:span text:style-name="Strong_20_Emphasis"><text:span text:style-name="T6">Qué busca en PacePal</text:span></text:span></text:p>
            </table:table-cell>
          </table:table-row>
        </table:table-header-rows>
        <table:table-row>
          <table:table-cell table:style-name="Tabla5.A1" office:value-type="string">
            <text:p text:style-name="P31">Álvaro Gómez (25)</text:p>
          </table:table-cell>
          <table:table-cell table:style-name="Tabla5.A1" office:value-type="string">
            <text:p text:style-name="P32">Principiante sedentario</text:p>
          </table:table-cell>
          <table:table-cell table:style-name="Tabla5.A1" office:value-type="string">
            <text:p text:style-name="P32">Miedo al juicio y falta de motivación.</text:p>
          </table:table-cell>
          <table:table-cell table:style-name="Tabla5.A1" office:value-type="string">
            <text:p text:style-name="P32">Grupos de nivel <text:span text:style-name="T11">Novato</text:span> y apoyo social para no abandonar.</text:p>
          </table:table-cell>
        </table:table-row>
        <table:table-row>
          <table:table-cell table:style-name="Tabla5.A1" office:value-type="string">
            <text:p text:style-name="P31">Javier Ruiz (54)</text:p>
          </table:table-cell>
          <table:table-cell table:style-name="Tabla5.A1" office:value-type="string">
            <text:p text:style-name="P32">Retomador prudente</text:p>
          </table:table-cell>
          <table:table-cell table:style-name="Tabla5.A1" office:value-type="string">
            <text:p text:style-name="P32">Miedo a lesiones y a no "dar la talla".</text:p>
          </table:table-cell>
          <table:table-cell table:style-name="Tabla5.A1" office:value-type="string">
            <text:p text:style-name="P32"><text:span text:style-name="T11">Seguridad</text:span> en el ritmo y rutas con datos técnicos validados.</text:p>
          </table:table-cell>
        </table:table-row>
        <table:table-row>
          <table:table-cell table:style-name="Tabla5.A1" office:value-type="string">
            <text:p text:style-name="P31">Laura Prieto (38)</text:p>
          </table:table-cell>
          <table:table-cell table:style-name="Tabla5.A1" office:value-type="string">
            <text:p text:style-name="P32">Profesional exigente</text:p>
          </table:table-cell>
          <table:table-cell table:style-name="Tabla5.A1" office:value-type="string">
            <text:p text:style-name="P32">Falta de tiempo y niveles de estrés altos.</text:p>
          </table:table-cell>
          <table:table-cell table:style-name="Tabla5.A1" office:value-type="string">
            <text:p text:style-name="P32"><text:span text:style-name="T11">Rapidez</text:span> para encontrar actividades cercanas y desconexión.</text:p>
          </table:table-cell>
        </table:table-row>
        <table:table-row>
          <table:table-cell table:style-name="Tabla5.A1" office:value-type="string">
            <text:p text:style-name="P31">Jazmín Jafar (18)</text:p>
          </table:table-cell>
          <table:table-cell table:style-name="Tabla5.A1" office:value-type="string">
            <text:p text:style-name="P32">Estudiante creativa</text:p>
          </table:table-cell>
          <table:table-cell table:style-name="Tabla5.A1" office:value-type="string">
            <text:p text:style-name="P32">Poca experiencia y falta de contenido motivador.</text:p>
          </table:table-cell>
          <table:table-cell table:style-name="Tabla5.A1" office:value-type="string">
            <text:p text:style-name="P32">Rutas atractivas <text:span text:style-name="T20">con</text:span> puntos ecológicos.</text:p>
          </table:table-cell>
        </table:table-row>
      </table:table>
      <text:h text:style-name="P27" text:outline-level="3"><text:bookmark-start text:name="__RefHeading___Toc2505_1385620957"/><text:soft-page-break/><text:span text:style-name="T19">9</text:span>.3 Alineación de necesidades<text:bookmark-end text:name="__RefHeading___Toc2505_1385620957"/></text:h>
      <text:p text:style-name="P40">Este desglose demuestra que el público de PacePal no busca necesariamente competir, sino <text:span text:style-name="T11">pertenecer</text:span>. Al segmentar por niveles y ritmos reales, aseguramos que perfiles tan distintos como el de Álvaro o el de Laura encuentren su lugar en la comunidad.</text:p>
      <text:p text:style-name="P40">Nuestra plataforma resuelve la fricción entre la intención y la acción, transformando el deporte en una experiencia compartida, predecible y, sobre todo, humana.</text:p>
      <text:p text:style-name="P14"/>
      <text:h text:style-name="P13" text:outline-level="2"><text:bookmark-start text:name="__RefHeading___Toc2507_1385620957"/><text:span text:style-name="T19">10</text:span>. Propuesta de valor y enfoque del producto<text:bookmark-end text:name="__RefHeading___Toc2507_1385620957"/></text:h>
      <text:p text:style-name="P14">La propuesta de valor de <text:span text:style-name="T11">PacePal</text:span> consiste en ofrecer una forma clara, ordenada y confiable de practicar actividad física en grupo. Mientras otras plataformas se centran en el rendimiento individual o en la exploración libre de rutas, PacePal resuelve una necesidad humana específica: <text:span text:style-name="T11">eliminar la incertidumbre</text:span> de no saber si una actividad encajará con el nivel, el ritmo y la situación personal del usuario.</text:p>
      <text:h text:style-name="P18" text:outline-level="3"><text:bookmark-start text:name="__RefHeading___Toc2509_1385620957"/><text:span text:style-name="T19">10</text:span>.1 El diferencial estratégico: Rutas controladas<text:bookmark-end text:name="__RefHeading___Toc2509_1385620957"/></text:h>
      <text:p text:style-name="P14">A diferencia de la competencia, PacePal parte de una decisión estructural crítica: las rutas son activos fijos en la base de datos y no pueden ser creadas libremente por los usuarios. Esta decisión es el pilar de nuestra calidad informativa, ya que permite:</text:p>
      <text:list text:style-name="L14">
        <text:list-item>
          <text:p text:style-name="P47"><text:span text:style-name="T11">Eliminar la ambigüedad:</text:span> El usuario sabe exactamente qué terreno pisará, sin errores de trazado.</text:p>
        </text:list-item>
        <text:list-item>
          <text:p text:style-name="P47"><text:span text:style-name="T11">Comparabilidad real:</text:span> Las actividades son comparables entre sí al basarse en parámetros estandarizados de distancia y dificultad.</text:p>
        </text:list-item>
        <text:list-item>
          <text:p text:style-name="P47"><text:span text:style-name="T11">Foco en lo social:</text:span> Al no tener que "inventar" el recorrido, el creador de la actividad puede centrarse en definir el punto de encuentro, el ritmo y las normas de convivencia.</text:p>
        </text:list-item>
      </text:list>
      <text:h text:style-name="P18" text:outline-level="3"><text:bookmark-start text:name="__RefHeading___Toc2511_1385620957"/><text:span text:style-name="T19">10</text:span>.2 Los tres pilares de PacePal<text:bookmark-end text:name="__RefHeading___Toc2511_1385620957"/></text:h>
      <text:p text:style-name="P14">Nuestra propuesta se sostiene sobre tres ejes fundamentales que guían tanto el diseño de la interfaz como la lógica del código:</text:p>
      <text:list text:style-name="L15">
        <text:list-item>
          <text:p text:style-name="P48"><text:span text:style-name="T11">Compatibilidad garantizada:</text:span> El sistema de niveles (Novato, Intermedio, Avanzado) y ritmos (Suave, Medio, Rápido) asegura que los grupos sean coherentes. Esto reduce drásticamente la frustración y el abandono deportivo.</text:p>
        </text:list-item>
        <text:list-item>
          <text:p text:style-name="P48"><text:span text:style-name="T11">Seguridad y Convivencia:</text:span> No solo reunimos personas; lo hacemos en un entorno protegido. El registro mediante DNI y el sistema de reportes y avisos moderados por la administración aportan una capa de seriedad indispensable para los encuentros presenciales.</text:p>
        </text:list-item>
        <text:list-item>
          <text:p text:style-name="P48"><text:span text:style-name="T11">Sostenibilidad Integrada:</text:span> Conectamos la salud física con la responsabilidad ambiental. A través de la tienda de productos sostenibles (como la línea de materiales reciclados proyectada con Nike), el usuario percibe PacePal como una plataforma alineada con los valores actuales de consumo responsable.</text:p>
        </text:list-item>
      </text:list>
      <text:h text:style-name="P18" text:outline-level="3"/>
      <text:h text:style-name="P49" text:outline-level="3"><text:bookmark-start text:name="__RefHeading___Toc2513_1385620957"/><text:span text:style-name="T19">10</text:span>.3 Enfoque de negocio y posicionamiento<text:bookmark-end text:name="__RefHeading___Toc2513_1385620957"/></text:h>
      <text:p text:style-name="P14">PacePal ocupa un espacio vacío en el mercado: el de la <text:span text:style-name="T11">comunidad deportiva organizada</text:span>. Donde otras apps ven métricas y GPS, nosotros vemos personas y hábitos. Nuestra estrategia se divide en dos fases:</text:p>
      <text:list text:style-name="L16">
        <text:list-item>
          <text:p text:style-name="P50"><text:span text:style-name="T11">Fase 1: Cohesión Comunitaria.</text:span> Establecer una base de usuarios que confíen en la predictibilidad de nuestras rutas y actividades.</text:p>
        </text:list-item>
        <text:list-item>
          <text:p text:style-name="P50"><text:span text:style-name="T11">Fase 2: Ecosistema Sostenible.</text:span> Ampliar el valor mediante el sistema de recompensas ecológicas y el e-commerce circular, transformando el ejercicio físico en un impacto positivo para el planeta.</text:p>
        </text:list-item>
      </text:list>
      <text:p text:style-name="P14">En definitiva, la propuesta de valor de PacePal no es "tener una web de actividades", sino construir un entorno donde nadie entrene solo, los grupos sean compatibles y cada kilómetro recorrido tenga un sentido social y ambiental.</text:p>
      <text:p text:style-name="P14"/>
      <text:h text:style-name="P13" text:outline-level="2"><text:bookmark-start text:name="__RefHeading___Toc2515_1385620957"/>11. Sprint 0 · Definición, arranque y organización del proyecto<text:bookmark-end text:name="__RefHeading___Toc2515_1385620957"/></text:h>
      <text:p text:style-name="P51"/>
      <text:p text:style-name="P51">El <text:span text:style-name="T11">Sprint 0</text:span> de PacePal se planteó como una fase de preparación estratégica y técnica indispensable. Antes de iniciar el desarrollo visual y funcional, el equipo delimitó los límites del proyecto, la estructura de trabajo y las reglas básicas que sostienen el carácter intermodular de la aplicación. El objetivo fue arrancar con una base clara, ordenar la documentación y asegurar que el repositorio, el backlog y el sistema de evidencias quedaran operativos desde el primer momento.</text:p>
      <text:p text:style-name="P51"/>
      <text:h text:style-name="P18" text:outline-level="3"><text:bookmark-start text:name="__RefHeading___Toc2517_1385620957"/>11.1 Definición y alcance del Producto Mínimo Viable (MVP)<text:bookmark-end text:name="__RefHeading___Toc2517_1385620957"/></text:h>
      <text:p text:style-name="P14">Durante esta fase, consolidamos la identidad de PacePal como una aplicación web para crear y unirse a actividades grupales sobre <text:span text:style-name="T11">rutas predefinidas</text:span>, descartando la creación libre de trazados por parte de los usuarios para garantizar la calidad del dato.</text:p>
      <text:p text:style-name="P14"><text:span text:style-name="T6">Las decisiones de negocio quedaron asentadas en el documento </text:span><text:span text:style-name="Source_20_Text"><text:span text:style-name="T6">01-definicion-proyecto</text:span></text:span><text:span text:style-name="T6"> y las notas de </text:span><text:span text:style-name="Source_20_Text"><text:span text:style-name="T6">03-notas-sprint0</text:span></text:span><text:span text:style-name="T6">:</text:span></text:p>
      <text:list text:style-name="L17">
        <text:list-item>
          <text:p text:style-name="P52"><text:span text:style-name="T11">Lógica de actividad:</text:span> Segmentación por niveles (Novato, Intermedio, Avanzado) y ritmos.</text:p>
        </text:list-item>
        <text:list-item>
          <text:p text:style-name="P52"><text:span text:style-name="T11">Protocolo de seguridad:</text:span> Registro obligatorio con DNI, sistema de reportes y avisos.</text:p>
        </text:list-item>
        <text:list-item>
          <text:p text:style-name="P52"><text:span text:style-name="T11">Ecosistema sostenible:</text:span> Integración conceptual de la tienda de productos reciclados y el carrito de compra.</text:p>
          <text:p text:style-name="P52"/>
        </text:list-item>
      </text:list>
      <text:h text:style-name="P18" text:outline-level="3"><text:bookmark-start text:name="__RefHeading___Toc2519_1385620957"/>11.2 Estructura documental y metodológica<text:bookmark-end text:name="__RefHeading___Toc2519_1385620957"/></text:h>
      <text:p text:style-name="P14"><text:span text:style-name="T6">Uno de los resultados más importantes del Sprint 0 fue la creación del núcleo de referencia técnica del proyecto. Se completaron y normalizaron los documentos base: el </text:span><text:span text:style-name="T16">Scrum Base</text:span><text:span text:style-name="T6"> (</text:span><text:span text:style-name="Source_20_Text"><text:span text:style-name="T6">01-scrum-base</text:span></text:span><text:span text:style-name="T6">) y el </text:span><text:span text:style-name="T16">Backlog de Historias de Usuario </text:span><text:span text:style-name="T6"><text:s/>(</text:span><text:span text:style-name="Source_20_Text"><text:span text:style-name="T6">02-historias-usuario-v1</text:span></text:span><text:span text:style-name="T6">).</text:span></text:p>
      <text:p text:style-name="P14">Este backlog inicial no es una simple lista de ideas, sino una hoja de ruta con 30 historias redactadas bajo el estándar "Como/Quiero/Para", que incluyen:</text:p>
      <text:list text:style-name="L18">
        <text:list-item>
          <text:p text:style-name="P53"><text:span text:style-name="T11">Estimación por complejidad:</text:span> Utilizando la serie Fibonacci (1, 2, 3, 5, 8).</text:p>
          <text:p text:style-name="P53"><text:span text:style-name="T21">**</text:span><text:span text:style-name="T22">Usamos Fibonacci porque cuanto más compleja es una tarea, más imprevistos y problemas secundarios se van sumando. No es solo que sea más larga, es que los posibles fallos crecen como una bola de nieve; por eso los saltos de la serie (5, 8...) nos sirven para cubrir ese margen de error ante los líos que siempre aparecen al complicarse el código.</text:span><draw:frame draw:style-name="fr2" draw:name="Marco1" text:anchor-type="char" svg:x="0cm" svg:width="0.041cm" draw:z-index="1"><draw:text-box fo:min-height="0.041cm"><text:h text:style-name="P54" text:outline-level="2"><text:bookmark-start text:name="__RefHeading___Toc2437_1385620957"/>Gemini ha dicho<text:bookmark-end text:name="__RefHeading___Toc2437_1385620957"/></text:h></draw:text-box></draw:frame></text:p>
        </text:list-item>
        <text:list-item>
          <text:p text:style-name="P53"><text:span text:style-name="T11">Priorización:</text:span> Clasificación en Alta, Media y Baja para asegurar la entrega del núcleo funcional.</text:p>
        </text:list-item>
        <text:list-item>
          <text:p text:style-name="P53"><text:span text:style-name="T11">Criterios de validación:</text:span> Reglas que definen cuándo una tarea se considera terminada.</text:p>
        </text:list-item>
      </text:list>
      <text:h text:style-name="P18" text:outline-level="3"/>
      <text:h text:style-name="P49" text:outline-level="3"><text:bookmark-start text:name="__RefHeading___Toc2521_1385620957"/>11.3 Gestión de evidencias y trazabilidad inicial<text:bookmark-end text:name="__RefHeading___Toc2521_1385620957"/></text:h>
      <text:p text:style-name="P14"><text:span text:style-name="T6">El documento de </text:span><text:span text:style-name="T16">Scrum Base</text:span><text:span text:style-name="T6"> fijó desde el inicio que cada avance debe dejar un rastro verificable. Organizamos el sistema de evidencias en la ruta </text:span><text:span text:style-name="Source_20_Text"><text:span text:style-name="T6">/docs/evidencias/</text:span></text:span><text:span text:style-name="T6">, dividiéndolo en bloques: gestión, interfaz, cliente, servidor, despliegue y sostenibilidad.</text:span></text:p>
      <text:p text:style-name="P14">En este sprint ya se capturaron las primeras evidencias críticas:</text:p>
      <text:list text:style-name="L19">
        <text:list-item>
          <text:p text:style-name="P55"><text:span text:style-name="T11">Tablero Trello:</text:span> Estado inicial de las tarjetas y organización de flujos.</text:p>
        </text:list-item>
        <text:list-item>
          <text:p text:style-name="P55"><text:span text:style-name="T11">Árbol del proyecto:</text:span> Estructura de carpetas limpia y coherente para un desarrollo intermodular.</text:p>
        </text:list-item>
        <text:list-item>
          <text:p text:style-name="P55"><text:span text:style-name="T11">Historial de Git:</text:span> Registro de los primeros <text:span text:style-name="T15">commits</text:span> de configuración.</text:p>
          <text:p text:style-name="P56"><text:span text:style-name="T23">**</text:span><text:span text:style-name="T24">Aunque tuvimos que crear un nuevo repositorio por una corrupción irreversible en el árbol de objetos (Git object tree corruption) que bloqueó la sincronización. Realizamos un hard reset para proteger la integridad del código y asegurar un historial estable y profesional. Esta medida eliminó errores de infraestructura ajenos al desarrollo, permitiendo al equipo avanzar con seguridad.</text:span> </text:p>
          <text:p text:style-name="P55"/>
        </text:list-item>
      </text:list>
      <text:h text:style-name="P18" text:outline-level="3"><text:bookmark-start text:name="__RefHeading___Toc2523_1385620957"/>11.4 Resolución de bloqueos técnicos y cierre del sprint<text:bookmark-end text:name="__RefHeading___Toc2523_1385620957"/></text:h>
      <text:p text:style-name="P14"><text:span text:style-name="T6">El Sprint 0 también permitió detectar y corregir incidencias de infraestructura. Se documentó y resolvió el problema derivado de tener el repositorio vinculado erróneamente a la carpeta raíz de </text:span><text:span text:style-name="Source_20_Text"><text:span text:style-name="T6">htdocs</text:span></text:span><text:span text:style-name="T6">, lo que causaba desorden en el versionado. Asimismo, se realizó una limpieza de archivos de relleno (</text:span><text:span text:style-name="Source_20_Text"><text:span text:style-name="T6">.gitkeep</text:span></text:span><text:span text:style-name="T6">) para dejar una estructura de contenido real.</text:span></text:p>
      <text:p text:style-name="P14"><text:span text:style-name="T6">Como cierre del sprint, PacePal quedó listo para la fase de diseño: la estructura base (</text:span><text:span text:style-name="Source_20_Text"><text:span text:style-name="T6">index</text:span></text:span><text:span text:style-name="T6">, </text:span><text:span text:style-name="Source_20_Text"><text:span text:style-name="T6">css</text:span></text:span><text:span text:style-name="T6">, </text:span><text:span text:style-name="Source_20_Text"><text:span text:style-name="T6">js</text:span></text:span><text:span text:style-name="T6">, </text:span><text:span text:style-name="Source_20_Text"><text:span text:style-name="T6">img</text:span></text:span><text:span text:style-name="T6">) quedó configurada y el backlog v1 se transformó en tarjetas ejecutables en el tablero Kanban.</text:span></text:p>
      <text:p text:style-name="P14"/>
      <text:h text:style-name="P57" text:outline-level="2"/>
      <text:h text:style-name="P58" text:outline-level="2"><text:bookmark-start text:name="__RefHeading___Toc2525_1385620957"/>1<text:span text:style-name="T25">2</text:span>. Sprint DIW · Diseño de interfaz, prototipos y guía de estilos<text:bookmark-end text:name="__RefHeading___Toc2525_1385620957"/></text:h>
      <text:p text:style-name="P14">El <text:span text:style-name="T11">Sprint 1 de DIW</text:span> tuvo como objetivo definir la identidad visual de PacePal y establecer la estructura de interfaz del producto antes de avanzar hacia la implementación funcional. Esta fase no se centró únicamente en el aspecto estético, sino en crear una base visual coherente con los requisitos del proyecto y las historias de usuario, permitiendo que cualquier pantalla de la aplicación pueda entenderse rápidamente y facilite la interacción del usuario.</text:p>
      <text:p text:style-name="P14">El objetivo principal fue establecer una base de diseño sólida que permitiera que el desarrollo posterior (<text:span text:style-name="T11">DWEC y DWES</text:span>) se apoyara sobre una interfaz previamente definida y documentada, evitando improvisaciones durante la fase de programación.</text:p>
      <text:h text:style-name="P18" text:outline-level="3"><text:bookmark-start text:name="__RefHeading___Toc2527_1385620957"/>1<text:span text:style-name="T25">2</text:span>.1 Investigación de tendencias y análisis de competencia<text:bookmark-end text:name="__RefHeading___Toc2527_1385620957"/></text:h>
      <text:p text:style-name="P14">El primer paso consistió en analizar tendencias actuales y realizar un <text:span text:style-name="T15">benchmarking</text:span> de plataformas líderes como <text:span text:style-name="T11">Meetup, Strava y Komoot</text:span>. Este análisis permitió identificar patrones de éxito que posteriormente se aplicaron a PacePal:</text:p>
      <text:list text:style-name="L20">
        <text:list-item>
          <text:p text:style-name="P59"><text:span text:style-name="T11">Interfaces limpias:</text:span> Priorización de la jerarquía visual para reducir la carga cognitiva.</text:p>
        </text:list-item>
        <text:list-item>
          <text:p text:style-name="P59"><text:span text:style-name="T11">Tarjetas de contenido:</text:span> Uso de <text:span text:style-name="T15">cards</text:span> para presentar actividades de forma compacta y escaneable.</text:p>
        </text:list-item>
        <text:list-item>
          <text:p text:style-name="P59"><text:span text:style-name="T11">Enfoque Mobile-First:</text:span> Entendiendo que el usuario consultará rutas y actividades principalmente desde su dispositivo móvil mientras se desplaza.</text:p>
        </text:list-item>
        <text:list-item>
          <text:p text:style-name="P59"><text:span text:style-name="T11">CTAs Orientados a la Acción:</text:span> Uso de llamadas a la acción claras para guiar el flujo de usuario.</text:p>
        </text:list-item>
      </text:list>
      <text:h text:style-name="P18" text:outline-level="3"><text:bookmark-start text:name="__RefHeading___Toc2529_1385620957"/>1<text:span text:style-name="T25">2</text:span>.2 Identidad visual y guía de estilos (03-guia-estilos.pdf)<text:bookmark-end text:name="__RefHeading___Toc2529_1385620957"/></text:h>
      <text:p text:style-name="P14">Uno de los resultados más importantes fue la creación de una <text:span text:style-name="T11">Guía de Estilos independiente</text:span>, que actúa como la "ley visual" del proyecto.</text:p>
      <text:list text:style-name="L21">
        <text:list-item>
          <text:p text:style-name="P60"><text:span text:style-name="T11">Paleta Cromática (Regla 60-30-10):</text:span> Basada en la naturaleza y la sostenibilidad.</text:p>
          <text:list>
            <text:list-item>
              <text:p text:style-name="P60"><text:span text:style-name="T11">Verde Oscuro (#2A400A):</text:span> Aporta solidez y profundidad (60% de la interfaz).</text:p>
            </text:list-item>
            <text:list-item>
              <text:p text:style-name="P60"><text:span text:style-name="T11">Verde Acento (#A1F227):</text:span> Tono vibrante reservado para botones de acción y elementos críticos (10%).</text:p>
            </text:list-item>
            <text:list-item>
              <text:p text:style-name="P60"><text:span text:style-name="T11">Verde Intermedio (#5D8C16):</text:span> Para suavizar transiciones y equilibrar la composición (30%).</text:p>
            </text:list-item>
            <text:list-item>
              <text:p text:style-name="P60"><text:span text:style-name="T11">Neutros:</text:span> Gris oscuro (#1E1E1E) para texto principal y gris claro (#D9DFD2) para fondos y separadores.</text:p>
            </text:list-item>
          </text:list>
        </text:list-item>
        <text:list-item>
          <text:p text:style-name="P60"><text:span text:style-name="T11">Tipografía:</text:span> La fuente principal es <text:span text:style-name="T11">Inter</text:span>, elegida por su limpieza visual y legibilidad en entornos digitales. Se definió una jerarquía estricta (H1 a H3) para facilitar el escaneo rápido de datos técnicos.</text:p>
        </text:list-item>
        <text:list-item>
          <text:p text:style-name="P60"><text:soft-page-break/><text:span text:style-name="T11">Iconografía:</text:span> Implementación de <text:span text:style-name="T11">Bootstrap Icons</text:span>. Los iconos (calendario, reloj, nivel, plazas) funcionan como apoyo visual, cumpliendo la norma de no sustituir nunca a la información crítica.</text:p>
        </text:list-item>
      </text:list>
      <text:h text:style-name="P18" text:outline-level="3"><text:bookmark-start text:name="__RefHeading___Toc2531_1385620957"/>1<text:span text:style-name="T25">2</text:span>.3 Wireframes y Prototipado en Figma<text:bookmark-end text:name="__RefHeading___Toc2531_1385620957"/></text:h>
      <text:p text:style-name="P61">El proceso de diseño en <text:span text:style-name="T11">Treecore Studio</text:span> no comenzó por el escritorio, sino siguiendo una estrategia <text:span text:style-name="T11">Mobile First</text:span>. Entendemos que el usuario de PacePal consultará las rutas y se unirá a actividades principalmente desde su dispositivo móvil mientras se desplaza al punto de encuentro.</text:p>
      <text:p text:style-name="P61">Por ello, el diseño se gestó en <text:span text:style-name="T11">Figma</text:span>, partiendo de estructuras de baja fidelidad (<text:span text:style-name="T15">wireframes</text:span>) para validar la jerarquía, hasta llegar a prototipos de alta fidelidad (<text:span text:style-name="T15">mockups</text:span>) que integran la guía de estilos final.</text:p>
      <text:list text:style-name="L22">
        <text:list-item>
          <text:p text:style-name="P62"><text:span text:style-name="T11">Decisiones en Figma:</text:span> Utilizamos componentes y <text:span text:style-name="T15">Auto Layout</text:span> para asegurar que elementos como los <text:span text:style-name="T11">chips de filtrado rápido</text:span> (Running, Walking, Principiante) fueran consistentes. Estos chips no son solo estéticos: son una decisión de UX para ahorrar tiempo al usuario, permitiendo filtrar el listado con un solo toque sin desplegar menús complejos.</text:p>
        </text:list-item>
        <text:list-item>
          <text:p text:style-name="P62"><text:span text:style-name="T16">Adaptación Fluida:</text:span><text:span text:style-name="T6"> Mientras que en la </text:span><text:a xlink:type="simple" xlink:href="https://www.google.com/search?q=%23anexo-desktop" office:target-frame-name="_blank" xlink:show="new" text:style-name="Internet_20_link" text:visited-style-name="Visited_20_Internet_20_Link"><text:span text:style-name="T16">Vista de Escritorio</text:span></text:a><text:span text:style-name="T26">(falta añadir imagen al final y pulsar para ir)</text:span><text:span text:style-name="T6"> priorizamos una lectura amplia y el uso de espacios laterales para el descanso visual, en la </text:span><text:a xlink:type="simple" xlink:href="https://www.google.com/search?q=%23anexo-mobile" office:target-frame-name="_blank" xlink:show="new" text:style-name="Internet_20_link" text:visited-style-name="Visited_20_Internet_20_Link"><text:span text:style-name="T16">Vista Móvil</text:span></text:a><text:span text:style-name="T6"> </text:span><text:span text:style-name="T26">(falta añadir imagen al final y pulsar para ir)</text:span><text:span text:style-name="T6"> <text:s/>reorganizamos el contenido en un solo eje vertical, aumentando el tamaño de las zonas táctiles de los botones para mejorar la usabilidad </text:span><text:span text:style-name="T27">on-the-go</text:span><text:span text:style-name="T6">.</text:span></text:p>
        </text:list-item>
      </text:list>
      <text:h text:style-name="P18" text:outline-level="3"><text:bookmark-start text:name="__RefHeading___Toc2533_1385620957"/>1<text:span text:style-name="T25">2</text:span>.4 Boceto Final y Estructura de la Landing Page<text:bookmark-end text:name="__RefHeading___Toc2533_1385620957"/></text:h>
      <text:p text:style-name="P14"><text:span text:style-name="T6">El boceto final (</text:span><text:span text:style-name="Source_20_Text"><text:span text:style-name="T6">04-boceto-final.md</text:span></text:span><text:span text:style-name="T6">) surge de simplificar una propuesta inicial excesivamente densa. La estructura se organizó en una secuencia progresiva:</text:span></text:p>
      <text:list text:style-name="L23">
        <text:list-item>
          <text:p text:style-name="P63"><text:span text:style-name="T11">Header y Hero:</text:span> Con el mensaje central <text:span text:style-name="T15">"Muévete mejor acompañado"</text:span>. Se tomó la decisión de UX de cambiar el CTA "Únete" por <text:span text:style-name="T11">"Ver actividades"</text:span>, una invitación menos agresiva que reduce la fricción de entrada.</text:p>
        </text:list-item>
        <text:list-item>
          <text:p text:style-name="P63"><text:span text:style-name="T11">Actividades destacadas:</text:span> Tarjetas dinámicas que demuestran la actividad de la comunidad.</text:p>
        </text:list-item>
        <text:list-item>
          <text:p text:style-name="P63"><text:span text:style-name="T11">Tienda Sostenible y Seguridad:</text:span> Bloques que introducen el eje ecosocial y refuerzan la confianza mediante el aviso de <text:span text:style-name="T15">"Registro verificado con DNI"</text:span>.</text:p>
        </text:list-item>
        <text:list-item>
          <text:p text:style-name="P63"><text:span text:style-name="T11">CTA Final y Footer:</text:span> Cierre del flujo orientado a la conversión.</text:p>
        </text:list-item>
      </text:list>
      <text:h text:style-name="P18" text:outline-level="3"><text:bookmark-start text:name="__RefHeading___Toc2535_1385620957"/>1<text:span text:style-name="T25">2</text:span>.5 Implementación Técnica de la Landing<text:bookmark-end text:name="__RefHeading___Toc2535_1385620957"/></text:h>
      <text:p text:style-name="P14">A diferencia de un prototipo visual, este sprint culminó con la implementación real de la <text:span text:style-name="T15">landing page</text:span> utilizando <text:span text:style-name="T11">HTML5, CSS3, Bootstrap y JavaScript básico</text:span>.</text:p>
      <text:list text:style-name="L24">
        <text:list-item>
          <text:p text:style-name="P64"><text:span text:style-name="T16">Arquitectura Frontend:</text:span><text:span text:style-name="T6"> Estructura modular organizada en carpetas (</text:span><text:span text:style-name="Source_20_Text"><text:span text:style-name="T6">/css/landing/</text:span></text:span><text:span text:style-name="T6">, </text:span><text:span text:style-name="Source_20_Text"><text:span text:style-name="T6">/js/</text:span></text:span><text:span text:style-name="T6">, </text:span><text:span text:style-name="Source_20_Text"><text:span text:style-name="T6">/img/</text:span></text:span><text:span text:style-name="T6">).</text:span></text:p>
        </text:list-item>
        <text:list-item>
          <text:p text:style-name="P64"><text:soft-page-break/><text:span text:style-name="T11">Optimización Técnica:</text:span> Se realizó la conversión de imágenes a formato <text:span text:style-name="T11">WebP</text:span>, implementación de carga diferida (<text:span text:style-name="T15">lazy loading</text:span>) y mejoras de accesibilidad mediante <text:span text:style-name="T11">atributos ARIA</text:span>. Estas mejoras permitieron obtener resultados excelentes en las auditorías de <text:span text:style-name="T11">Google Lighthouse</text:span>.</text:p>
        </text:list-item>
      </text:list>
      <text:h text:style-name="P18" text:outline-level="3"><text:bookmark-start text:name="__RefHeading___Toc2537_1385620957"/>1<text:span text:style-name="T25">2</text:span>.6 Componente Clave: La Tarjeta de Actividad<text:bookmark-end text:name="__RefHeading___Toc2537_1385620957"/></text:h>
      <text:p text:style-name="P14">Definimos la <text:span text:style-name="T11">tarjeta de actividad</text:span> como la unidad visual básica de PacePal. Este componente es dinámico y adapta su comportamiento según el estado del usuario:</text:p>
      <text:list text:style-name="L25">
        <text:list-item>
          <text:p text:style-name="P65"><text:span text:style-name="T11">Perfil Invitado:</text:span> Muestra el botón <text:span text:style-name="T11">"Ver actividad"</text:span>, incentivando la exploración.</text:p>
        </text:list-item>
        <text:list-item>
          <text:p text:style-name="P65"><text:span text:style-name="T11">Perfil Autenticado:</text:span> La interfaz se vuelve operativa y el botón cambia a <text:span text:style-name="T11">"Unirme"</text:span>, permitiendo la participación inmediata con un solo clic.</text:p>
        </text:list-item>
      </text:list>
      <text:h text:style-name="P18" text:outline-level="3"><text:bookmark-start text:name="__RefHeading___Toc2539_1385620957"/>1<text:span text:style-name="T25">2</text:span>.7 Resultado del Sprint DIW<text:bookmark-end text:name="__RefHeading___Toc2539_1385620957"/></text:h>
      <text:p text:style-name="P14">Al finalizar este sprint, PacePal cuenta con una identidad visual definida, una guía de estilos documentada y una landing page funcional y responsive. Esta base sólida permitió que los módulos <text:span text:style-name="T11">DWEC y DWES</text:span> se desarrollaran sobre una estructura consolidada, garantizando un producto final profesional, coherente y accesible.</text:p>
      <text:p text:style-name="P66"/>
      <text:h text:style-name="P18" text:outline-level="3"/>
      <text:h text:style-name="P13" text:outline-level="2"><text:bookmark-start text:name="__RefHeading___Toc2541_1385620957"/>13. Sprint DIW: Accesibilidad, Responsive y Decisiones de UX<text:bookmark-end text:name="__RefHeading___Toc2541_1385620957"/></text:h>
      <text:p text:style-name="P40"/>
      <text:p text:style-name="P40">En este segundo bloque de <text:span text:style-name="T11">DIW</text:span> no solo se revisó la accesibilidad y el comportamiento responsive de la landing, sino que también se amplió el diseño al conjunto de páginas principales del sitio web. El objetivo fue dejar definida una estructura completa, coherente y fácil de usar, de manera que la aplicación pudiera entenderse como un sistema real y no solo como una pantalla aislada.</text:p>
      <text:p text:style-name="P40">Durante esta fase se consolidó una arquitectura visual clara basada en tres perfiles de acceso: <text:span text:style-name="T11">invitado</text:span>, <text:span text:style-name="T11">usuario registrado</text:span> y <text:span text:style-name="T11">administrador</text:span>. Esta separación permitió definir mejor qué páginas forman parte del entorno público, cuáles requieren autenticación y cuáles quedan reservadas a la gestión interna del sistema.</text:p>
      <text:h text:style-name="P27" text:outline-level="3"/>
      <text:p text:style-name="P40"/>
      <text:h text:style-name="P27" text:outline-level="3"><text:bookmark-start text:name="__RefHeading___Toc2543_1385620957"/>13.1 Estructura general del sitio web<text:bookmark-end text:name="__RefHeading___Toc2543_1385620957"/></text:h>
      <text:p text:style-name="P40">A nivel de interfaz, <text:span text:style-name="T11">PacePal</text:span> quedó organizado en varios bloques principales de navegación, utilizando un sistema de <text:span text:style-name="T11">navbar compartida</text:span> y <text:span text:style-name="T11">footer compartido</text:span> para garantizar la consistencia en todas las vistas:</text:p>
      <text:list text:style-name="L26">
        <text:list-item>
          <text:p text:style-name="P67"><text:span text:style-name="T11">Páginas públicas:</text:span> Landing, About, Cookies, Registro y Login.</text:p>
        </text:list-item>
        <text:list-item>
          <text:p text:style-name="P67"><text:span text:style-name="T11">Gestión de actividades:</text:span> Listado de actividades, detalle de actividad y creación de actividades.</text:p>
        </text:list-item>
        <text:list-item>
          <text:p text:style-name="P67"><text:span text:style-name="T11">Catálogo de rutas:</text:span> Listado de rutas y detalle técnico de ruta.</text:p>
        </text:list-item>
        <text:list-item>
          <text:p text:style-name="P67"><text:span text:style-name="T11">Tienda:</text:span> Catálogo de productos y carrito de compra.</text:p>
        </text:list-item>
        <text:list-item>
          <text:p text:style-name="P67"><text:span text:style-name="T11">Zona de usuario:</text:span> Perfil personal y "Mis actividades".</text:p>
        </text:list-item>
        <text:list-item>
          <text:p text:style-name="P67"><text:span text:style-name="T11">Administración:</text:span> Panel de control, gestión de usuarios, rutas, productos y reportes.</text:p>
        </text:list-item>
      </text:list>
      <text:p text:style-name="P40">Esta organización permite una navegación fluida entre bloques públicos, zonas privadas y paneles de gestión técnica.</text:p>
      <text:h text:style-name="P27" text:outline-level="3"/>
      <text:h text:style-name="P27" text:outline-level="3"/>
      <text:h text:style-name="P42" text:outline-level="3"><text:bookmark-start text:name="__RefHeading___Toc2545_1385620957"/>13.2 Perfiles de usuario y acceso a páginas<text:bookmark-end text:name="__RefHeading___Toc2545_1385620957"/></text:h>
      <text:p text:style-name="P40">La definición de perfiles ha sido clave para la arquitectura del sistema. Cada tipo de usuario dispone de permisos y vistas específicas:</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0"><text:span text:style-name="Strong_20_Emphasis"><text:span text:style-name="T6">Perfil</text:span></text:span></text:p>
            </table:table-cell>
            <table:table-cell table:style-name="Tabla8.A1" office:value-type="string">
              <text:p text:style-name="P30"><text:span text:style-name="Strong_20_Emphasis"><text:span text:style-name="T6">Descripción</text:span></text:span></text:p>
            </table:table-cell>
            <table:table-cell table:style-name="Tabla8.A1" office:value-type="string">
              <text:p text:style-name="P30"><text:span text:style-name="Strong_20_Emphasis"><text:span text:style-name="T6">Acceso Principal</text:span></text:span></text:p>
            </table:table-cell>
          </table:table-row>
        </table:table-header-rows>
        <table:table-row>
          <table:table-cell table:style-name="Tabla8.A1" office:value-type="string">
            <text:p text:style-name="P31">Invitado</text:p>
          </table:table-cell>
          <table:table-cell table:style-name="Tabla8.A1" office:value-type="string">
            <text:p text:style-name="P32">Visitante anónimo.</text:p>
          </table:table-cell>
          <table:table-cell table:style-name="Tabla8.A1" office:value-type="string">
            <text:p text:style-name="P32">Landing, Rutas, Actividades (solo lectura), Tienda (exploración), Registro/Login.</text:p>
          </table:table-cell>
        </table:table-row>
        <table:table-row>
          <table:table-cell table:style-name="Tabla8.A1" office:value-type="string">
            <text:p text:style-name="P31">Registrado</text:p>
          </table:table-cell>
          <table:table-cell table:style-name="Tabla8.A1" office:value-type="string">
            <text:p text:style-name="P32">Usuario autenticado y operativo.</text:p>
          </table:table-cell>
          <table:table-cell table:style-name="Tabla8.A1" office:value-type="string">
            <text:p text:style-name="P32">Todas las públicas + Crear/Unirse a actividades, Carrito (flujo de compra), Perfil.</text:p>
          </table:table-cell>
        </table:table-row>
        <table:table-row>
          <table:table-cell table:style-name="Tabla8.A1" office:value-type="string">
            <text:p text:style-name="P31">Administrador</text:p>
          </table:table-cell>
          <table:table-cell table:style-name="Tabla8.A1" office:value-type="string">
            <text:p text:style-name="P32">Control interno del sistema.</text:p>
          </table:table-cell>
          <table:table-cell table:style-name="Tabla8.A1" office:value-type="string">
            <text:p text:style-name="P32">Todas las anteriores + Panel Admin (gestión de usuarios, rutas, productos y reportes).</text:p>
          </table:table-cell>
        </table:table-row>
      </table:table>
      <text:h text:style-name="P27" text:outline-level="3"/>
      <text:h text:style-name="P27" text:outline-level="3"/>
      <text:h text:style-name="P27" text:outline-level="3"/>
      <text:h text:style-name="P27" text:outline-level="3"><text:bookmark-start text:name="__RefHeading___Toc2547_1385620957"/>13.3 Decisiones de UX aplicadas al conjunto del sitio<text:bookmark-end text:name="__RefHeading___Toc2547_1385620957"/></text:h>
      <text:p text:style-name="P40">Se apostó por una estructura de navegación simple y una jerarquía visual clara. Entre las decisiones más relevantes destacan:</text:p>
      <text:list text:style-name="L27">
        <text:list-item>
          <text:p text:style-name="P68"><text:span text:style-name="T11">Diferenciación Rutas vs. Actividades:</text:span> Se reforzó mediante títulos y bloques introductorios que las <text:span text:style-name="T11">Rutas</text:span> son recorridos fijos, mientras que las <text:span text:style-name="T11">Actividades</text:span> son eventos creados por la comunidad sobre dichas rutas.</text:p>
        </text:list-item>
        <text:list-item>
          <text:p text:style-name="P68"><text:span text:style-name="T11">Adaptación Móvil:</text:span> Todo el sitio se reorganizó en un flujo vertical con menú tipo hamburguesa y zonas táctiles ampliadas, asegurando que la experiencia en pantallas pequeñas sea tan funcional como en escritorio.</text:p>
        </text:list-item>
      </text:list>
      <text:h text:style-name="P27" text:outline-level="3"/>
      <text:h text:style-name="P27" text:outline-level="3"/>
      <text:h text:style-name="P42" text:outline-level="3"><text:bookmark-start text:name="__RefHeading___Toc2549_1385620957"/>13.4 Accesibilidad, responsive y optimización de imágenes<text:bookmark-end text:name="__RefHeading___Toc2549_1385620957"/></text:h>
      <text:p text:style-name="P40">La revisión técnica de este sprint sirvió para extender las buenas prácticas de la landing al resto del ecosistema de PacePal.</text:p>
      <text:h text:style-name="P69" text:outline-level="4"><text:bookmark-start text:name="__RefHeading___Toc2551_1385620957"/>Accesibilidad y Responsive<text:bookmark-end text:name="__RefHeading___Toc2551_1385620957"/></text:h>
      <text:p text:style-name="P40">Se mantuvieron criterios estrictos para asegurar la inclusión:</text:p>
      <text:list text:style-name="L28">
        <text:list-item>
          <text:p text:style-name="P70"><text:span text:style-name="T11">Navegación:</text:span> Soporte total para teclado, foco visible y estructura semántica correcta.</text:p>
        </text:list-item>
        <text:list-item>
          <text:p text:style-name="P70"><text:span text:style-name="T11">Formularios:</text:span> Etiquetas claras y contraste suficiente en todos los campos de entrada.</text:p>
        </text:list-item>
        <text:list-item>
          <text:p text:style-name="P70"><text:span text:style-name="T11">Fluidez:</text:span> Adaptación de todas las vistas a móvil, tablet y escritorio.</text:p>
        </text:list-item>
      </text:list>
      <text:h text:style-name="P69" text:outline-level="4"><text:bookmark-start text:name="__RefHeading___Toc2553_1385620957"/>Optimización de recursos gráficos<text:bookmark-end text:name="__RefHeading___Toc2553_1385620957"/></text:h>
      <text:p text:style-name="P40">Se aplicó una optimización profunda de los recursos visuales para mejorar los tiempos de carga y el rendimiento (WPO), especialmente en conexiones móviles.</text:p>
      <text:list text:style-name="L29">
        <text:list-item>
          <text:p text:style-name="P71"><text:span text:style-name="T11">Migración a WebP:</text:span> Se transformaron las imágenes rasterizadas de <text:span text:style-name="Source_20_Text"><text:span text:style-name="T6">.png</text:span></text:span> a <text:span text:style-name="Source_20_Text"><text:span text:style-name="T6">.webp</text:span></text:span> en carpetas críticas como <text:span text:style-name="Source_20_Text"><text:span text:style-name="T6">img/about/</text:span></text:span>, <text:span text:style-name="Source_20_Text"><text:span text:style-name="T6">img/landing/</text:span></text:span>, <text:span text:style-name="Source_20_Text"><text:span text:style-name="T6">img/productos/</text:span></text:span> y parte de <text:span text:style-name="Source_20_Text"><text:span text:style-name="T6">img/logo/</text:span></text:span>.</text:p>
        </text:list-item>
        <text:list-item>
          <text:p text:style-name="P71"><text:span text:style-name="T11">Criterios de conversión:</text:span> Se priorizó <text:span text:style-name="T11">WebP</text:span> por su excelente compresión (reducción de entre el <text:span text:style-name="T11">25% y el 70%</text:span> del peso) manteniendo la calidad visual. Se conservaron algunos archivos en <text:span text:style-name="Source_20_Text"><text:span text:style-name="T6">.ico</text:span></text:span> y <text:span text:style-name="Source_20_Text"><text:span text:style-name="T6">.png</text:span></text:span> solo por motivos de compatibilidad (favicons y logos con transparencia específica).</text:p>
        </text:list-item>
        <text:list-item>
          <text:p text:style-name="P72">Metodología:</text:p>
          <text:list>
            <text:list-item>
              <text:p text:style-name="P71">Inventariado de recursos pesados.</text:p>
            </text:list-item>
            <text:list-item>
              <text:p text:style-name="P71">Conversión y sustitución de referencias en HTML, CSS y JS.</text:p>
            </text:list-item>
            <text:list-item>
              <text:p text:style-name="P71">Validación visual para asegurar que no existan pérdidas perceptibles de calidad.</text:p>
            </text:list-item>
          </text:list>
        </text:list-item>
      </text:list>
      <text:p text:style-name="P73"><text:span text:style-name="T11">Impacto:</text:span> Esta optimización reduce el peso total descargado por página, mejorando las métricas técnicas y la experiencia del usuario al disminuir el tiempo de espera.</text:p>
      <text:h text:style-name="P27" text:outline-level="3"/>
      <text:h text:style-name="P27" text:outline-level="3"><text:bookmark-start text:name="__RefHeading___Toc2555_1385620957"/>13.5 Resultado del sprint<text:bookmark-end text:name="__RefHeading___Toc2555_1385620957"/></text:h>
      <text:p text:style-name="P40">Al terminar este bloque, <text:span text:style-name="T11">PacePal</text:span> cuenta con una estructura de interfaz completa, validada y optimizada. El sitio está organizado por perfiles y roles, con una base de navegación modular gracias a la <text:span text:style-name="T11">navbar y el footer compartidos</text:span>. Gracias a la optimización de imágenes y la revisión de accesibilidad, el proyecto avanza hacia las fases de <text:span text:style-name="T11">DWEC</text:span> y <text:span text:style-name="T11">DWES</text:span> con una arquitectura de usuario sólida y un rendimiento técnico preparado para entornos reales.</text:p>
      <text:h text:style-name="P74" text:outline-level="2"><text:bookmark-start text:name="__RefHeading___Toc2557_1385620957"/>14. Sprint DWEC · Formularios, validaciones y JavaScript modular<text:bookmark-end text:name="__RefHeading___Toc2557_1385620957"/></text:h>
      <text:p text:style-name="P40"/>
      <text:p text:style-name="P40">El bloque de <text:span text:style-name="T11">Desarrollo Web en Entorno Cliente</text:span> de PacePal se centró en convertir la interfaz definida en DIW en una aplicación realmente interactiva. El objetivo principal fue dotar al sitio de comportamiento dinámico, validaciones en tiempo real y una estructura de frontend preparada para integrarse posteriormente con la API REST del backend. En <text:span text:style-name="T11">Treecore Studio</text:span> se optó por una solución basada en <text:span text:style-name="T11">JavaScript nativo ($Vanilla$ $JS$)</text:span> y organización modular, evitando depender de frameworks externos y manteniendo un mayor control sobre la lógica del cliente.</text:p>
      <text:p text:style-name="P75"/>
      <text:p text:style-name="P73"><text:span text:style-name="T11">Decisión de Ingeniería:</text:span> Desde el inicio se decidió que el contenido dinámico del proyecto debía generarse mediante construcción explícita del $DOM$, utilizando <text:span text:style-name="Source_20_Text"><text:span text:style-name="T6">document.createElement</text:span></text:span> y <text:span text:style-name="Source_20_Text"><text:span text:style-name="T6">appendChild</text:span></text:span>. Esta decisión permitió mantener una estructura más controlada, evitar inserciones poco seguras y asegurar que cada componente siguiera fielmente la lógica visual y funcional de DIW.</text:p>
      <text:h text:style-name="P27" text:outline-level="3"/>
      <text:h text:style-name="P27" text:outline-level="3"/>
      <text:h text:style-name="P27" text:outline-level="3"/>
      <text:h text:style-name="P27" text:outline-level="3"><text:bookmark-start text:name="__RefHeading___Toc2559_1385620957"/>14.1 Arquitectura del cliente y organización modular<text:bookmark-end text:name="__RefHeading___Toc2559_1385620957"/></text:h>
      <text:p text:style-name="P40">La parte cliente de PacePal se organizó de forma modular para evitar archivos excesivamente grandes y facilitar el mantenimiento. La organización principal del frontend se apoya en varios bloques funcionales:</text:p>
      <table:table table:name="Tabla9" table:style-name="Tabla9">
        <table:table-column table:style-name="Tabla9.A"/>
        <table:table-column table:style-name="Tabla9.B"/>
        <table:table-header-rows>
          <table:table-row>
            <table:table-cell table:style-name="Tabla9.A1" office:value-type="string">
              <text:p text:style-name="P30"><text:span text:style-name="Strong_20_Emphasis"><text:span text:style-name="T6">Ruta del Módulo</text:span></text:span></text:p>
            </table:table-cell>
            <table:table-cell table:style-name="Tabla9.A1" office:value-type="string">
              <text:p text:style-name="P30"><text:span text:style-name="Strong_20_Emphasis"><text:span text:style-name="T6">Responsabilidad Funcional</text:span></text:span></text:p>
            </table:table-cell>
          </table:table-row>
        </table:table-header-rows>
        <table:table-row>
          <table:table-cell table:style-name="Tabla9.A1" office:value-type="string">
            <text:p text:style-name="P76"><text:span text:style-name="Source_20_Text"><text:span text:style-name="T6">js/formulario/</text:span></text:span></text:p>
          </table:table-cell>
          <table:table-cell table:style-name="Tabla9.A1" office:value-type="string">
            <text:p text:style-name="P32">Lógica de registro, login y el motor de validaciones.</text:p>
          </table:table-cell>
        </table:table-row>
        <table:table-row>
          <table:table-cell table:style-name="Tabla9.A1" office:value-type="string">
            <text:p text:style-name="P76"><text:span text:style-name="Source_20_Text"><text:span text:style-name="T6">js/tienda/</text:span></text:span></text:p>
          </table:table-cell>
          <table:table-cell table:style-name="Tabla9.A1" office:value-type="string">
            <text:p text:style-name="P32">Gestión de catálogo, carrito y comportamiento de compra.</text:p>
          </table:table-cell>
        </table:table-row>
        <table:table-row>
          <table:table-cell table:style-name="Tabla9.A1" office:value-type="string">
            <text:p text:style-name="P76"><text:span text:style-name="Source_20_Text"><text:span text:style-name="T6">js/actividades/</text:span></text:span></text:p>
          </table:table-cell>
          <table:table-cell table:style-name="Tabla9.A1" office:value-type="string">
            <text:p text:style-name="P32">Listados dinámicos, filtros y buscador dinámico (AJAX).</text:p>
          </table:table-cell>
        </table:table-row>
        <table:table-row>
          <table:table-cell table:style-name="Tabla9.A1" office:value-type="string">
            <text:p text:style-name="P76"><text:span text:style-name="Source_20_Text"><text:span text:style-name="T6">js/rutas/</text:span></text:span></text:p>
          </table:table-cell>
          <table:table-cell table:style-name="Tabla9.A1" office:value-type="string">
            <text:p text:style-name="P32">Catálogo técnico de recorridos y distancias.</text:p>
          </table:table-cell>
        </table:table-row>
        <table:table-row>
          <table:table-cell table:style-name="Tabla9.A1" office:value-type="string">
            <text:p text:style-name="P76"><text:span text:style-name="Source_20_Text"><text:span text:style-name="T6">js/comun/</text:span></text:span><text:span text:style-name="T6"> o </text:span><text:span text:style-name="Source_20_Text"><text:span text:style-name="T6">ui.js</text:span></text:span></text:p>
          </table:table-cell>
          <table:table-cell table:style-name="Tabla9.A1" office:value-type="string">
            <text:p text:style-name="P32">Elementos compartidos (Navbar y Footer dinámicos).</text:p>
          </table:table-cell>
        </table:table-row>
      </table:table>
      <text:h text:style-name="P27" text:outline-level="3"/>
      <text:h text:style-name="P27" text:outline-level="3"/>
      <text:h text:style-name="P42" text:outline-level="3"><text:bookmark-start text:name="__RefHeading___Toc2561_1385620957"/>14.2 Formularios de autenticación y lógica condicional<text:bookmark-end text:name="__RefHeading___Toc2561_1385620957"/></text:h>
      <text:p text:style-name="P40">El primer bloque funcional fue el sistema de autenticación. En el registro se implementó un formulario amplio que incluye nombre y apellidos, email, DNI, contraseña y otros campos opcionales, con el objetivo de guiar al usuario y evitar errores antes de llegar al servidor.</text:p>
      <text:h text:style-name="P69" text:outline-level="4"><text:bookmark-start text:name="__RefHeading___Toc2563_1385620957"/>Lógica Condicional de la Tarjeta<text:bookmark-end text:name="__RefHeading___Toc2563_1385620957"/></text:h>
      <text:p text:style-name="P40">Uno de los comportamientos más relevantes fue la lógica condicional del campo de tarjeta. Este campo solo aparece si el usuario ha completado previamente los campos de <text:span text:style-name="T11">dirección y país</text:span>. Si uno de esos dos valores desaparece, el campo de tarjeta se oculta y su contenido se limpia automáticamente en el $DOM$.</text:p>
      <text:list text:style-name="L30">
        <text:list-item>
          <text:p text:style-name="P77">Comportamiento condicional del campo tarjeta (falta añadir imagen al final y pulsar para ir)</text:p>
        </text:list-item>
      </text:list>
      <text:h text:style-name="P27" text:outline-level="3"/>
      <text:h text:style-name="P27" text:outline-level="3"><text:bookmark-start text:name="__RefHeading___Toc2565_1385620957"/>14.3 Sistema de validaciones centralizado<text:bookmark-end text:name="__RefHeading___Toc2565_1385620957"/></text:h>
      <text:p text:style-name="P40">Todas las reglas de validación se centralizaron en el archivo <text:span text:style-name="Source_20_Text"><text:span text:style-name="T6">js/formulario/validaciones.js</text:span></text:span> para reutilizar funciones y mantener una respuesta visual coherente en todos los formularios del proyecto.</text:p>
      <text:p text:style-name="P78">Entre las validaciones más importantes desarrolladas en este sprint se encuentran:</text:p>
      <text:list text:style-name="L31">
        <text:list-item>
          <text:p text:style-name="P79"><text:span text:style-name="T11">Validación de nombre y apellidos</text:span> con longitud mínima y máxima.</text:p>
        </text:list-item>
        <text:list-item>
          <text:p text:style-name="P79"><text:span text:style-name="T11">Validación de email</text:span> con formato correcto.</text:p>
        </text:list-item>
        <text:list-item>
          <text:p text:style-name="P79"><text:span text:style-name="T11">Validación de DNI</text:span> con comprobación de formato y letra.</text:p>
        </text:list-item>
        <text:list-item>
          <text:p text:style-name="P80">Validación de contraseña robusta.</text:p>
        </text:list-item>
        <text:list-item>
          <text:p text:style-name="P79"><text:span text:style-name="T11">Comprobación de coincidencia</text:span> entre contraseña y confirmación.</text:p>
        </text:list-item>
        <text:list-item>
          <text:p text:style-name="P79"><text:span text:style-name="T11">Validación de edad mínima</text:span> mediante fecha de nacimiento.</text:p>
        </text:list-item>
        <text:list-item>
          <text:p text:style-name="P79"><text:span text:style-name="T11">Validación de tarjeta de crédito</text:span> cuando el campo está activo.</text:p>
        </text:list-item>
      </text:list>
      <text:p text:style-name="P40"/>
      <text:p text:style-name="P81">En el caso del <text:span text:style-name="T11">DNI</text:span>, no se comprobó únicamente el formato de ocho números y letra, sino también la correspondencia correcta de la letra de control mediante el algoritmo oficial:</text:p>
      <text:p text:style-name="P40">$$\text{Índice} = \text{Número DNI} \pmod{23}$$</text:p>
      <text:p text:style-name="P40">Esto refuerza la coherencia del sistema con la lógica de identificación definida en el proyecto.</text:p>
      <text:list text:style-name="L32">
        <text:list-item>
          <text:p text:style-name="P82">Evidencia de validación del DNI (falta añadir imagen al final y pulsar para ir)</text:p>
          <text:p text:style-name="P82"><text:span text:style-name="T13">Para mejorar la experiencia de usuario (UX), el sistema ofrece </text:span><text:span text:style-name="T28">feedback instantáneo</text:span><text:span text:style-name="T13"> "en vivo". Gracias a los eventos de JavaScript </text:span><text:span text:style-name="Source_20_Text"><text:span text:style-name="T29">input</text:span></text:span><text:span text:style-name="T13"> (mientras se escribe) y </text:span><text:span text:style-name="Source_20_Text"><text:span text:style-name="T29">blur</text:span></text:span><text:span text:style-name="T13"> (al salir del campo), la interfaz reacciona al momento: si el dato es correcto, el borde del </text:span><text:span text:style-name="T28">input</text:span><text:span text:style-name="T13"> </text:span><text:span text:style-name="T30">se marca en verde</text:span><text:span text:style-name="T13"> mediante la clase </text:span><text:span text:style-name="Source_20_Text"><text:span text:style-name="T31">.campo-valido</text:span></text:span><text:span text:style-name="T13">; si es </text:span><text:span text:style-name="T28">erróneo</text:span><text:span text:style-name="T13">, el borde </text:span><text:span text:style-name="T32">cambia a rojo</text:span><text:span text:style-name="T13"> con la clase</text:span><text:span text:style-name="T28"> </text:span><text:span text:style-name="Source_20_Text"><text:span text:style-name="T29">.campo-invalido</text:span></text:span><text:span text:style-name="T13"> y se </text:span><text:span text:style-name="T33">despliega un mensaje de error justo debajo</text:span><text:span text:style-name="T13">. Esta respuesta visual inmediata permite al usuario corregir fallos de forma fluida sin tener que esperar a enviar el formulario. </text:span></text:p>
        </text:list-item>
      </text:list>
      <text:list text:style-name="L33">
        <text:list-item>
          <text:p text:style-name="P83">Captura de validación en tiempo real (falta añadir imagen al final y pulsar para ir)</text:p>
        </text:list-item>
      </text:list>
      <text:h text:style-name="P27" text:outline-level="3"/>
      <text:h text:style-name="P27" text:outline-level="3"><text:bookmark-start text:name="__RefHeading___Toc2567_1385620957"/>14.4 Preparación dinámica e integración con Backend<text:bookmark-end text:name="__RefHeading___Toc2567_1385620957"/></text:h>
      <text:p text:style-name="P40">Una vez completado el bloque de formularios, el trabajo avanzado hacia la construcción de componentes reactivos preparados para el consumo de datos reales mediante la <text:span text:style-name="T11">API $Fetch$</text:span> y respuestas en <text:span text:style-name="T11">JSON</text:span>.</text:p>
      <text:list text:style-name="L34">
        <text:list-item>
          <text:p text:style-name="P84"><text:span text:style-name="T11">Interacción Dinámica:</text:span> Se preparó la lógica para actualizar contenido sin recargar la página y gestionar el estado de sesión desde el cliente.</text:p>
        </text:list-item>
        <text:list-item>
          <text:p text:style-name="P84"><text:span text:style-name="T11">Protocolo de Comunicación:</text:span> Las peticiones se diseñaron con cabeceras <text:span text:style-name="Source_20_Text"><text:span text:style-name="T6">application/json</text:span></text:span> y el uso de <text:span text:style-name="Source_20_Text"><text:span text:style-name="T6">credentials: 'include'</text:span></text:span> para mantener la persistencia de la sesión ($PHPSESSID$).</text:p>
        </text:list-item>
      </text:list>
      <text:h text:style-name="P27" text:outline-level="3"/>
      <text:h text:style-name="P27" text:outline-level="3"><text:bookmark-start text:name="__RefHeading___Toc2569_1385620957"/>14.5 Pruebas funcionales del bloque cliente<text:bookmark-end text:name="__RefHeading___Toc2569_1385620957"/></text:h>
      <text:p text:style-name="P40">Realizamos una batería de comprobaciones para asegurar el comportamiento correcto en escenarios reales:</text:p>
      <text:list text:style-name="L35">
        <text:list-item>
          <text:p text:style-name="P85"><text:span text:style-name="T11">Casos de Error:</text:span> Registros e inicios de sesión con datos inválidos para verificar los mensajes de error.</text:p>
          <text:list>
            <text:list-item>
              <text:p text:style-name="P86">Captura de login con error (falta añadir imagen al final y pulsar para ir)</text:p>
            </text:list-item>
          </text:list>
        </text:list-item>
        <text:list-item>
          <text:p text:style-name="P85"><text:span text:style-name="T11">Casos de Éxito:</text:span> Flujos de alta y login correctos con sus respectivas redirecciones.</text:p>
          <text:list>
            <text:list-item>
              <text:p text:style-name="P86">Captura de registro correcto (falta añadir imagen al final y pulsar para ir)</text:p>
            </text:list-item>
            <text:list-item>
              <text:p text:style-name="P86">Captura de login correcto (falta añadir imagen al final y pulsar para ir)</text:p>
            </text:list-item>
          </text:list>
        </text:list-item>
        <text:list-item>
          <text:p text:style-name="P85"><text:soft-page-break/><text:span text:style-name="T11">Automatización:</text:span> Se añadió una base de regresión con <text:span text:style-name="T11">Selenium</text:span> (<text:span text:style-name="Source_20_Text"><text:span text:style-name="T6">tests/selenium/test-registro.js</text:span></text:span>) para proteger el flujo de alta frente a futuros cambios.</text:p>
        </text:list-item>
      </text:list>
      <text:h text:style-name="P27" text:outline-level="3"/>
      <text:h text:style-name="P27" text:outline-level="3"><text:bookmark-start text:name="__RefHeading___Toc2571_1385620957"/>14.6 Resultado del Sprint DWEC<text:bookmark-end text:name="__RefHeading___Toc2571_1385620957"/></text:h>
      <text:p text:style-name="P40">Al finalizar este bloque, PacePal dispone de una capa de cliente sólida y modular. El proyecto ha dejado de ser solo una maquetación visual para comportarse como una aplicación web real, conectando el diseño de DIW con la lógica funcional que exige el desarrollo intermodular.</text:p>
      <text:p text:style-name="P40"/>
      <text:h text:style-name="P87" text:outline-level="2"/>
      <text:h text:style-name="P88" text:outline-level="2"><text:bookmark-start text:name="__RefHeading___Toc2573_1385620957"/>15. Sprint DWEC · Listado dinámico, filtros, buscador AJAX y carrito<text:bookmark-end text:name="__RefHeading___Toc2573_1385620957"/></text:h>
      <text:p text:style-name="P89"/>
      <text:p text:style-name="P89">El segundo sprint del bloque de <text:span text:style-name="T11">Desarrollo Web en Entorno Cliente</text:span> supuso un cambio importante en la evolución de PacePal. Si en el sprint anterior la prioridad había estado en los formularios, las validaciones y la preparación de la arquitectura cliente, en esta fase el objetivo fue transformar la web en una <text:span text:style-name="T11">aplicación dinámica de verdad</text:span>. Para ello, los contenidos principales del sistema dejaron de depender de HTML estático y pasaron a generarse en tiempo real consumiendo datos desde la <text:span text:style-name="T11">API REST</text:span>.</text:p>
      <text:p text:style-name="P89">Esta transición afectó especialmente a la tienda, los listados de rutas y actividades, las páginas de detalle, el carrito de compra y la navegación dependiente de la sesión del usuario. En <text:span text:style-name="T11">Treecore Studio</text:span> mantuvimos el mismo criterio técnico que habíamos fijado desde el principio: <text:span text:style-name="T11">JavaScript Vanilla</text:span>, construcción explícita del DOM mediante <text:span text:style-name="Source_20_Text"><text:span text:style-name="T6">document.createElement</text:span></text:span> y <text:span text:style-name="Source_20_Text"><text:span text:style-name="T6">appendChild</text:span></text:span>, uso de <text:span text:style-name="Source_20_Text"><text:span text:style-name="T6">fetch</text:span></text:span> nativo para la comunicación asíncrona y una estructura modular que separa claramente la lógica de negocio de la interfaz visual.</text:p>
      <text:h text:style-name="P90" text:outline-level="3"/>
      <text:h text:style-name="P90" text:outline-level="3"/>
      <text:h text:style-name="P90" text:outline-level="3"/>
      <text:h text:style-name="P90" text:outline-level="3"><text:bookmark-start text:name="__RefHeading___Toc2575_1385620957"/>15.1 Tienda dinámica y renderizado desde API<text:bookmark-end text:name="__RefHeading___Toc2575_1385620957"/></text:h>
      <text:p text:style-name="P89">Uno de los primeros objetivos de este sprint fue convertir la tienda en un catálogo completamente dinámico. Para evitar la intervención manual en la maquetación, se decidió que el catálogo se cargara íntegramente desde la API.</text:p>
      <text:list text:style-name="L36">
        <text:list-item>
          <text:p text:style-name="P91"><text:span text:style-name="T11">Implementación:</text:span> Lógica en <text:span text:style-name="Source_20_Text"><text:span text:style-name="T6">js/tienda/productos.js</text:span></text:span>, montada sobre <text:span text:style-name="Source_20_Text"><text:span text:style-name="T6">pages/tienda/tienda.php</text:span></text:span>.</text:p>
        </text:list-item>
        <text:list-item>
          <text:p text:style-name="P91"><text:span text:style-name="T11">Proceso Técnico:</text:span> Petición <text:span text:style-name="Source_20_Text"><text:span text:style-name="T6">GET /api/productos</text:span></text:span> y generación de tarjetas mediante <text:span text:style-name="Source_20_Text"><text:span text:style-name="T6">createElement</text:span></text:span>, <text:span text:style-name="Source_20_Text"><text:span text:style-name="T6">appendChild</text:span></text:span> y <text:span text:style-name="Source_20_Text"><text:span text:style-name="T16">DocumentFragment</text:span></text:span>, reduciendo inserciones directas en el DOM y evitando parpadeos.</text:p>
        </text:list-item>
        <text:list-item>
          <text:p text:style-name="P91"><text:span text:style-name="T11">Componentes:</text:span> Cada tarjeta incluye imagen, nombre, precio, distintivo de sostenibilidad, botón de añadir al carrito y enlace a la página de detalle.</text:p>
        </text:list-item>
        <text:list-item>
          <text:p text:style-name="P91"><text:span text:style-name="T11">Optimización UX:</text:span> Uso de <text:span text:style-name="Source_20_Text"><text:span text:style-name="T6">loading="lazy"</text:span></text:span>, sistema de <text:span text:style-name="T15">fallback</text:span> para imágenes ausentes y gestión de mensajes de error o listas vacías.</text:p>
        </text:list-item>
      </text:list>
      <text:h text:style-name="P90" text:outline-level="3"/>
      <text:h text:style-name="P92" text:outline-level="3"><text:bookmark-start text:name="__RefHeading___Toc2577_1385620957"/>15.2 Buscador AJAX y filtrado instantáneo<text:bookmark-end text:name="__RefHeading___Toc2577_1385620957"/></text:h>
      <text:p text:style-name="P89">Añadimos un buscador orientado a la velocidad de exploración, permitiendo la localización de productos sin recargar la página y sin saturar al servidor.</text:p>
      <text:list text:style-name="L37">
        <text:list-item>
          <text:p text:style-name="P93"><text:span text:style-name="T11">Metodología:</text:span> Filtrado local sobre el contenido ya renderizado asociado al campo <text:span text:style-name="Source_20_Text"><text:span text:style-name="T6">#buscadorProductosInput</text:span></text:span>.</text:p>
        </text:list-item>
        <text:list-item>
          <text:p text:style-name="P93"><text:span text:style-name="T11">Lógica:</text:span> Escucha del evento <text:span text:style-name="Source_20_Text"><text:span text:style-name="T6">input</text:span></text:span>, comparación de texto (en minúsculas) con el nombre del producto en los <text:span text:style-name="Source_20_Text"><text:span text:style-name="T6">h3</text:span></text:span> y conmutación de visibilidad en el DOM.</text:p>
        </text:list-item>
        <text:list-item>
          <text:p text:style-name="P93"><text:span text:style-name="T11">Experiencia:</text:span> Respuesta inmediata que permite al usuario refinar resultados al momento, manteniendo una experiencia fluida sin ruptura de flujo.</text:p>
        </text:list-item>
      </text:list>
      <text:h text:style-name="P90" text:outline-level="3"/>
      <text:h text:style-name="P90" text:outline-level="3"><text:bookmark-start text:name="__RefHeading___Toc2579_1385620957"/>15.3 Carrito dinámico y flujo de compra<text:bookmark-end text:name="__RefHeading___Toc2579_1385620957"/></text:h>
      <text:p text:style-name="P89">El carrito convirtió el módulo de tienda en una parte operativa real. Permite al usuario construir una compra, modificarla y confirmarla manteniendo el estado sincronizado con el servidor.</text:p>
      <text:list text:style-name="L38">
        <text:list-item>
          <text:p text:style-name="P94"><text:span text:style-name="T11">Carga inicial:</text:span> Petición <text:span text:style-name="Source_20_Text"><text:span text:style-name="T6">GET /api/carrito</text:span></text:span> mediante <text:span text:style-name="Source_20_Text"><text:span text:style-name="T6">js/tienda/carrito.js</text:span></text:span>.</text:p>
        </text:list-item>
        <text:list-item>
          <text:p text:style-name="P95">Operaciones principales:</text:p>
          <text:list>
            <text:list-item>
              <text:p text:style-name="P94"><text:span text:style-name="T11">Modificación de cantidades:</text:span> Mediante <text:span text:style-name="Source_20_Text"><text:span text:style-name="T6">PUT /api/carrito</text:span></text:span>.</text:p>
            </text:list-item>
            <text:list-item>
              <text:p text:style-name="P94"><text:span text:style-name="T11">Eliminación de productos:</text:span> Mediante <text:span text:style-name="Source_20_Text"><text:span text:style-name="T6">DELETE /api/carrito</text:span></text:span>.</text:p>
            </text:list-item>
            <text:list-item>
              <text:p text:style-name="P94"><text:span text:style-name="T11">Confirmación del pedido:</text:span> Mediante <text:span text:style-name="Source_20_Text"><text:span text:style-name="T6">POST /api/pedido</text:span></text:span>.</text:p>
            </text:list-item>
          </text:list>
        </text:list-item>
        <text:list-item>
          <text:p text:style-name="P94"><text:span text:style-name="T11">Sincronización:</text:span> Cada acción desencadena una actualización completa del carrito y refresca el contador del icono en la <text:span text:style-name="T11">navbar</text:span>, garantizando coherencia visual en todo momento.</text:p>
        </text:list-item>
      </text:list>
      <text:h text:style-name="P90" text:outline-level="3"/>
      <text:h text:style-name="P90" text:outline-level="3"><text:bookmark-start text:name="__RefHeading___Toc2581_1385620957"/>15.4 Listados dinámicos de rutas y actividades<text:bookmark-end text:name="__RefHeading___Toc2581_1385620957"/></text:h>
      <text:p text:style-name="P89">El núcleo de PacePal pasó a cargarse dinámicamente, asegurando un sistema conectado a datos reales y preparado para crecer.</text:p>
      <text:list text:style-name="L39">
        <text:list-item>
          <text:p text:style-name="P96"><text:span text:style-name="T11">Actividades:</text:span> Implementado en <text:span text:style-name="Source_20_Text"><text:span text:style-name="T6">js/actividades/actividades.js</text:span></text:span>. Muestra nombre de ruta, tipo, nivel, fecha, hora y plazas disponibles.</text:p>
        </text:list-item>
        <text:list-item>
          <text:p text:style-name="P96"><text:span text:style-name="T11">Rutas:</text:span> Implementado en <text:span text:style-name="Source_20_Text"><text:span text:style-name="T6">js/rutas/rutas.js</text:span></text:span>. Representa cada ruta con imagen, nombre, ubicación y distancia técnica.</text:p>
        </text:list-item>
        <text:list-item>
          <text:p text:style-name="P96"><text:span text:style-name="T11">Visualización:</text:span> Uso de rejillas responsive (<text:span text:style-name="T11">1 columna en móvil, 2 en tablet y 3 en escritorio</text:span>) reforzando la coherencia visual definida en DIW.</text:p>
        </text:list-item>
      </text:list>
      <text:h text:style-name="P90" text:outline-level="3"/>
      <text:h text:style-name="P92" text:outline-level="3"><text:bookmark-start text:name="__RefHeading___Toc2583_1385620957"/>15.5 Páginas de detalle dinámicas<text:bookmark-end text:name="__RefHeading___Toc2583_1385620957"/></text:h>
      <text:p text:style-name="P89">Consolidamos el modelo donde cada vista se construye a partir del identificador (<text:span text:style-name="T11">ID</text:span>) recibido en la URL.</text:p>
      <text:list text:style-name="L40">
        <text:list-item>
          <text:p text:style-name="P97"><text:span text:style-name="T11">Tienda:</text:span> <text:span text:style-name="Source_20_Text"><text:span text:style-name="T6">productoDetalle.js</text:span></text:span> muestra imágenes, descripción, precio, stock y selector de cantidad.</text:p>
        </text:list-item>
        <text:list-item>
          <text:p text:style-name="P97"><text:span text:style-name="T11">Rutas:</text:span> <text:span text:style-name="Source_20_Text"><text:span text:style-name="T6">rutaDetalle.js</text:span></text:span> construye la ficha técnica (distancia, dificultad, desnivel y duración).</text:p>
        </text:list-item>
        <text:list-item>
          <text:p text:style-name="P97"><text:span text:style-name="T11">Actividades:</text:span> <text:span text:style-name="Source_20_Text"><text:span text:style-name="T6">actividadDetalle.js</text:span></text:span> genera una vista contextual con organizador, estado, lista de participantes y botones de acción dinámicos (unirse, abandonar o eliminar) según el rol del usuario.</text:p>
        </text:list-item>
      </text:list>
      <text:h text:style-name="P90" text:outline-level="3"/>
      <text:h text:style-name="P90" text:outline-level="3"><text:bookmark-start text:name="__RefHeading___Toc2585_1385620957"/>15.6 Navbar dinámica y gestión de sesión<text:bookmark-end text:name="__RefHeading___Toc2585_1385620957"/></text:h>
      <text:p text:style-name="P89">Para evitar duplicidades, la navbar y el footer se construyen desde JavaScript en todas las páginas mediante <text:span text:style-name="Source_20_Text"><text:span text:style-name="T6">js/formulario/ui.js</text:span></text:span>.</text:p>
      <text:list text:style-name="L41">
        <text:list-item>
          <text:p text:style-name="P98"><text:span text:style-name="T11">Lógica de sesión:</text:span> Consulta al endpoint <text:span text:style-name="Source_20_Text"><text:span text:style-name="T6">GET /api/session</text:span></text:span>.</text:p>
        </text:list-item>
        <text:list-item>
          <text:p text:style-name="P99">Comportamiento adaptativo:</text:p>
          <text:list>
            <text:list-item>
              <text:p text:style-name="P98"><text:span text:style-name="T11">Sin sesión:</text:span> Enlaces públicos y botones de acceso.</text:p>
            </text:list-item>
            <text:list-item>
              <text:p text:style-name="P98"><text:span text:style-name="T11">Con sesión:</text:span> Añade perfil, carrito y cierre de sesión.</text:p>
            </text:list-item>
            <text:list-item>
              <text:p text:style-name="P98"><text:span text:style-name="T11">Administrador:</text:span> Incorpora acceso al panel de administración.</text:p>
            </text:list-item>
          </text:list>
        </text:list-item>
      </text:list>
      <text:h text:style-name="P90" text:outline-level="3"/>
      <text:h text:style-name="P90" text:outline-level="3"><text:bookmark-start text:name="__RefHeading___Toc2587_1385620957"/>15.7 Integración técnica entre DWEC y DWES<text:bookmark-end text:name="__RefHeading___Toc2587_1385620957"/></text:h>
      <text:p text:style-name="P89">La comunicación se realiza mediante <text:span text:style-name="Source_20_Text"><text:span text:style-name="T6">fetch</text:span></text:span> nativo, enviando y recibiendo datos en formato <text:span text:style-name="T11">JSON</text:span>.</text:p>
      <text:p text:style-name="P100"><text:span text:style-name="T11">Seguridad y Persistencia:</text:span> Las peticiones que requieren autenticación incluyen <text:span text:style-name="Source_20_Text"><text:span text:style-name="T6">credentials: 'include'</text:span></text:span>, permitiendo que la cookie de sesión viaje con cada llamada asíncrona para que el servidor reconozca al usuario.</text:p>
      <text:p text:style-name="P101">Endpoints clave utilizados:</text:p>
      <text:list text:style-name="L42">
        <text:list-item>
          <text:p text:style-name="P102"><text:span text:style-name="Source_20_Text"><text:span text:style-name="T6">GET /api/productos</text:span></text:span> y <text:span text:style-name="Source_20_Text"><text:span text:style-name="T6">GET /api/productos/{id}</text:span></text:span></text:p>
        </text:list-item>
        <text:list-item>
          <text:p text:style-name="P102"><text:span text:style-name="Source_20_Text"><text:span text:style-name="T6">GET /api/rutas</text:span></text:span> y <text:span text:style-name="Source_20_Text"><text:span text:style-name="T6">GET /api/rutas/{id}</text:span></text:span></text:p>
        </text:list-item>
        <text:list-item>
          <text:p text:style-name="P102"><text:span text:style-name="Source_20_Text"><text:span text:style-name="T6">GET /api/actividades</text:span></text:span> y <text:span text:style-name="Source_20_Text"><text:span text:style-name="T6">GET /api/actividades/{id}</text:span></text:span></text:p>
        </text:list-item>
        <text:list-item>
          <text:p text:style-name="P102"><text:span text:style-name="Source_20_Text"><text:span text:style-name="T6">POST /api/actividad</text:span></text:span>, <text:span text:style-name="Source_20_Text"><text:span text:style-name="T6">POST /api/carrito</text:span></text:span> y <text:span text:style-name="Source_20_Text"><text:span text:style-name="T6">GET /api/carrito</text:span></text:span></text:p>
        </text:list-item>
        <text:list-item>
          <text:p text:style-name="P102"><text:span text:style-name="Source_20_Text"><text:span text:style-name="T6">POST /api/login</text:span></text:span>, <text:span text:style-name="Source_20_Text"><text:span text:style-name="T6">POST /api/logout</text:span></text:span> y <text:span text:style-name="Source_20_Text"><text:span text:style-name="T6">GET /api/session</text:span></text:span></text:p>
        </text:list-item>
      </text:list>
      <text:h text:style-name="P90" text:outline-level="3"/>
      <text:h text:style-name="P92" text:outline-level="3"><text:bookmark-start text:name="__RefHeading___Toc2589_1385620957"/>15.8 Pruebas funcionales del sprint 2<text:bookmark-end text:name="__RefHeading___Toc2589_1385620957"/></text:h>
      <text:p text:style-name="P89">Realizamos una verificación funcional manual amplia sobre los módulos dinámicos para asegurar la estabilidad:</text:p>
      <text:list text:style-name="L43">
        <text:list-item>
          <text:p text:style-name="P103">Validación de carga dinámica y buscador en tiempo real.</text:p>
        </text:list-item>
        <text:list-item>
          <text:p text:style-name="P103">Test del flujo de compra: añadir, modificar cantidad y finalizar pedido.</text:p>
        </text:list-item>
        <text:list-item>
          <text:p text:style-name="P103">Comprobación de acceso a detalles según ID y cambio de navbar según sesión.</text:p>
        </text:list-item>
        <text:list-item>
          <text:p text:style-name="P103">Verificación de restricciones de acceso a rutas privadas de administración.</text:p>
        </text:list-item>
      </text:list>
      <text:h text:style-name="P90" text:outline-level="3"/>
      <text:h text:style-name="P90" text:outline-level="3"><text:bookmark-start text:name="__RefHeading___Toc2591_1385620957"/>15.9 Resultado del sprint<text:bookmark-end text:name="__RefHeading___Toc2591_1385620957"/></text:h>
      <text:p text:style-name="P89">Al terminar este bloque, PacePal dio un salto importante en madurez. La web dejó de apoyarse en contenido fijo y pasó a trabajar con datos reales cargados desde la API. PacePal queda preparado para afrontar el bloque de servidor con una capa cliente ya modular, estable y conectada con la lógica del sistema.</text:p>
      <text:h text:style-name="P90" text:outline-level="3"/>
      <text:p text:style-name="P89"/>
      <text:h text:style-name="P88" text:outline-level="2"><text:bookmark-start text:name="__RefHeading___Toc2593_1385620957"/>16. Sprint DWES · Base de datos relacional y modelo del sistema<text:bookmark-end text:name="__RefHeading___Toc2593_1385620957"/></text:h>
      <text:p text:style-name="P104"/>
      <text:p text:style-name="P104">El bloque inicial de <text:span text:style-name="T11">Desarrollo Web en Entorno Servidor</text:span> ha sido el motor para transformar PacePal de una interfaz visual a una herramienta funcional con datos reales y persistentes. Tras definir la interfaz en DIW y preparar el consumo dinámico en DWEC, el paso lógico era diseñar un <text:span text:style-name="T11">modelo de datos relacional robusto</text:span> y optimizado.</text:p>
      <text:p text:style-name="P104">Este sprint ha supuesto la transición crítica: pasar de una lógica conceptual a una <text:span text:style-name="T11">estructura física</text:span> capaz de sostener usuarios, rutas, actividades, productos, pedidos y reportes, garantizando siempre la integridad y la trazabilidad de la información.</text:p>
      <text:p text:style-name="P104">El objetivo no era simplemente “guardar datos”, sino traducir la filosofía del producto al lenguaje de bases de datos. PacePal opera bajo una premisa: las rutas son activos fijos del sistema y los usuarios no las crean, sino que organizan <text:span text:style-name="T11">actividades</text:span> sobre ellas. Bajo esta idea, el modelo soporta las vertientes comunitaria, comercial y administrativa mediante una estructura normalizada lista para integrarse con nuestra API REST.</text:p>
      <text:h text:style-name="P105" text:outline-level="3"/>
      <text:h text:style-name="P105" text:outline-level="3"><text:bookmark-start text:name="__RefHeading___Toc2595_1385620957"/>16.1 Arquitectura del backend y flujo de datos<text:bookmark-end text:name="__RefHeading___Toc2595_1385620957"/></text:h>
      <text:p text:style-name="P104">Antes de lanzar las tablas, organizamos el servidor con una <text:span text:style-name="T11">separación clara de responsabilidades</text:span>. Esto no es solo por orden, sino para facilitar el mantenimiento y evitar el "código espagueti" donde se mezcla la lógica de negocio con la configuración.</text:p>
      <text:list text:style-name="L44">
        <text:list-item>
          <text:p text:style-name="P106"><text:span text:style-name="T11">API REST (</text:span><text:span text:style-name="Source_20_Text"><text:span text:style-name="T16">src/api/index.php</text:span></text:span><text:span text:style-name="T11">):</text:span> Actúa como el router principal que recibe las peticiones del frontend.</text:p>
        </text:list-item>
        <text:list-item>
          <text:p text:style-name="P106"><text:span text:style-name="T11">Controladores:</text:span> Aquí reside el cerebro. Concentran la lógica de negocio, validaciones y comprobaciones de seguridad.</text:p>
        </text:list-item>
        <text:list-item>
          <text:p text:style-name="P106"><text:span text:style-name="T11">Modelos:</text:span> Su única misión es el acceso a datos mediante <text:span text:style-name="T11">PDO</text:span> y consultas preparadas, blindando el sistema contra inyecciones SQL.</text:p>
        </text:list-item>
        <text:list-item>
          <text:p text:style-name="P106"><text:span text:style-name="T11">Configuración:</text:span> La conexión a la DB se centraliza en un bloque de <text:span text:style-name="Source_20_Text"><text:span text:style-name="T6">config</text:span></text:span>, eliminando duplicidades.</text:p>
        </text:list-item>
      </text:list>
      <text:p text:style-name="P104"><text:span text:style-name="T11">El flujo es circular y predecible:</text:span> El frontend lanza una petición HTTP $\rightarrow$ el router identifica endpoint y método $\rightarrow$ el controlador valida y aplica reglas $\rightarrow$ el modelo ejecuta la consulta PDO $\rightarrow$ el controlador devuelve una respuesta JSON consistente.</text:p>
      <text:h text:style-name="P105" text:outline-level="3"/>
      <text:h text:style-name="P107" text:outline-level="3"><text:bookmark-start text:name="__RefHeading___Toc2597_1385620957"/>16.2 Diseño del modelo relacional<text:bookmark-end text:name="__RefHeading___Toc2597_1385620957"/></text:h>
      <text:p text:style-name="P104">La implementación se materializó en un script de creación (<text:span text:style-name="Source_20_Text"><text:span text:style-name="T6">db/schema.sql</text:span></text:span>) y un archivo de datos iniciales (<text:span text:style-name="Source_20_Text"><text:span text:style-name="T6">db/seed.sql</text:span></text:span>). El diseño se divide en cinco pilares lógicos:</text:p>
      <text:list text:style-name="L45">
        <text:list-item>
          <text:p text:style-name="P108"><text:span text:style-name="T11">Usuarios y Autenticación:</text:span> La tabla <text:span text:style-name="Source_20_Text"><text:span text:style-name="T6">usuarios</text:span></text:span> es el núcleo. Almacena identidad (nombre, email, DNI) y acceso. Hemos aplicado restricciones de unicidad y preparado el campo de contraseña para hashes seguros, distinguiendo roles entre usuarios y administradores.</text:p>
        </text:list-item>
        <text:list-item>
          <text:p text:style-name="P108"><text:span text:style-name="T11">Rutas y Actividades:</text:span> <text:span text:style-name="Source_20_Text"><text:span text:style-name="T6">rutas</text:span></text:span> contiene el catálogo técnico (distancia, dificultad, métricas). Sobre esta base, la tabla <text:span text:style-name="Source_20_Text"><text:span text:style-name="T6">actividades</text:span></text:span> vincula una ruta con un organizador y añade las variables: fecha, hora, plazas y condiciones.</text:p>
        </text:list-item>
        <text:list-item>
          <text:p text:style-name="P108"><text:span text:style-name="T11">Interacción Social:</text:span> La tabla <text:span text:style-name="Source_20_Text"><text:span text:style-name="T6">participaciones</text:span></text:span> resuelve la relación <text:span text:style-name="T11">muchos a muchos</text:span> ($M:N$). Permite que un usuario se inscriba en varias actividades y viceversa, con una restricción de unicidad compuesta para evitar "dobles inscripciones" accidentales.</text:p>
        </text:list-item>
        <text:list-item>
          <text:p text:style-name="P108"><text:span text:style-name="T11">Tienda y Ciclo de Venta:</text:span> Estructura limpia y normalizada. <text:span text:style-name="Source_20_Text"><text:span text:style-name="T6">categorias</text:span></text:span> clasifica, <text:span text:style-name="Source_20_Text"><text:span text:style-name="T6">articulos</text:span></text:span> detalla el catálogo (precio, stock, imagen), <text:span text:style-name="Source_20_Text"><text:span text:style-name="T6">pedidos</text:span></text:span> gestiona la cabecera de compra y <text:span text:style-name="Source_20_Text"><text:span text:style-name="T6">detalle_pedido</text:span></text:span> desglosa cada línea para mantener la trazabilidad de precios y cantidades.</text:p>
        </text:list-item>
        <text:list-item>
          <text:p text:style-name="P108"><text:span text:style-name="T11">Moderación y Convivencia:</text:span> La tabla <text:span text:style-name="Source_20_Text"><text:span text:style-name="T6">reportes</text:span></text:span> vincula al informante con el reportado y el contexto de la actividad, naciendo con un estado "pendiente" para su futura gestión.</text:p>
        </text:list-item>
      </text:list>
      <text:h text:style-name="P105" text:outline-level="3"/>
      <text:h text:style-name="P105" text:outline-level="3"><text:bookmark-start text:name="__RefHeading___Toc2599_1385620957"/>16.3 Relaciones principales y reglas de negocio<text:bookmark-end text:name="__RefHeading___Toc2599_1385620957"/></text:h>
      <text:p text:style-name="P104">El modelo relacional no es un listado estático, es un reflejo vivo de la aplicación. Las relaciones se han definido para evitar datos huérfanos y redundancias:</text:p>
      <text:list text:style-name="L46">
        <text:list-item>
          <text:p text:style-name="P109"><text:span text:style-name="T11">Usuarios:</text:span> Se ramifican hacia actividades, participaciones, pedidos y reportes.</text:p>
        </text:list-item>
        <text:list-item>
          <text:p text:style-name="P109"><text:span text:style-name="T11">Rutas:</text:span> Actúan como plantillas; una ruta puede tener infinitas actividades a lo largo del tiempo, maximizando la reutilización de datos.</text:p>
        </text:list-item>
        <text:list-item>
          <text:p text:style-name="P109"><text:span text:style-name="T11">Tienda:</text:span> La relación entre pedidos y productos se resuelve mediante <text:span text:style-name="Source_20_Text"><text:span text:style-name="T6">detalle_pedido</text:span></text:span>, manteniendo la estructura en un nivel óptimo de normalización.</text:p>
        </text:list-item>
      </text:list>
      <text:p text:style-name="P104">Hemos integrado las reglas de negocio directamente en el SQL: <text:span text:style-name="T11">claves foráneas</text:span> para la integridad, <text:span text:style-name="Source_20_Text"><text:span text:style-name="T6">CURRENT_TIMESTAMP</text:span></text:span> para la trazabilidad temporal y tipos <text:span text:style-name="Source_20_Text"><text:span text:style-name="T6">DECIMAL(10,2)</text:span></text:span> para evitar los errores de redondeo en los precios.</text:p>
      <text:h text:style-name="P105" text:outline-level="3"><text:bookmark-start text:name="__RefHeading___Toc2601_1385620957"/>16.4 Normalización y decisiones de diseño<text:bookmark-end text:name="__RefHeading___Toc2601_1385620957"/></text:h>
      <text:p text:style-name="P104">Cada tabla tiene una responsabilidad única. Por ejemplo, al separar <text:span text:style-name="Source_20_Text"><text:span text:style-name="T6">pedidos</text:span></text:span> de <text:span text:style-name="Source_20_Text"><text:span text:style-name="T6">detalle_pedido</text:span></text:span>, evitamos repetir la información del producto en cada compra. Igualmente, la tabla <text:span text:style-name="Source_20_Text"><text:span text:style-name="T6">participaciones</text:span></text:span> descarga a la tabla <text:span text:style-name="Source_20_Text"><text:span text:style-name="T6">actividades</text:span></text:span> de gestionar listas de asistentes internamente.</text:p>
      <text:p text:style-name="P104"><text:soft-page-break/>Este diseño no se hizo a ciegas, sino en <text:span text:style-name="T11">coordinación total con el frontend</text:span> de DWEC. La base de datos está "entrenada" para alimentar exactamente lo que el usuario ve en sus formularios, carritos y perfiles.</text:p>
      <text:h text:style-name="P105" text:outline-level="3"><text:bookmark-start text:name="__RefHeading___Toc2603_1385620957"/>16.5 Scripts SQL y datos mínimos de prueba<text:bookmark-end text:name="__RefHeading___Toc2603_1385620957"/></text:h>
      <text:p text:style-name="P104">El ecosistema técnico descansa en dos archivos:</text:p>
      <text:list text:style-name="L47">
        <text:list-item>
          <text:p text:style-name="P110"><text:span text:style-name="Source_20_Text"><text:span text:style-name="T16">db/schema.sql</text:span></text:span><text:span text:style-name="T11">:</text:span> El ADN del sistema. Contiene el DDL completo para replicar la estructura desde cero en cualquier entorno.</text:p>
        </text:list-item>
        <text:list-item>
          <text:p text:style-name="P110"><text:span text:style-name="Source_20_Text"><text:span text:style-name="T16">db/seed.sql</text:span></text:span><text:span text:style-name="T11">:</text:span> La chispa inicial. Contiene datos de prueba (usuarios, rutas, productos) que nos han permitido testear flujos de compra y listados sin tener que introducir datos a mano en cada prueba.</text:p>
        </text:list-item>
      </text:list>
      <text:h text:style-name="P105" text:outline-level="3"/>
      <text:h text:style-name="P105" text:outline-level="3"><text:bookmark-start text:name="__RefHeading___Toc2605_1385620957"/>16.6 Resultado del sprint<text:bookmark-end text:name="__RefHeading___Toc2605_1385620957"/></text:h>
      <text:p text:style-name="P104">PacePal ya no es solo "una cara bonita"; ahora tiene memoria y estructura. Hemos consolidado una capa persistente capaz de gestionar el ciclo de vida completo del usuario y el comercio. Aunque este sprint no cierra la lógica de servidor, deja lista la pieza maestra: el <text:span text:style-name="T11">modelo de datos</text:span>. El siguiente paso natural es exponer esta potencia a través de la API, gestionar sesiones y activar la moderación activa.</text:p>
      <text:h text:style-name="P111" text:outline-level="2"><text:bookmark-start text:name="__RefHeading___Toc2607_1385620957"/>17. Sprint DWES · API REST, sesiones, roles, reportes y moderación<text:bookmark-end text:name="__RefHeading___Toc2607_1385620957"/></text:h>
      <text:p text:style-name="P112">Este bloque ha sido el motor para transformar PacePal de una base de datos estática a un backend operativo. El objetivo principal fue exponer los datos mediante una <text:span text:style-name="T11">API REST en PHP</text:span>, gestionar la identidad mediante sesiones y roles, y establecer la lógica de convivencia mediante reportes. A partir de aquí, la aplicación ha dejado de depender de simulaciones para apoyarse en una estructura de servidor real y modular.</text:p>
      <text:h text:style-name="P113" text:outline-level="3"><text:bookmark-start text:name="__RefHeading___Toc2609_1385620957"/>17.1 Arquitectura de la API y organización del backend<text:bookmark-end text:name="__RefHeading___Toc2609_1385620957"/></text:h>
      <text:p text:style-name="P112">La arquitectura se ha consolidado bajo un patrón de separación de responsabilidades, fundamental para evitar el "efecto bola de nieve" ante futuros cambios. El punto de entrada es el router en <text:span text:style-name="Source_20_Text"><text:span text:style-name="T6">src/api/index.php</text:span></text:span>, que deriva las peticiones a los controladores.</text:p>
      <text:p text:style-name="P112">La organización del proyecto queda estructurada de forma literal en:</text:p>
      <text:list text:style-name="L48">
        <text:list-item>
          <text:p text:style-name="P114"><text:span text:style-name="Source_20_Text"><text:span text:style-name="T16">src/</text:span></text:span>: Lógica de ejecución de la API (controladores, modelos y configuración).</text:p>
        </text:list-item>
        <text:list-item>
          <text:p text:style-name="P114"><text:span text:style-name="Source_20_Text"><text:span text:style-name="T16">db/</text:span></text:span>: Scripts SQL y esquemas de la base de datos.</text:p>
        </text:list-item>
        <text:list-item>
          <text:p text:style-name="P114"><text:span text:style-name="Source_20_Text"><text:span text:style-name="T16">docs/</text:span></text:span>: Documentación técnica del sprint (endpoints, roles y arquitectura).</text:p>
        </text:list-item>
        <text:list-item>
          <text:p text:style-name="P114"><text:span text:style-name="Source_20_Text"><text:span text:style-name="T16">tests/</text:span></text:span>: Validación funcional y técnica de la API.</text:p>
        </text:list-item>
      </text:list>
      <text:p text:style-name="P112">Esta estructura asegura que cada componente tenga un lugar asignado, facilitando tanto el desarrollo actual como el despliegue final en <text:span text:style-name="T11">Hostinger</text:span>.</text:p>
      <text:h text:style-name="P113" text:outline-level="3"><text:bookmark-start text:name="__RefHeading___Toc2611_1385620957"/>17.2 Endpoints principales de la API REST<text:bookmark-end text:name="__RefHeading___Toc2611_1385620957"/></text:h>
      <text:p text:style-name="P112">La API ya dispone de <text:span text:style-name="T11">endpoints funcionales</text:span> para autenticación, catálogo, carrito, actividades, pedidos y reportes. La lógica implementada abarca un abanico completo de operaciones:</text:p>
      <text:list text:style-name="L49">
        <text:list-item>
          <text:p text:style-name="P115"><text:span text:style-name="T11">Consultas (GET):</text:span> Para listados de rutas, productos y perfiles.</text:p>
        </text:list-item>
        <text:list-item>
          <text:p text:style-name="P115"><text:span text:style-name="T11">Creación (POST):</text:span> Para registros, login, nuevas actividades y reportes.</text:p>
        </text:list-item>
        <text:list-item>
          <text:p text:style-name="P115"><text:span text:style-name="T11">Eliminación (DELETE):</text:span> Implementado para la gestión del carrito y la anulación de participaciones.</text:p>
        </text:list-item>
        <text:list-item>
          <text:p text:style-name="P115"><text:span text:style-name="T11">Actualización (PUT):</text:span> Se han dejado <text:span text:style-name="T11">preparadas las rutas</text:span> de actualización de perfiles y estados de pedidos, pendientes de su integración final y testeo exhaustivo en la lógica de negocio.</text:p>
        </text:list-item>
      </text:list>
      <text:h text:style-name="P113" text:outline-level="3"><text:bookmark-start text:name="__RefHeading___Toc2613_1385620957"/>17.3 Formato de respuesta y comunicación con el cliente<text:bookmark-end text:name="__RefHeading___Toc2613_1385620957"/></text:h>
      <text:p text:style-name="P112">Se ha unificado el formato de respuesta en <text:span text:style-name="T11">JSON</text:span>. Cada petición devuelve un estado controlado y un bloque de datos o, en su defecto, un mensaje de error legible por el frontend. Esta estandarización permite que las llamadas asíncronas desde DWEC sean estables y predecibles.</text:p>
      <text:h text:style-name="P113" text:outline-level="3"><text:bookmark-start text:name="__RefHeading___Toc2615_1385620957"/><text:soft-page-break/>17.4 Sesiones y control de acceso por roles<text:bookmark-end text:name="__RefHeading___Toc2615_1385620957"/></text:h>
      <text:p text:style-name="P112">PacePal utiliza sesiones de PHP para gestionar la identidad del usuario. Almacenamos el <text:span text:style-name="Source_20_Text"><text:span text:style-name="T6">usuario_id</text:span></text:span> y el <text:span text:style-name="Source_20_Text"><text:span text:style-name="T6">rol</text:span></text:span> en el servidor, blindando las rutas sensibles. El acceso al panel de administración y la gestión de reportes globales están restringidos mediante verificaciones en el backend, asegurando que el control de acceso no dependa solo de lo que el usuario "ve", sino de lo que el servidor "permite".</text:p>
      <text:h text:style-name="P113" text:outline-level="3"/>
      <text:h text:style-name="P113" text:outline-level="3"><text:bookmark-start text:name="__RefHeading___Toc2617_1385620957"/>17.5 Reportes y lógica de moderación<text:bookmark-end text:name="__RefHeading___Toc2617_1385620957"/></text:h>
      <text:p text:style-name="P112">Se ha habilitado la creación de reportes mediante <text:span text:style-name="Source_20_Text"><text:span text:style-name="T6">POST /api/reportes</text:span></text:span>. La estructura ya permite que un administrador consulte estos registros, sentando las bases de la moderación activa. Es un módulo diseñado para escalar según las necesidades de convivencia de la comunidad.</text:p>
      <text:h text:style-name="P113" text:outline-level="3"/>
      <text:h text:style-name="P113" text:outline-level="3"><text:bookmark-start text:name="__RefHeading___Toc2619_1385620957"/>17.6 Seguridad, validaciones y buenas prácticas<text:bookmark-end text:name="__RefHeading___Toc2619_1385620957"/></text:h>
      <text:p text:style-name="P112">Todas las interacciones con la base de datos se realizan mediante <text:span text:style-name="T11">sentencias preparadas (PDO)</text:span>, eliminando riesgos de inyección SQL. Los controladores actúan como filtros, validando la integridad de los datos de entrada antes de que lleguen a la capa de modelo.</text:p>
      <text:h text:style-name="P113" text:outline-level="3"/>
      <text:h text:style-name="P113" text:outline-level="3"><text:bookmark-start text:name="__RefHeading___Toc2621_1385620957"/>17.7 Estado de las pruebas y documentación técnica<text:bookmark-end text:name="__RefHeading___Toc2621_1385620957"/></text:h>
      <text:p text:style-name="P112">En coherencia con nuestro enfoque de planificación por pasos, cabe señalar que, aunque la lógica del servidor y los endpoints están definidos, <text:span text:style-name="T11">la colección Postman y las capturas de validación final se encuentran actualmente en fase de cierre documental</text:span>. Este bloque se mantiene como <text:span text:style-name="T11">trabajo pendiente</text:span> en la memoria, priorizando una verificación técnica impecable antes de dar por concluido el cierre de los tests.</text:p>
      <text:h text:style-name="P113" text:outline-level="3"/>
      <text:h text:style-name="P113" text:outline-level="3"><text:bookmark-start text:name="__RefHeading___Toc2623_1385620957"/>17.8 Resultado del sprint<text:bookmark-end text:name="__RefHeading___Toc2623_1385620957"/></text:h>
      <text:p text:style-name="P112">Al finalizar este bloque, PacePal cuenta con una <text:span text:style-name="T11">API REST estructurada</text:span> y un sistema de sesiones capaz de proteger las operaciones críticas. El paso a una arquitectura full-stack es un hito clave. El sistema es técnicamente sólido y queda preparado para la fase de validación final una vez se complete el cierre documental de los tests y la colección Postman.</text:p>
      <text:p text:style-name="P104"/>
      <text:p text:style-name="P89"/>
      <text:h text:style-name="P88" text:outline-level="2"><text:bookmark-start text:name="__RefHeading___Toc2625_1385620957"/>18. Sostenibilidad aplicada a PacePal<text:bookmark-end text:name="__RefHeading___Toc2625_1385620957"/></text:h>
      <text:p text:style-name="P89">En PacePal, la sostenibilidad no es un "añadido" de última hora ni una sección aislada; es un <text:span text:style-name="T11">eje transversal</text:span> que define la identidad del producto y su modelo de negocio. Desde el inicio, el proyecto se orientó a fusionar la actividad física con la conciencia ambiental, promoviendo que la aplicación no solo sirva para organizar quedadas, sino para impulsar un estilo de vida más coherente y responsable.</text:p>
      <text:p text:style-name="P89">Esta visión se traduce en tres niveles operativos: un enfoque conceptual sólido, una tienda de productos con impacto positivo y un sistema de recompensas que incentiva los hábitos saludables y ecológicos.</text:p>
      <text:h text:style-name="P90" text:outline-level="3"><text:bookmark-start text:name="__RefHeading___Toc2627_1385620957"/>18.1 Enfoque sostenible dentro del concepto del producto<text:bookmark-end text:name="__RefHeading___Toc2627_1385620957"/></text:h>
      <text:p text:style-name="P89">PacePal entiende el deporte más allá del rendimiento individual: lo vemos como una herramienta de <text:span text:style-name="T11">conexión social y cambio ambiental</text:span>. Fomentamos actividades al aire libre y la movilidad activa, reduciendo la dependencia de desplazamientos motorizados y promoviendo el uso de espacios naturales y urbanos abiertos.</text:p>
      <text:p text:style-name="P89">Nuestro propósito es claro: crear una comunidad que relacione el ejercicio físico con la responsabilidad colectiva. No se trata solo de correr acompañado, sino de reforzar un estilo de vida que cuide del entorno tanto como del propio cuerpo.</text:p>
      <text:h text:style-name="P90" text:outline-level="3"><text:bookmark-start text:name="__RefHeading___Toc2629_1385620957"/>18.2 Aplicación del enfoque SCAMPER a PacePal<text:bookmark-end text:name="__RefHeading___Toc2629_1385620957"/></text:h>
      <text:p text:style-name="P89">Para aterrizar estas ideas, aplicamos la técnica <text:span text:style-name="T11">SCAMPER</text:span>, lo que nos permitió extraer líneas de desarrollo muy concretas:</text:p>
      <text:list text:style-name="L50">
        <text:list-item>
          <text:p text:style-name="P116"><text:span text:style-name="T11">Sustituir:</text:span> Priorizar materiales reciclados o biodegradables en el catálogo y optimizar recursos digitales para reducir la huella tecnológica.</text:p>
        </text:list-item>
        <text:list-item>
          <text:p text:style-name="P116"><text:span text:style-name="T11">Combinar:</text:span> Unir deporte, sostenibilidad y acción social mediante recompensas ecológicas.</text:p>
        </text:list-item>
        <text:list-item>
          <text:p text:style-name="P116"><text:span text:style-name="T11">Adaptar:</text:span> Trasladar la lógica del <text:span text:style-name="T15">sharing</text:span> (como el car-sharing) al ámbito deportivo, fomentando los grupos locales.</text:p>
        </text:list-item>
        <text:list-item>
          <text:p text:style-name="P116"><text:span text:style-name="T11">Modificar:</text:span> Rediseñar la experiencia del usuario con rutas "verdes" y logística respetuosa.</text:p>
        </text:list-item>
        <text:list-item>
          <text:p text:style-name="P116"><text:span text:style-name="T11">Poner en otros usos:</text:span> Utilizar la plataforma como canal de sensibilización ambiental.</text:p>
        </text:list-item>
        <text:list-item>
          <text:p text:style-name="P116"><text:span text:style-name="T11">Eliminar/Reordenar:</text:span> Evitar materiales contaminantes y publicidad no ética, apostando por la fabricación bajo demanda y alianzas con marcas responsables.</text:p>
        </text:list-item>
      </text:list>
      <text:h text:style-name="P90" text:outline-level="3"><text:bookmark-start text:name="__RefHeading___Toc2631_1385620957"/>18.3 Tienda sostenible y producto responsable<text:bookmark-end text:name="__RefHeading___Toc2631_1385620957"/></text:h>
      <text:p text:style-name="P89">El módulo de tienda es una extensión de nuestros valores. No buscamos vender de forma indiscriminada, sino ofrecer productos alineados con la <text:span text:style-name="T11">economía circular</text:span>. Un ejemplo conceptual es nuestra propuesta de colaboración con Nike para incluir calzado fabricado con materiales <text:soft-page-break/>reciclados. Este catálogo curado diferencia a PacePal de otras apps deportivas, aportando una capa de valor comercial ético que conecta directamente con la identidad de nuestra marca.</text:p>
      <text:h text:style-name="P90" text:outline-level="3"><text:bookmark-start text:name="__RefHeading___Toc2633_1385620957"/>18.4 Sistema de recompensas ecológicas<text:bookmark-end text:name="__RefHeading___Toc2633_1385620957"/></text:h>
      <text:p text:style-name="P89">Hemos definido (a nivel conceptual y estructural) un sistema de <text:span text:style-name="T11">gamificación sostenible</text:span>. Los usuarios obtienen puntos por participar en actividades deportivas o por realizar acciones vinculadas a hábitos eco-responsables. Estos puntos son canjeables en nuestra tienda, creando un círculo virtuoso de refuerzo positivo: el esfuerzo personal se traduce en un beneficio ambiental y en un ahorro económico para el usuario.</text:p>
      <text:h text:style-name="P90" text:outline-level="3"><text:bookmark-start text:name="__RefHeading___Toc2635_1385620957"/>18.5 Propuesta de valor sostenible e impacto esperado<text:bookmark-end text:name="__RefHeading___Toc2635_1385620957"/></text:h>
      <text:p text:style-name="P89">A través del <text:span text:style-name="T11">Mini Canvas</text:span>, identificamos que el mercado carecía de opciones que unieran deporte, comunidad y consumo responsable. Nuestra propuesta de valor rompe con el enfoque puramente competitivo para centrarse en:</text:p>
      <text:list text:style-name="L51">
        <text:list-item>
          <text:p text:style-name="P117"><text:span text:style-name="T11">Diferenciador clásico:</text:span> Experiencias compartidas y acompañamiento.</text:p>
        </text:list-item>
        <text:list-item>
          <text:p text:style-name="P117"><text:span text:style-name="T11">Diferenciador sostenible:</text:span> Movilidad activa, hábitos saludables y apoyo a la economía circular.</text:p>
        </text:list-item>
      </text:list>
      <text:p text:style-name="P101">Impacto esperado:</text:p>
      <text:list text:style-name="L52">
        <text:list-item>
          <text:p text:style-name="P118"><text:span text:style-name="T11">Económico:</text:span> Generación de ingresos mediante ventas éticas y alianzas con entidades responsables.</text:p>
        </text:list-item>
        <text:list-item>
          <text:p text:style-name="P118"><text:span text:style-name="T11">Ecosocial:</text:span> Contribución real a la reducción de residuos y fomento de un estilo de vida saludable y conectado.</text:p>
        </text:list-item>
      </text:list>
      <text:h text:style-name="P90" text:outline-level="3"><text:bookmark-start text:name="__RefHeading___Toc2637_1385620957"/>18.6 Materiales visuales y evidencias del bloque de sostenibilidad<text:bookmark-end text:name="__RefHeading___Toc2637_1385620957"/></text:h>
      <text:p text:style-name="P89">La sostenibilidad en PacePal también tiene una cara visual potente. Hemos desarrollado materiales de comunicación que refuerzan nuestro mensaje y que sirven como prueba tangible de este compromiso:</text:p>
      <text:list text:style-name="L53">
        <text:list-item>
          <text:p text:style-name="P119"><text:span text:style-name="T11">Póster promocional:</text:span> <text:span text:style-name="Source_20_Text"><text:span text:style-name="T6">pacepalA3.png</text:span></text:span>.</text:p>
        </text:list-item>
        <text:list-item>
          <text:p text:style-name="P119"><text:span text:style-name="T11">Postales de marca:</text:span> <text:span text:style-name="Source_20_Text"><text:span text:style-name="T6">postalPacePalCaraA.png</text:span></text:span> y <text:span text:style-name="Source_20_Text"><text:span text:style-name="T6">postalPacePalCaraB.png</text:span></text:span>.</text:p>
        </text:list-item>
        <text:list-item>
          <text:p text:style-name="P119"><text:span text:style-name="T11">Documentación de soporte:</text:span> PDFs sobre el concurso de sostenibilidad y resoluciones oficiales.</text:p>
        </text:list-item>
      </text:list>
      <text:h text:style-name="P90" text:outline-level="3"><text:bookmark-start text:name="__RefHeading___Toc2639_1385620957"/>18.7 Resultado del bloque de sostenibilidad<text:bookmark-end text:name="__RefHeading___Toc2639_1385620957"/></text:h>
      <text:p text:style-name="P89">En definitiva, la sostenibilidad es el pilar que aporta <text:span text:style-name="T11">personalidad y coherencia</text:span> a PacePal. No es un discurso teórico, sino una realidad que influye en la tienda, en las recompensas y en la comunidad. Este planteamiento nos permite presentarnos como una propuesta sólida, diferenciada y, sobre todo, responsable con el futuro del entorno en el que corremos y caminamos.</text:p>
      <text:p text:style-name="P89"/>
      <text:h text:style-name="P120" text:outline-level="3"><text:bookmark-start text:name="__RefHeading___Toc2641_1385620957"/><text:span text:style-name="T34">19.</text:span>Conclusiones<text:bookmark-end text:name="__RefHeading___Toc2641_1385620957"/></text:h>
      <text:p text:style-name="P89">PacePal ha culminado como una aplicación web intermodular completa, coherente y funcional, capaz de integrar diseño, programación cliente, desarrollo en servidor, sostenibilidad y metodología ágil dentro de una misma solución. Lo que comenzó como una idea inicial se ha transformado en una plataforma con identidad propia, una arquitectura clara y una propuesta útil para el usuario.</text:p>
      <text:p text:style-name="P89">Uno de los mayores logros del proyecto ha sido convertir una necesidad real en una respuesta digital bien estructurada. PacePal no se limita a ofrecer funcionalidades deportivas, sino que aporta un espacio orientado a la comunidad, la participación y la confianza entre usuarios. A ello se suma una base técnica sólida, con una interfaz responsive, una capa cliente dinámica y un backend preparado para sostener la evolución del sistema con garantías.</text:p>
      <text:p text:style-name="P89">En conjunto, el proyecto demuestra que es posible desarrollar una aplicación web completa, accesible y con proyección real, manteniendo coherencia entre análisis, diseño, implementación y documentación. PacePal no solo cumple los objetivos académicos del intermodular, sino que refleja una forma de trabajar seria, ordenada y enfocada en crear una solución útil y con capacidad de crecimiento.</text:p>
      <text:h text:style-name="P121" text:outline-level="1"><text:bookmark-start text:name="__RefHeading___Toc2643_1385620957"/>2<text:span text:style-name="T35">0</text:span>. Bibliografía<text:bookmark-end text:name="__RefHeading___Toc2643_1385620957"/></text:h>
      <text:p text:style-name="P14">Para el desarrollo de PacePal se han utilizado fuentes externas de referencia, documentación técnica oficial, herramientas de desarrollo y materiales académicos base. Este conjunto de recursos ha servido para fundamentar las decisiones de análisis, diseño, implementación cliente, desarrollo en servidor y validación del proyecto.</text:p>
      <text:h text:style-name="P122" text:outline-level="2"><text:bookmark-start text:name="__RefHeading___Toc2645_1385620957"/>2<text:span text:style-name="T35">0</text:span>.1 Referencias externas de investigación y competencia<text:bookmark-end text:name="__RefHeading___Toc2645_1385620957"/></text:h>
      <text:p text:style-name="P14"><text:span text:style-name="T36">Hemos empleado</text:span> plataformas de referencia del sector para analizar patrones de navegación, jerarquía visual, comunidad, métricas y organización funcional en entornos deportivos y de actividades:</text:p>
      <text:list text:style-name="L54">
        <text:list-item>
          <text:p text:style-name="P123"><text:span text:style-name="Strong_20_Emphasis">Meetup</text:span>: organización de eventos y comunidades. <text:a xlink:type="simple" xlink:href="https://www.meetup.com/" text:style-name="Internet_20_link" text:visited-style-name="Visited_20_Internet_20_Link"><text:span text:style-name="Source_20_Text"><text:span text:style-name="T6">https://www.meetup.com/</text:span></text:span></text:a></text:p>
        </text:list-item>
        <text:list-item>
          <text:p text:style-name="P123"><text:span text:style-name="Strong_20_Emphasis">Strava</text:span>: red social deportiva orientada a actividad y métricas. <text:a xlink:type="simple" xlink:href="https://www.strava.com/" text:style-name="Internet_20_link" text:visited-style-name="Visited_20_Internet_20_Link"><text:span text:style-name="Source_20_Text"><text:span text:style-name="T6">https://www.strava.com/</text:span></text:span></text:a></text:p>
        </text:list-item>
        <text:list-item>
          <text:p text:style-name="P123"><text:span text:style-name="Strong_20_Emphasis">Komoot</text:span>: navegación y rutas outdoor. <text:a xlink:type="simple" xlink:href="https://www.komoot.com/" text:style-name="Internet_20_link" text:visited-style-name="Visited_20_Internet_20_Link"><text:span text:style-name="Source_20_Text"><text:span text:style-name="T6">https://www.komoot.com/</text:span></text:span></text:a></text:p>
          <text:p text:style-name="P123"><text:span text:style-name="Source_20_Text"><text:span text:style-name="T6"/></text:span></text:p>
        </text:list-item>
      </text:list>
      <text:h text:style-name="P122" text:outline-level="2"><text:bookmark-start text:name="__RefHeading___Toc2647_1385620957"/>22.2 Documentación técnica oficial<text:bookmark-end text:name="__RefHeading___Toc2647_1385620957"/></text:h>
      <text:p text:style-name="P14"><text:span text:style-name="T37">Hemos</text:span> consultado la documentación oficial de las siguientes tecnologías para garantizar una implementación alineada con los estándares actuales y las mejores prácticas técnicas de la industria:</text:p>
      <text:list text:style-name="L55">
        <text:list-item>
          <text:p text:style-name="P124"><text:span text:style-name="T11">Bootstrap y Bootstrap Icons</text:span>: Utilizados para la maquetación <text:span text:style-name="T15">responsive</text:span>, el sistema de rejilla y la iconografía consistente en toda la interfaz.</text:p>
          <text:list>
            <text:list-item>
              <text:p text:style-name="P124"><text:a xlink:type="simple" xlink:href="https://getbootstrap.com/" office:target-frame-name="_blank" xlink:show="new" text:style-name="Internet_20_link" text:visited-style-name="Visited_20_Internet_20_Link">getbootstrap.com</text:a> | <text:a xlink:type="simple" xlink:href="https://icons.getbootstrap.com/" office:target-frame-name="_blank" xlink:show="new" text:style-name="Internet_20_link" text:visited-style-name="Visited_20_Internet_20_Link">icons.getbootstrap.com</text:a></text:p>
            </text:list-item>
          </text:list>
        </text:list-item>
        <text:list-item>
          <text:p text:style-name="P124"><text:span text:style-name="T11">PHP Manual</text:span>: Referencia principal para la lógica de servidor, especialmente en la gestión de <text:a xlink:type="simple" xlink:href="https://www.php.net/manual/es/book.session.php" office:target-frame-name="_blank" xlink:show="new" text:style-name="Internet_20_link" text:visited-style-name="Visited_20_Internet_20_Link">sesiones</text:a> y el uso de <text:a xlink:type="simple" xlink:href="https://www.php.net/manual/es/book.pdo.php" office:target-frame-name="_blank" xlink:show="new" text:style-name="Internet_20_link" text:visited-style-name="Visited_20_Internet_20_Link">PDO</text:a> para el acceso a datos.</text:p>
          <text:list>
            <text:list-item>
              <text:p text:style-name="P124"><text:a xlink:type="simple" xlink:href="https://www.php.net/docs.php" office:target-frame-name="_blank" xlink:show="new" text:style-name="Internet_20_link" text:visited-style-name="Visited_20_Internet_20_Link">php.net/docs.php</text:a></text:p>
            </text:list-item>
          </text:list>
        </text:list-item>
        <text:list-item>
          <text:p text:style-name="P124"><text:span text:style-name="T11">MySQL Documentation</text:span>: Guía fundamental para el diseño, optimización y gestión del modelo relacional de la base de datos.</text:p>
          <text:list>
            <text:list-item>
              <text:p text:style-name="P124"><text:a xlink:type="simple" xlink:href="https://dev.mysql.com/doc/" office:target-frame-name="_blank" xlink:show="new" text:style-name="Internet_20_link" text:visited-style-name="Visited_20_Internet_20_Link">dev.mysql.com/doc</text:a></text:p>
            </text:list-item>
          </text:list>
        </text:list-item>
        <text:list-item>
          <text:p text:style-name="P124"><text:span text:style-name="T11">MDN Web Docs</text:span>: Fuente de consulta para el estándar de JavaScript, manipulación del DOM, uso de Fetch API y semántica HTML5.</text:p>
          <text:list>
            <text:list-item>
              <text:p text:style-name="P124"><text:a xlink:type="simple" xlink:href="https://developer.mozilla.org/" office:target-frame-name="_blank" xlink:show="new" text:style-name="Internet_20_link" text:visited-style-name="Visited_20_Internet_20_Link">developer.mozilla.org</text:a></text:p>
            </text:list-item>
          </text:list>
        </text:list-item>
        <text:list-item>
          <text:p text:style-name="P124"><text:span text:style-name="T11">W3C (World Wide Web Consortium)</text:span>: Marco de referencia global para asegurar que el desarrollo cumpla con los estándares web internacionales.</text:p>
          <text:list>
            <text:list-item>
              <text:p text:style-name="P124"><text:a xlink:type="simple" xlink:href="https://www.w3.org/" office:target-frame-name="_blank" xlink:show="new" text:style-name="Internet_20_link" text:visited-style-name="Visited_20_Internet_20_Link">w3.org</text:a></text:p>
            </text:list-item>
          </text:list>
        </text:list-item>
        <text:list-item>
          <text:p text:style-name="P124"><text:soft-page-break/><text:span text:style-name="T11">Accesibilidad y Auditoría</text:span>: Guías y herramientas para garantizar un producto inclusivo y de alta calidad técnica.</text:p>
          <text:list>
            <text:list-item>
              <text:p text:style-name="P124"><text:span text:style-name="T11">WCAG 2.1</text:span>: <text:a xlink:type="simple" xlink:href="https://www.w3.org/TR/WCAG21/" office:target-frame-name="_blank" xlink:show="new" text:style-name="Internet_20_link" text:visited-style-name="Visited_20_Internet_20_Link">w3.org/TR/WCAG21/</text:a></text:p>
            </text:list-item>
            <text:list-item>
              <text:p text:style-name="P124"><text:span text:style-name="T11">WAVE Tool</text:span>: <text:a xlink:type="simple" xlink:href="https://wave.webaim.org/" office:target-frame-name="_blank" xlink:show="new" text:style-name="Internet_20_link" text:visited-style-name="Visited_20_Internet_20_Link">wave.webaim.org</text:a></text:p>
            </text:list-item>
            <text:list-item>
              <text:p text:style-name="P124"><text:span text:style-name="T11">Google Lighthouse</text:span>: <text:a xlink:type="simple" xlink:href="https://developer.chrome.com/docs/lighthouse/" office:target-frame-name="_blank" xlink:show="new" text:style-name="Internet_20_link" text:visited-style-name="Visited_20_Internet_20_Link">developer.chrome.com/docs/lighthouse/</text:a></text:p>
            </text:list-item>
          </text:list>
        </text:list-item>
      </text:list>
      <text:p text:style-name="P14"/>
      <text:h text:style-name="P122" text:outline-level="2"><text:bookmark-start text:name="__RefHeading___Toc2649_1385620957"/>22.<text:span text:style-name="T38">3</text:span> Materiales académicos de apoyo<text:bookmark-end text:name="__RefHeading___Toc2649_1385620957"/></text:h>
      <text:p text:style-name="P14">Además de las fuentes externas y la documentación oficial, <text:span text:style-name="T39">hemos</text:span> <text:span text:style-name="T40">utilizamos</text:span> los materiales base almacenados en la ruta <text:span text:style-name="Source_20_Text"><text:span text:style-name="T6">docs/00-material/</text:span></text:span>, que contienen los requisitos académicos, ejemplos y guías de referencia del proyecto intermodular.</text:p>
      <text:p text:style-name="P14">Documentos principales consultados:</text:p>
      <text:list text:style-name="L56">
        <text:list-item>
          <text:p text:style-name="P125"><text:span text:style-name="Source_20_Text"><text:span text:style-name="T6">docs/00-material/Programación del Proyecto Agile Intermodular 25-26.pdf</text:span></text:span></text:p>
        </text:list-item>
        <text:list-item>
          <text:p text:style-name="P125"><text:span text:style-name="Source_20_Text"><text:span text:style-name="T6">docs/00-material/Equipos Ágiles.pdf</text:span></text:span></text:p>
        </text:list-item>
        <text:list-item>
          <text:p text:style-name="P125"><text:span text:style-name="Source_20_Text"><text:span text:style-name="T6">docs/00-material/Masterclass scrum.pdf</text:span></text:span></text:p>
        </text:list-item>
        <text:list-item>
          <text:p text:style-name="P125"><text:span text:style-name="Source_20_Text"><text:span text:style-name="T6">docs/00-material/DI1_ Análisis y Diseño de una Interfaz Web Interactiva.pdf</text:span></text:span></text:p>
        </text:list-item>
        <text:list-item>
          <text:p text:style-name="P125"><text:span text:style-name="Source_20_Text"><text:span text:style-name="T6">docs/00-material/DI1_Implementación Landing Page.pdf</text:span></text:span></text:p>
        </text:list-item>
        <text:list-item>
          <text:p text:style-name="P125"><text:span text:style-name="Source_20_Text"><text:span text:style-name="T6">docs/00-material/DI1_Investigación de Tendencias y Análisis de Competencia.pdf</text:span></text:span></text:p>
        </text:list-item>
        <text:list-item>
          <text:p text:style-name="P125"><text:span text:style-name="Source_20_Text"><text:span text:style-name="T6">docs/00-material/DI2_Diseño de la aplicación web.pdf</text:span></text:span></text:p>
        </text:list-item>
        <text:list-item>
          <text:p text:style-name="P125"><text:span text:style-name="Source_20_Text"><text:span text:style-name="T6">docs/00-material/DI2_Inspección y verificación de la usabilidad de la aplicación web Archivo.pdf</text:span></text:span></text:p>
        </text:list-item>
        <text:list-item>
          <text:p text:style-name="P125"><text:span text:style-name="Source_20_Text"><text:span text:style-name="T6">docs/00-material/DI2_Landing page accesible.pdf</text:span></text:span></text:p>
        </text:list-item>
        <text:list-item>
          <text:p text:style-name="P125"><text:span text:style-name="Source_20_Text"><text:span text:style-name="T6">docs/00-material/DI2_Optimización de imágenes en formato WebP y adaptación responsive Archivo.pdf</text:span></text:span></text:p>
        </text:list-item>
        <text:list-item>
          <text:p text:style-name="P125"><text:span text:style-name="Source_20_Text"><text:span text:style-name="T6">docs/00-material/DWEC1_IMPLEMENTACIÓNDELFORMULARIO.pdf</text:span></text:span></text:p>
        </text:list-item>
        <text:list-item>
          <text:p text:style-name="P125"><text:span text:style-name="Source_20_Text"><text:span text:style-name="T6">docs/00-material/DWEC2_BuscadorDeProducotosAjax.pdf</text:span></text:span></text:p>
        </text:list-item>
        <text:list-item>
          <text:p text:style-name="P125"><text:span text:style-name="Source_20_Text"><text:span text:style-name="T6">docs/00-material/DWEC2_IMPLEMENTACIÓNDELCARRITO.pdf</text:span></text:span></text:p>
        </text:list-item>
        <text:list-item>
          <text:p text:style-name="P125"><text:span text:style-name="Source_20_Text"><text:span text:style-name="T6">docs/00-material/2do Sprint DWES.pdf</text:span></text:span></text:p>
        </text:list-item>
      </text:list>
      <text:p text:style-name="P14"/>
      <text:h text:style-name="P121" text:outline-level="1"><text:bookmark-start text:name="__RefHeading___Toc2651_1385620957"/>2<text:span text:style-name="T35">1</text:span>. ANEXOS<text:bookmark-end text:name="__RefHeading___Toc2651_1385620957"/></text:h>
      <text:p text:style-name="P40">En este apartado se recogen los materiales complementarios, recursos visuales, evidencias técnicas y documentos auxiliares que respaldan el desarrollo de <text:span text:style-name="T11">PacePal</text:span>. Los anexos sirven para localizar de forma ordenada las pruebas gráficas y documentales mencionadas a lo largo de la memoria, reforzando la trazabilidad del trabajo realizado por <text:span text:style-name="T11">Treecore Studio</text:span>.</text:p>
      <text:p text:style-name="P40">Cada elemento se referencia con su ruta original dentro del repositorio para facilitar su localización y verificación por parte del tribunal.</text:p>
      <text:h text:style-name="P126" text:outline-level="2"/>
      <text:h text:style-name="P127" text:outline-level="2"><text:bookmark-start text:name="__RefHeading___Toc2653_1385620957"/>2<text:span text:style-name="T41">1</text:span>.1 Evidencias del Sprint 0 (Arranque)<text:bookmark-end text:name="__RefHeading___Toc2653_1385620957"/></text:h>
      <text:p text:style-name="P40">Este bloque reúne las pruebas visuales relacionadas con la preparación del entorno de trabajo y la organización inicial del repositorio.</text:p>
      <text:p text:style-name="P40"><text:span text:style-name="T27">Documento de referencia: </text:span><text:span text:style-name="Source_20_Text"><text:span text:style-name="T27">docs/02-agile/03-notas-sprint0.md</text:span></text:span></text:p>
      <text:p text:style-name="P40"><text:span text:style-name="T11">Figura A.1.</text:span> <text:span text:style-name="T15">Árbol inicial del repositorio de PacePal (Estructura base).</text:span></text:p>
      <text:p text:style-name="P40"><text:span text:style-name="T11">Figura A.2.</text:span> <text:span text:style-name="T15">Captura del tablero Trello al inicio del proyecto (Backlog v1).</text:span></text:p>
      <text:h text:style-name="P126" text:outline-level="2"/>
      <text:h text:style-name="P127" text:outline-level="2"><text:bookmark-start text:name="__RefHeading___Toc2655_1385620957"/>2<text:span text:style-name="T41">1</text:span>.2 Análisis de tendencias y competencia<text:bookmark-end text:name="__RefHeading___Toc2655_1385620957"/></text:h>
      <text:p text:style-name="P40">Capturas empleadas como apoyo visual para justificar las decisiones de diseño adoptadas en PacePal.</text:p>
      <text:p text:style-name="P40"><text:span text:style-name="T27">Documento de referencia: </text:span><text:span text:style-name="Source_20_Text"><text:span text:style-name="T27">docs/03-diw/sprint-1/01-tendencias-competencia.md</text:span></text:span></text:p>
      <text:p text:style-name="P40"><text:span text:style-name="T11">Figura A.3.</text:span> <text:span text:style-name="T15">Análisis de Meetup: Jerarquía de listados y flujo de unión.</text:span></text:p>
      <text:p text:style-name="P40"><text:span text:style-name="T11">Figura A.4.</text:span> <text:span text:style-name="T15">Análisis de Strava: Visualización de métricas y feedback de comunidad.</text:span></text:p>
      <text:p text:style-name="P40"><text:span text:style-name="T11">Figura A.5.</text:span> <text:span text:style-name="T15">Análisis de Komoot: Limpieza visual y relación técnica con la ruta.</text:span></text:p>
      <text:h text:style-name="P126" text:outline-level="2"/>
      <text:h text:style-name="P126" text:outline-level="2"/>
      <text:h text:style-name="P128" text:outline-level="2"><text:bookmark-start text:name="__RefHeading___Toc2657_1385620957"/>2<text:span text:style-name="T41">1</text:span>.3 Wireframes y prototipos (Sprint DIW)<text:bookmark-end text:name="__RefHeading___Toc2657_1385620957"/></text:h>
      <text:p text:style-name="P40">Estructura visual de la aplicación. Se presentan por parejas para apreciar la adaptación <text:span text:style-name="T11">Mobile First</text:span>.</text:p>
      <text:p text:style-name="P40"><text:span text:style-name="T27">Documentos de referencia: </text:span><text:span text:style-name="Source_20_Text"><text:span text:style-name="T27">docs/03-diw/sprint-1/03-wireframes.md</text:span></text:span><text:span text:style-name="T27"> y </text:span><text:span text:style-name="Source_20_Text"><text:span text:style-name="T27">04-boceto-final.md</text:span></text:span></text:p>
      <table:table table:name="Tabla6" table:style-name="Tabla6">
        <table:table-column table:style-name="Tabla6.A"/>
        <table:table-column table:style-name="Tabla6.B"/>
        <table:table-header-rows>
          <table:table-row>
            <table:table-cell table:style-name="Tabla6.A1" office:value-type="string">
              <text:p text:style-name="P30"><text:span text:style-name="Strong_20_Emphasis"><text:span text:style-name="T6">Vista de Escritorio (Desktop)</text:span></text:span></text:p>
            </table:table-cell>
            <table:table-cell table:style-name="Tabla6.A1" office:value-type="string">
              <text:p text:style-name="P30"><text:span text:style-name="Strong_20_Emphasis"><text:span text:style-name="T6">Vista Móvil (Mobile)</text:span></text:span></text:p>
            </table:table-cell>
          </table:table-row>
        </table:table-header-rows>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6.</text:span> <text:span text:style-name="T15">Wireframe Landing Page.</text:span></text:p>
          </table:table-cell>
          <table:table-cell table:style-name="Tabla6.A1" office:value-type="string">
            <text:p text:style-name="P32"><text:span text:style-name="T11">Fig. A.7.</text:span> <text:span text:style-name="T15">Wireframe Landing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8.</text:span> <text:span text:style-name="T15">Listado de actividades.</text:span></text:p>
          </table:table-cell>
          <table:table-cell table:style-name="Tabla6.A1" office:value-type="string">
            <text:p text:style-name="P32"><text:span text:style-name="T11">Fig. A.9.</text:span> <text:span text:style-name="T15">Listado actividades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10.</text:span> <text:span text:style-name="T15">Detalle de actividad.</text:span></text:p>
          </table:table-cell>
          <table:table-cell table:style-name="Tabla6.A1" office:value-type="string">
            <text:p text:style-name="P32"><text:span text:style-name="T11">Fig. A.11.</text:span> <text:span text:style-name="T15">Detalle actividad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12.</text:span> <text:span text:style-name="T15">Catálogo de rutas.</text:span></text:p>
          </table:table-cell>
          <table:table-cell table:style-name="Tabla6.A1" office:value-type="string">
            <text:p text:style-name="P32"><text:span text:style-name="T11">Fig. A.13.</text:span> <text:span text:style-name="T15">Catálogo rutas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14.</text:span> <text:span text:style-name="T15">Información técnica de ruta.</text:span></text:p>
          </table:table-cell>
          <table:table-cell table:style-name="Tabla6.A1" office:value-type="string">
            <text:p text:style-name="P32"><text:span text:style-name="T11">Fig. A.15.</text:span> <text:span text:style-name="T15">Detalle ruta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16.</text:span> <text:span text:style-name="T15">Interfaz de la tienda.</text:span></text:p>
          </table:table-cell>
          <table:table-cell table:style-name="Tabla6.A1" office:value-type="string">
            <text:p text:style-name="P32"><text:span text:style-name="T11">Fig. A.17.</text:span> <text:span text:style-name="T15">Tienda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18.</text:span> <text:span text:style-name="T15">Ficha de producto.</text:span></text:p>
          </table:table-cell>
          <table:table-cell table:style-name="Tabla6.A1" office:value-type="string">
            <text:p text:style-name="P32"><text:span text:style-name="T11">Fig. A.19.</text:span> <text:span text:style-name="T15">Ficha producto (Mobile).</text:span></text:p>
          </table:table-cell>
        </table:table-row>
        <table:table-row>
          <table:table-cell table:style-name="Tabla6.A1" office:value-type="string">
            <text:p text:style-name="P129"/>
          </table:table-cell>
          <table:table-cell table:style-name="Tabla6.A1" office:value-type="string">
            <text:p text:style-name="P129"/>
          </table:table-cell>
        </table:table-row>
        <table:table-row>
          <table:table-cell table:style-name="Tabla6.A1" office:value-type="string">
            <text:p text:style-name="P32"><text:span text:style-name="T11">Fig. A.20.</text:span> <text:span text:style-name="T15">Página "Sobre nosotros".</text:span></text:p>
          </table:table-cell>
          <table:table-cell table:style-name="Tabla6.A1" office:value-type="string">
            <text:p text:style-name="P32"><text:span text:style-name="T11">Fig. A.21.</text:span> <text:span text:style-name="T15">Sobre nosotros (Mobile).</text:span></text:p>
          </table:table-cell>
        </table:table-row>
      </table:table>
      <text:h text:style-name="P126" text:outline-level="2"/>
      <text:h text:style-name="P127" text:outline-level="2"><text:bookmark-start text:name="__RefHeading___Toc2659_1385620957"/>2<text:span text:style-name="T41">1</text:span>.4 Guía de estilos y componentes<text:bookmark-end text:name="__RefHeading___Toc2659_1385620957"/></text:h>
      <text:p text:style-name="P40">Resumen visual de la normativa de diseño aplicada para garantizar la coherencia del producto.</text:p>
      <text:p text:style-name="P40"><text:span text:style-name="T27">Documento de referencia: </text:span><text:span text:style-name="Source_20_Text"><text:span text:style-name="T27">docs/03-diw/sprint-1/03-guia-estilos.pdf</text:span></text:span></text:p>
      <text:p text:style-name="P40"><text:span text:style-name="T11">Figura A.22.</text:span> <text:span text:style-name="T15">Extracto de la guía de estilos: Paleta cromática, jerarquía tipográfica e iconografía base.</text:span></text:p>
      <text:h text:style-name="P126" text:outline-level="2"/>
      <text:h text:style-name="P126" text:outline-level="2"/>
      <text:h text:style-name="P128" text:outline-level="2"><text:bookmark-start text:name="__RefHeading___Toc2661_1385620957"/>2<text:span text:style-name="T41">1</text:span>.5 Evidencias de Lógica de Cliente (DWEC)<text:bookmark-end text:name="__RefHeading___Toc2661_1385620957"/></text:h>
      <text:p text:style-name="P40">Pruebas de validación de formularios, interacción dinámica y estados de autenticación.</text:p>
      <text:p text:style-name="P40"><text:span text:style-name="T27">Documento de referencia: </text:span><text:span text:style-name="Source_20_Text"><text:span text:style-name="T27">/docs/evidencias/dwec/</text:span></text:span></text:p>
      <table:table table:name="Tabla7" table:style-name="Tabla7">
        <table:table-column table:style-name="Tabla7.A"/>
        <table:table-column table:style-name="Tabla7.B"/>
        <table:table-header-rows>
          <table:table-row>
            <table:table-cell table:style-name="Tabla7.A1" office:value-type="string">
              <text:p text:style-name="P30"><text:span text:style-name="Strong_20_Emphasis"><text:span text:style-name="T6">Validación de Registro</text:span></text:span></text:p>
            </table:table-cell>
            <table:table-cell table:style-name="Tabla7.A1" office:value-type="string">
              <text:p text:style-name="P30"><text:span text:style-name="Strong_20_Emphasis"><text:span text:style-name="T6">Gestión de Acceso</text:span></text:span></text:p>
            </table:table-cell>
          </table:table-row>
        </table:table-header-rows>
        <table:table-row>
          <table:table-cell table:style-name="Tabla7.A1" office:value-type="string">
            <text:p text:style-name="P129"/>
          </table:table-cell>
          <table:table-cell table:style-name="Tabla7.A1" office:value-type="string">
            <text:p text:style-name="P129"/>
          </table:table-cell>
        </table:table-row>
        <table:table-row>
          <table:table-cell table:style-name="Tabla7.A1" office:value-type="string">
            <text:p text:style-name="P32"><text:span text:style-name="T11">Fig. A.23.</text:span> <text:span text:style-name="T15">Registro completado.</text:span></text:p>
          </table:table-cell>
          <table:table-cell table:style-name="Tabla7.A1" office:value-type="string">
            <text:p text:style-name="P32"><text:span text:style-name="T11">Fig. A.24.</text:span> <text:span text:style-name="T15">Gestión de error en Login.</text:span></text:p>
          </table:table-cell>
        </table:table-row>
        <table:table-row>
          <table:table-cell table:style-name="Tabla7.A1" office:value-type="string">
            <text:p text:style-name="P129"/>
          </table:table-cell>
          <table:table-cell table:style-name="Tabla7.A1" office:value-type="string">
            <text:p text:style-name="P129"/>
          </table:table-cell>
        </table:table-row>
        <table:table-row>
          <table:table-cell table:style-name="Tabla7.A1" office:value-type="string">
            <text:p text:style-name="P32"><text:span text:style-name="T11">Fig. A.25.</text:span> <text:span text:style-name="T15">Feedback en tiempo real.</text:span></text:p>
          </table:table-cell>
          <table:table-cell table:style-name="Tabla7.A1" office:value-type="string">
            <text:p text:style-name="P32"><text:span text:style-name="T11">Fig. A.26.</text:span> <text:span text:style-name="T15">Acceso correcto al sistema.</text:span></text:p>
          </table:table-cell>
        </table:table-row>
      </table:table>
      <text:p text:style-name="P40"><text:span text:style-name="T11">Figura A.27.</text:span> <text:span text:style-name="T15">Prueba de algoritmo de validación de DNI.</text:span></text:p>
      <text:p text:style-name="P40"><text:span text:style-name="T11">Figura A.28.</text:span> <text:span text:style-name="T15">Evidencia de lógica condicional en el DOM (Método de pago).</text:span></text:p>
      <text:h text:style-name="P126" text:outline-level="2"/>
      <text:h text:style-name="P127" text:outline-level="2"><text:bookmark-start text:name="__RefHeading___Toc2663_1385620957"/>2<text:span text:style-name="T41">1</text:span>.6 Evidencias de Servidor y API (DWES)<text:bookmark-end text:name="__RefHeading___Toc2663_1385620957"/></text:h>
      <text:p text:style-name="P40">Este apartado está reservado para las evidencias relacionadas con la base de datos, API REST y Postman.</text:p>
      <text:p text:style-name="P40"><text:span text:style-name="T15">Nota técnica:</text:span> En el momento de cierre de esta versión de la memoria, las evidencias gráficas completas del bloque DWES están pendientes de consolidación final. No obstante, el sistema cuenta con la estructura preparada para incorporar los tests de endpoints y el esquema relacional SQL antes de la defensa del proyecto.</text:p>
      <text:h text:style-name="P126" text:outline-level="2"/>
      <text:h text:style-name="P127" text:outline-level="2"><text:bookmark-start text:name="__RefHeading___Toc2665_1385620957"/>2<text:span text:style-name="T41">1</text:span>.7 Sostenibilidad y Comunicación Visual<text:bookmark-end text:name="__RefHeading___Toc2665_1385620957"/></text:h>
      <text:p text:style-name="P40">Recursos gráficos vinculados al compromiso ecosocial y la identidad promocional.</text:p>
      <text:p text:style-name="P40"><text:span text:style-name="T11">Figura A.29.</text:span> <text:span text:style-name="T15">Cartel publicitario de la campaña de sostenibilidad.</text:span></text:p>
      <text:p text:style-name="P40"><text:span text:style-name="T11">Figura A.30.</text:span> <text:span text:style-name="T15">Material promocional (Postal - Cara A).</text:span></text:p>
      <text:p text:style-name="P40"><text:span text:style-name="T11">Figura A.31.</text:span> <text:span text:style-name="T15">Material promocional (Postal - Cara B).</text:span></text:p>
      <text:h text:style-name="P126" text:outline-level="2"/>
      <text:h text:style-name="P127" text:outline-level="2"><text:bookmark-start text:name="__RefHeading___Toc2667_1385620957"/>2<text:span text:style-name="T41">1</text:span>.8 Relación de documentos complementarios<text:bookmark-end text:name="__RefHeading___Toc2667_1385620957"/></text:h>
      <text:p text:style-name="P40">Para una consulta extendida del proyecto, se listan los documentos técnicos alojados en el repositorio:</text:p>
      <text:list text:style-name="L57">
        <text:list-item>
          <text:p text:style-name="P130"><text:span text:style-name="T16">Gestión:</text:span><text:span text:style-name="T6"> </text:span><text:span text:style-name="Source_20_Text"><text:span text:style-name="T6">01-scrum-base.md</text:span></text:span><text:span text:style-name="T6">, </text:span><text:span text:style-name="Source_20_Text"><text:span text:style-name="T6">02-historias-usuario-v1.md</text:span></text:span><text:span text:style-name="T6">.</text:span></text:p>
        </text:list-item>
        <text:list-item>
          <text:p text:style-name="P130"><text:span text:style-name="T16">Diseño:</text:span><text:span text:style-name="T6"> </text:span><text:span text:style-name="Source_20_Text"><text:span text:style-name="T6">03-guia-estilos.pdf</text:span></text:span><text:span text:style-name="T6">, </text:span><text:span text:style-name="Source_20_Text"><text:span text:style-name="T6">04-boceto-final.md</text:span></text:span><text:span text:style-name="T6">.</text:span></text:p>
        </text:list-item>
        <text:list-item>
          <text:p text:style-name="P130"><text:span text:style-name="T16">Backend:</text:span><text:span text:style-name="T6"> Arquitectura de API y Modelo Relacional en </text:span><text:span text:style-name="Source_20_Text"><text:span text:style-name="T6">/docs/05-dwes/</text:span></text:span><text:span text:style-name="T6">.</text:span></text:p>
        </text:list-item>
      </text:list>
      <text:h text:style-name="P126" text:outline-level="2"><text:soft-page-break/></text:h>
      <text:h text:style-name="P127" text:outline-level="2"><text:bookmark-start text:name="__RefHeading___Toc2669_1385620957"/>2<text:span text:style-name="T41">1</text:span>.9 Cierre del anexo<text:bookmark-end text:name="__RefHeading___Toc2669_1385620957"/></text:h>
      <text:p text:style-name="P40">El conjunto de evidencias presentado permite certificar la trazabilidad completa de <text:span text:style-name="T11">PacePal</text:span>. Cada decisión descrita en la memoria tiene su respaldo real en archivos, capturas y prototipos, garantizando la solidez técnica y metodológica de la solución desarrollada por <text:span text:style-name="T11">Treecore Studio</text:span>.</text:p>
      <text:p text:style-name="P131"/>
      <text:p text:style-name="P132">Code. Connect. Create.</text:p>
      <text:p text:style-name="P133">Treecore Studio · 2026</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text-properties style:font-name="Calibri" fo:font-size="14pt" officeooo:paragraph-rsid="00751fc6" fo:background-color="transparent" style:font-size-asian="14pt" style:font-size-complex="14pt"/>
    </style:style>
    <style:style style:name="MT1" style:family="text">
      <style:text-properties fo:font-size="12pt" fo:font-style="italic" officeooo:rsid="00751fc6" style:font-size-asian="12pt" style:font-style-asian="italic" style:font-size-complex="12pt" style:font-style-complex="italic"/>
    </style:style>
    <style:style style:name="MT2" style:family="text">
      <style:text-properties officeooo:rsid="00751fc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 text:c="13"/>TreeCore Studio</text:span><text:span text:style-name="MT2"> <text:s text:c="113"/></text:span><text:span text:style-name="MT2"><text:page-number text:select-page="current">49</text:page-number></text:span><text:span text:style-name="MT2"><text:tab/></text:span><draw:frame draw:style-name="Mfr1" draw:name="Imagen1 Copia 1" text:anchor-type="char" svg:x="0.175cm" svg:y="-0.185cm" svg:width="0.988cm" svg:height="0.988cm" draw:z-index="26"><draw:image xlink:href="Pictures/100000010000040000000400FC2EC98A.png" xlink:type="simple" xlink:show="embed" xlink:actuate="onLoad" draw:mime-type="image/png"/></draw:frame></text:p>
      </style:footer>
      <style:footer-first>
        <text:p text:style-name="MP1"><text:span text:style-name="MT2"><text:s text:c="10"/><text:tab/></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2T10:36:34.664525100</meta:creation-date>
    <dc:date>2026-03-13T14:54:11.918941200</dc:date>
    <meta:editing-duration>PT8H40M28S</meta:editing-duration>
    <meta:editing-cycles>80</meta:editing-cycles>
    <meta:generator>LibreOffice/26.2.0.3$Windows_X86_64 LibreOffice_project/620$Build-3</meta:generator>
    <meta:print-date>2026-03-12T18:06:28.792696200</meta:print-date>
    <meta:printed-by>Archivos PDF</meta:printed-by>
    <meta:document-statistic meta:table-count="9" meta:image-count="3" meta:object-count="0" meta:page-count="49" meta:paragraph-count="812" meta:word-count="12120" meta:character-count="80030" meta:non-whitespace-character-count="68679"/>
  </office:meta>
</office:document-meta>
</file>